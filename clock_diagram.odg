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F000001C5868357A6.png" manifest:media-type="image/png"/>
  <manifest:file-entry manifest:full-path="Pictures/10000001000001B2000000C6D0B07313.png" manifest:media-type="image/png"/>
  <manifest:file-entry manifest:full-path="Pictures/1000000100000182000001EAF63FC2B4.png" manifest:media-type="image/png"/>
  <manifest:file-entry manifest:full-path="Pictures/10000001000003C6000001DFFE4D3ACA.png" manifest:media-type="image/png"/>
  <manifest:file-entry manifest:full-path="Pictures/100000000000017A0000014700683B33.jpg" manifest:media-type="image/jpeg"/>
  <manifest:file-entry manifest:full-path="Pictures/10000001000000E80000008FFD567DE1.png" manifest:media-type="image/png"/>
  <manifest:file-entry manifest:full-path="Pictures/100000010000023D000002673D74EC5A.png" manifest:media-type="image/png"/>
  <manifest:file-entry manifest:full-path="Pictures/100000010000010B000000C7C05D5FDF.png" manifest:media-type="image/png"/>
  <manifest:file-entry manifest:full-path="Pictures/100000010000009600000074D54675B0.png" manifest:media-type="image/png"/>
  <manifest:file-entry manifest:full-path="Pictures/1000000100000095000000838948456C.png" manifest:media-type="image/png"/>
  <manifest:file-entry manifest:full-path="Pictures/10000001000000B0000000A9986E478A.png" manifest:media-type="image/png"/>
  <manifest:file-entry manifest:full-path="Pictures/100000010000000600000006E598FA5F.png" manifest:media-type="image/png"/>
  <manifest:file-entry manifest:full-path="Pictures/1000000100000124000000EAA7055FDB.png" manifest:media-type="image/png"/>
  <manifest:file-entry manifest:full-path="Pictures/10000001000000FA000000FF1D7E82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 loext:decorative="false"/>
      <style:paragraph-properties style:writing-mode="lr-tb"/>
    </style:style>
    <style:style style:name="gr43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ffff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5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 loext:decorative="false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67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 loext:decorative="false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0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73" style:family="graphic">
      <style:graphic-properties style:writing-mode="lr-tb" loext:decorative="false"/>
    </style:style>
    <style:style style:name="gr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dash" draw:stroke-dash="Ultrafine_20_Dashe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2" style:family="graphic" style:parent-style-name="standard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cm" fo:min-width="0.51cm" fo:padding-top="0.142cm" fo:padding-bottom="0.142cm" fo:padding-left="0.267cm" fo:padding-right="0.267cm" fo:wrap-option="wrap" loext:decorative="false"/>
    </style:style>
    <style:style style:name="gr84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 loext:decorative="false"/>
    </style:style>
    <style:style style:name="gr8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9" style:family="graphic" style:parent-style-name="standard">
      <style:graphic-properties draw:stroke="none" svg:stroke-width="0.035cm" svg:stroke-color="#000000" draw:fill="none" draw:fill-color="#ffffff" fo:min-height="0.319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49cm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5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ffff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dash" draw:stroke-dash="Ultrafine_20_Dashe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79cm" fo:min-width="0.499cm" fo:padding-top="0.142cm" fo:padding-bottom="0.142cm" fo:padding-left="0.267cm" fo:padding-right="0.267cm" loext:decorative="false"/>
    </style:style>
    <style:style style:name="gr15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2" style:family="graphic" style:parent-style-name="standard">
      <style:graphic-properties draw:stroke="dash" draw:stroke-dash="Long_20_Dash_20__28_Rounded_29_" svg:stroke-width="0.035cm" draw:marker-start-width="0.252cm" draw:marker-end-width="0.252cm" svg:stroke-linecap="round" draw:fill="none" loext:fill-use-slide-background="false" draw:textarea-horizontal-align="justify" draw:textarea-vertical-align="middle" draw:auto-grow-height="false" fo:min-height="1.866cm" fo:min-width="3.563cm" fo:padding-top="0.142cm" fo:padding-bottom="0.142cm" fo:padding-left="0.267cm" fo:padding-right="0.267cm" loext:decorative="fals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6cm" loext:decorative="false"/>
      <style:paragraph-properties style:writing-mode="lr-tb"/>
    </style:style>
    <style:style style:name="gr16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165" style:family="graphic" style:parent-style-name="standard" style:list-style-name="L1">
      <style:graphic-properties draw:stroke="solid" svg:stroke-width="0cm" svg:stroke-color="#784b04" draw:marker-start="" draw:marker-start-width="0.2cm" draw:marker-start-center="false" draw:marker-end="" draw:marker-end-width="0.2cm" draw:marker-end-center="false" draw:fill="solid" draw:fill-color="#784b04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8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ffff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 loext:decorative="false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fo:min-height="0.445cm" loext:decorative="false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fo:min-height="0.514cm" loext:decorative="false"/>
      <style:paragraph-properties style:writing-mode="lr-tb"/>
    </style:style>
    <style:style style:name="gr225" style:family="graphic" style:parent-style-name="standard">
      <style:graphic-properties svg:stroke-width="0.053cm" svg:stroke-color="#784b0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2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dash" draw:stroke-dash="Ultrafine_20_Dashe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476cm" fo:padding-top="0.142cm" fo:padding-bottom="0.142cm" fo:padding-left="0.267cm" fo:padding-right="0.267cm" fo:wrap-option="wrap" loext:decorative="false"/>
    </style:style>
    <style:style style:name="gr23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9" style:family="graphic" style:parent-style-name="standard">
      <style:graphic-properties svg:stroke-width="0.053cm" svg:stroke-color="#f10d0c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1" style:family="graphic" style:parent-style-name="standard">
      <style:graphic-properties draw:stroke="solid" draw:stroke-dash="Dot" svg:stroke-width="0.053cm" svg:stroke-color="#f10d0c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42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244" style:family="graphic" style:parent-style-name="standard">
      <style:graphic-properties svg:stroke-color="#f10d0c" draw:fill="solid" draw:fill-color="#f10d0c" draw:textarea-horizontal-align="justify" draw:textarea-vertical-align="middle" draw:auto-grow-height="false" fo:min-height="0cm" fo:min-width="0cm" loext:decorative="false"/>
    </style:style>
    <style:style style:name="gr245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11cm" loext:decorative="false"/>
      <style:paragraph-properties style:writing-mode="lr-tb"/>
    </style:style>
    <style:style style:name="gr248" style:family="graphic" style:parent-style-name="standard">
      <style:graphic-properties svg:stroke-color="#f10d0c" draw:fill="solid" draw:fill-color="#f10d0c" draw:textarea-vertical-align="middle" draw:auto-grow-height="false" fo:min-height="0cm" fo:min-width="0cm" loext:decorative="false"/>
    </style:style>
    <style:style style:name="gr249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9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ffff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3" style:family="graphic" style:parent-style-name="standard">
      <style:graphic-properties draw:stroke="none" svg:stroke-color="#000000" draw:fill="none" draw:fill-color="#ffffff" fo:min-height="0.431cm" loext:decorative="false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fo:min-height="0.791cm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dash" draw:stroke-dash="Ultrafine_20_Dashe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35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ffff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7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6" style:family="graphic" style:parent-style-name="standard">
      <style:graphic-properties draw:stroke="none" svg:stroke-color="#000000" draw:fill="none" draw:fill-color="#ffffff" fo:min-height="1.176cm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1" style:family="graphic" style:parent-style-name="standard" style:list-style-name="L2">
      <style:graphic-properties draw:stroke="dash" draw:stroke-dash="Ultrafine_20_Dashe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9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9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9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3cm" fo:min-width="2.78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d281e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-color="#784b04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784b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9pt"/>
    </style:style>
    <style:style style:name="P21" style:family="paragraph">
      <style:text-properties fo:font-size="18pt"/>
    </style:style>
    <style:style style:name="P22" style:family="paragraph">
      <style:text-properties fo:font-size="10pt"/>
    </style:style>
    <style:style style:name="P23" style:family="paragraph">
      <style:text-properties fo:font-size="8pt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10d0c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draw:style-name="gr1" xml:id="id2" draw:id="id2">
          <draw:glue-point draw:id="4" svg:x="4.675cm" svg:y="5cm"/>
          <draw:glue-point draw:id="5" svg:x="5cm" svg:y="-4.832cm"/>
          <draw:line draw:style-name="gr2" draw:text-style-name="P1" draw:layer="layout" svg:x1="19.332cm" svg:y1="12.904cm" svg:x2="19.365cm" svg:y2="11.905cm">
            <text:p/>
          </draw:line>
          <draw:line draw:style-name="gr3" draw:text-style-name="P1" draw:layer="layout" svg:x1="19.832cm" svg:y1="12.922cm" svg:x2="19.341cm" svg:y2="12.655cm">
            <text:p/>
          </draw:line>
          <draw:line draw:style-name="gr4" draw:text-style-name="P1" draw:layer="layout" svg:x1="19.611cm" svg:y1="12.039cm" svg:x2="19.357cm" svg:y2="12.156cm">
            <text:p/>
          </draw:line>
          <draw:line draw:style-name="gr5" draw:text-style-name="P1" draw:layer="layout" svg:x1="19.349cm" svg:y1="12.405cm" svg:x2="18.849cm" svg:y2="12.388cm">
            <text:p/>
          </draw:line>
          <draw:line draw:style-name="gr6" draw:text-style-name="P1" draw:layer="layout" svg:x1="19.611cm" svg:y1="12.039cm" svg:x2="19.865cm" svg:y2="11.922cm">
            <text:p/>
          </draw:line>
        </draw:g>
        <draw:g draw:style-name="gr1" xml:id="id1" draw:id="id1">
          <draw:rect draw:style-name="gr7" draw:text-style-name="P3" draw:layer="layout" svg:width="0.75cm" svg:height="0.463cm" svg:x="17.547cm" svg:y="12.193cm">
            <text:p text:style-name="P2"><text:span text:style-name="T1">3.3k</text:span></text:p>
          </draw:rect>
          <draw:line draw:style-name="gr8" draw:text-style-name="P1" draw:layer="layout" svg:x1="17.297cm" svg:y1="12.425cm" svg:x2="17.547cm" svg:y2="12.425cm">
            <text:p/>
          </draw:line>
          <draw:line draw:style-name="gr9" draw:text-style-name="P1" draw:layer="layout" svg:x1="18.297cm" svg:y1="12.425cm" svg:x2="18.547cm" svg:y2="12.425cm">
            <text:p/>
          </draw:line>
        </draw:g>
        <draw:connector draw:style-name="gr10" draw:text-style-name="P4" draw:layer="layout" svg:x1="18.547cm" svg:y1="12.424cm" svg:x2="18.849cm" svg:y2="12.413cm" draw:start-shape="id1" draw:start-glue-point="1" draw:end-shape="id2" draw:end-glue-point="3" svg:d="M18547 12424h151v-11h151" svg:viewBox="0 0 303 12">
          <text:p/>
        </draw:connector>
        <draw:g draw:style-name="gr1" xml:id="id4" draw:id="id4">
          <draw:rect draw:style-name="gr11" draw:text-style-name="P3" draw:layer="layout" svg:width="0.75cm" svg:height="0.331cm" svg:x="21.502cm" svg:y="11.131cm">
            <text:p text:style-name="P2"><text:span text:style-name="T1">470</text:span></text:p>
          </draw:rect>
          <draw:line draw:style-name="gr12" draw:text-style-name="P1" draw:layer="layout" svg:x1="21.252cm" svg:y1="11.297cm" svg:x2="21.502cm" svg:y2="11.297cm">
            <text:p/>
          </draw:line>
          <draw:line draw:style-name="gr13" draw:text-style-name="P1" draw:layer="layout" svg:x1="22.252cm" svg:y1="11.297cm" svg:x2="22.502cm" svg:y2="11.297cm">
            <text:p/>
          </draw:line>
        </draw:g>
        <draw:g draw:style-name="gr1" xml:id="id3" draw:id="id3">
          <draw:rect draw:style-name="gr14" draw:text-style-name="P5" draw:layer="layout" svg:width="0.75cm" svg:height="0.349cm" draw:transform="rotate (1.5707963267949) translate (20.397cm 10.676cm)">
            <text:p text:style-name="P2"><text:span text:style-name="T2">1k</text:span></text:p>
          </draw:rect>
          <draw:line draw:style-name="gr15" draw:text-style-name="P1" draw:layer="layout" svg:x1="20.569cm" svg:y1="10.927cm" svg:x2="20.569cm" svg:y2="10.677cm">
            <text:p/>
          </draw:line>
          <draw:line draw:style-name="gr16" draw:text-style-name="P1" draw:layer="layout" svg:x1="20.569cm" svg:y1="9.926cm" svg:x2="20.569cm" svg:y2="9.676cm">
            <text:p/>
          </draw:line>
        </draw:g>
        <draw:connector draw:style-name="gr10" draw:text-style-name="P4" draw:layer="layout" svg:x1="19.865cm" svg:y1="11.922cm" svg:x2="20.571cm" svg:y2="10.927cm" draw:start-shape="id2" draw:start-glue-point="5" draw:end-shape="id3" draw:end-glue-point="2" svg:d="M19865 11922h706v-995" svg:viewBox="0 0 707 996">
          <text:p/>
        </draw:connector>
        <draw:connector draw:style-name="gr10" draw:text-style-name="P4" draw:layer="layout" svg:x1="19.865cm" svg:y1="11.922cm" svg:x2="21.252cm" svg:y2="11.296cm" draw:start-shape="id2" draw:start-glue-point="5" draw:end-shape="id4" draw:end-glue-point="3" svg:d="M19865 11922h694v-626h693" svg:viewBox="0 0 1388 627">
          <text:p/>
        </draw:connector>
        <draw:frame draw:style-name="gr17" draw:text-style-name="P6" xml:id="id6" draw:id="id6" draw:layer="layout" svg:width="3.545cm" svg:height="1.877cm" svg:x="10.69cm" svg:y="6.99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5" draw:id="id5" draw:layer="layout" svg:width="5.243cm" svg:height="6.656cm" svg:x="8.286cm" svg:y="11.17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7" draw:text-style-name="P6" xml:id="id7" draw:id="id7" draw:layer="layout" svg:width="3.763cm" svg:height="1.866cm" draw:transform="rotate (-1.56713113536571) translate (25.952cm 9.519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8" draw:id="id8" draw:layer="layout" svg:width="2.163cm" svg:height="1.612cm" draw:transform="rotate (1.5707963267949) translate (2.815cm 14.92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9" draw:id="id9">
          <draw:glue-point draw:id="4" svg:x="-5cm" svg:y="3.008cm"/>
          <draw:glue-point draw:id="5" svg:x="5cm" svg:y="3.008cm"/>
          <draw:line draw:style-name="gr18" draw:text-style-name="P1" draw:layer="layout" svg:x1="16.291cm" svg:y1="12.976cm" svg:x2="16.291cm" svg:y2="13.226cm">
            <text:p/>
          </draw:line>
          <draw:line draw:style-name="gr19" draw:text-style-name="P1" draw:layer="layout" svg:x1="16.541cm" svg:y1="13.101cm" svg:x2="16.291cm" svg:y2="12.976cm">
            <text:p/>
          </draw:line>
          <draw:line draw:style-name="gr20" draw:text-style-name="P1" draw:layer="layout" svg:x1="16.291cm" svg:y1="13.226cm" svg:x2="16.541cm" svg:y2="13.101cm">
            <text:p/>
          </draw:line>
          <draw:line draw:style-name="gr21" draw:text-style-name="P1" draw:layer="layout" svg:x1="16.916cm" svg:y1="13.101cm" svg:x2="15.916cm" svg:y2="13.101cm">
            <text:p/>
          </draw:line>
          <draw:line draw:style-name="gr22" draw:text-style-name="P1" draw:layer="layout" svg:x1="16.541cm" svg:y1="12.976cm" svg:x2="16.541cm" svg:y2="13.226cm">
            <text:p/>
          </draw:line>
          <draw:line draw:style-name="gr23" draw:text-style-name="P1" draw:layer="layout" svg:x1="16.541cm" svg:y1="12.851cm" svg:x2="16.791cm" svg:y2="12.601cm">
            <text:p/>
          </draw:line>
          <draw:line draw:style-name="gr24" draw:text-style-name="P1" draw:layer="layout" svg:x1="16.666cm" svg:y1="12.976cm" svg:x2="16.916cm" svg:y2="12.726cm">
            <text:p/>
          </draw:line>
        </draw:g>
        <draw:frame draw:style-name="gr17" draw:text-style-name="P6" xml:id="id18" draw:id="id18" draw:layer="layout" svg:width="1.137cm" svg:height="1cm" draw:transform="rotate (-1.5707963267949) translate (7.46cm 8.317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0" draw:text-style-name="P4" draw:layer="layout" svg:x1="13.525cm" svg:y1="12.406cm" svg:x2="17.297cm" svg:y2="12.424cm" draw:start-shape="id5" draw:start-glue-point="5" draw:end-shape="id1" draw:end-glue-point="3" svg:d="M13525 12406h1879v18h1893" svg:viewBox="0 0 3773 19">
          <text:p/>
        </draw:connector>
        <draw:connector draw:style-name="gr10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5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0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6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7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6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0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0" draw:text-style-name="P4" draw:layer="layout" svg:x1="15.916cm" svg:y1="13.101cm" svg:x2="13.504cm" svg:y2="13.115cm" draw:start-shape="id9" draw:start-glue-point="4" draw:end-shape="id5" draw:end-glue-point="7" svg:d="M15916 13101h-1202v14h-1210" svg:viewBox="0 0 2413 15">
          <text:p/>
        </draw:connector>
        <draw:g draw:style-name="gr1" xml:id="id10" draw:id="id10">
          <draw:rect draw:style-name="gr28" draw:text-style-name="P3" draw:layer="layout" svg:width="0.75cm" svg:height="0.419cm" svg:x="17.465cm" svg:y="12.876cm">
            <text:p text:style-name="P2"><text:span text:style-name="T1">2</text:span><text:span text:style-name="T1">2</text:span><text:span text:style-name="T1">0</text:span></text:p>
          </draw:rect>
          <draw:line draw:style-name="gr29" draw:text-style-name="P1" draw:layer="layout" svg:x1="17.215cm" svg:y1="13.086cm" svg:x2="17.465cm" svg:y2="13.086cm">
            <text:p/>
          </draw:line>
          <draw:line draw:style-name="gr30" draw:text-style-name="P1" draw:layer="layout" svg:x1="18.215cm" svg:y1="13.086cm" svg:x2="18.465cm" svg:y2="13.086cm">
            <text:p/>
          </draw:line>
        </draw:g>
        <draw:connector draw:style-name="gr10" draw:text-style-name="P4" draw:layer="layout" svg:x1="16.916cm" svg:y1="13.101cm" svg:x2="17.215cm" svg:y2="13.085cm" draw:start-shape="id9" draw:start-glue-point="5" draw:end-shape="id10" draw:end-glue-point="3" svg:d="M16916 13101h150v-16h149" svg:viewBox="0 0 300 17">
          <text:p/>
        </draw:connector>
        <draw:connector draw:style-name="gr25" draw:text-style-name="P4" draw:layer="layout" svg:x1="18.465cm" svg:y1="13.085cm" svg:x2="13.504cm" svg:y2="14.078cm" draw:start-shape="id10" draw:start-glue-point="1" draw:end-shape="id5" draw:end-glue-point="10" svg:d="M18465 13085h518v993h-5479" svg:viewBox="0 0 5480 994">
          <text:p/>
        </draw:connector>
        <draw:frame draw:style-name="gr17" draw:text-style-name="P6" xml:id="id12" draw:id="id12" draw:layer="layout" svg:width="3.686cm" svg:height="2.954cm" draw:transform="rotate (1.5707963267949) translate (4.188cm 5.946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3" draw:id="id13">
          <draw:glue-point draw:id="4" svg:x="-5cm" svg:y="5.04cm"/>
          <draw:glue-point draw:id="5" svg:x="5cm" svg:y="5.04cm"/>
          <draw:line draw:style-name="gr31" draw:text-style-name="P1" draw:layer="layout" svg:x1="7.558cm" svg:y1="5.617cm" svg:x2="7.808cm" svg:y2="5.617cm">
            <text:p/>
          </draw:line>
          <draw:line draw:style-name="gr32" draw:text-style-name="P1" draw:layer="layout" svg:x1="8.558cm" svg:y1="5.617cm" svg:x2="8.808cm" svg:y2="5.617cm">
            <text:p/>
          </draw:line>
          <draw:path draw:style-name="gr33" draw:text-style-name="P5" draw:layer="layout" svg:width="0.187cm" svg:height="0.123cm" svg:x="7.808cm" svg:y="5.493cm" svg:viewBox="0 0 188 124" svg:d="M0 124c94-279 188 0 188 0">
            <text:p/>
          </draw:path>
          <draw:path draw:style-name="gr34" draw:text-style-name="P5" draw:layer="layout" svg:width="0.187cm" svg:height="0.123cm" svg:x="7.997cm" svg:y="5.494cm" svg:viewBox="0 0 188 124" svg:d="M0 124c94-279 188 0 188 0">
            <text:p/>
          </draw:path>
          <draw:path draw:style-name="gr35" draw:text-style-name="P5" draw:layer="layout" svg:width="0.187cm" svg:height="0.123cm" svg:x="8.185cm" svg:y="5.493cm" svg:viewBox="0 0 188 124" svg:d="M0 124c94-279 188 0 188 0">
            <text:p/>
          </draw:path>
          <draw:path draw:style-name="gr36" draw:text-style-name="P5" draw:layer="layout" svg:width="0.187cm" svg:height="0.123cm" svg:x="8.371cm" svg:y="5.493cm" svg:viewBox="0 0 188 124" svg:d="M0 124c94-279 188 0 188 0">
            <text:p/>
          </draw:path>
        </draw:g>
        <draw:g draw:style-name="gr1" xml:id="id11" draw:id="id11">
          <draw:line draw:style-name="gr37" draw:text-style-name="P1" draw:layer="layout" svg:x1="9.07cm" svg:y1="4.85cm" svg:x2="9.57cm" svg:y2="4.85cm">
            <text:p/>
          </draw:line>
          <draw:line draw:style-name="gr38" draw:text-style-name="P1" draw:layer="layout" svg:x1="9.07cm" svg:y1="4.725cm" svg:x2="9.57cm" svg:y2="4.725cm">
            <text:p/>
          </draw:line>
          <draw:line draw:style-name="gr39" draw:text-style-name="P7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0" draw:text-style-name="P1" draw:layer="layout" svg:x1="9.32cm" svg:y1="4.725cm" svg:x2="9.32cm" svg:y2="4.475cm">
            <text:p/>
          </draw:line>
        </draw:g>
        <draw:connector draw:style-name="gr41" draw:text-style-name="P4" xml:id="id28" draw:id="id28" draw:layer="layout" svg:x1="8.85cm" svg:y1="5.649cm" svg:x2="9.32cm" svg:y2="5.1cm" draw:end-shape="id11" draw:end-glue-point="2" svg:d="M8850 5649v-15h470v-534" svg:viewBox="0 0 471 550">
          <text:p/>
        </draw:connector>
        <draw:connector draw:style-name="gr26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41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2" draw:text-style-name="P8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6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3" draw:text-style-name="P4" draw:layer="layout" draw:line-skew="-0.573cm 3.104cm" svg:x1="10.722cm" svg:y1="7.995cm" svg:x2="20.571cm" svg:y2="9.676cm" draw:start-shape="id6" draw:start-glue-point="8" draw:end-shape="id3" draw:end-glue-point="0" svg:d="M10722 7995h-1105v1607h10954v74" svg:viewBox="0 0 10955 1682">
          <text:p/>
        </draw:connector>
        <draw:frame draw:style-name="gr17" draw:text-style-name="P6" xml:id="id14" draw:id="id14" draw:layer="layout" svg:width="3.936cm" svg:height="2.426cm" svg:x="20.751cm" svg:y="16.71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draw:style-name="gr1" xml:id="id15" draw:id="id15">
          <draw:rect draw:style-name="gr44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5" draw:text-style-name="P1" draw:layer="layout" svg:x1="18.829cm" svg:y1="17.217cm" svg:x2="19.079cm" svg:y2="17.217cm">
            <text:p/>
          </draw:line>
          <draw:line draw:style-name="gr46" draw:text-style-name="P1" draw:layer="layout" svg:x1="19.829cm" svg:y1="17.217cm" svg:x2="20.079cm" svg:y2="17.217cm">
            <text:p/>
          </draw:line>
        </draw:g>
        <draw:g draw:style-name="gr1" xml:id="id16" draw:id="id16">
          <draw:rect draw:style-name="gr47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8" draw:text-style-name="P1" draw:layer="layout" svg:x1="17.957cm" svg:y1="17.505cm" svg:x2="18.207cm" svg:y2="17.505cm">
            <text:p/>
          </draw:line>
          <draw:line draw:style-name="gr49" draw:text-style-name="P1" draw:layer="layout" svg:x1="18.957cm" svg:y1="17.505cm" svg:x2="19.207cm" svg:y2="17.505cm">
            <text:p/>
          </draw:line>
        </draw:g>
        <draw:connector draw:style-name="gr10" draw:text-style-name="P4" draw:layer="layout" svg:x1="20.079cm" svg:y1="17.217cm" svg:x2="20.996cm" svg:y2="17.239cm" draw:start-shape="id15" draw:start-glue-point="1" draw:end-shape="id14" draw:end-glue-point="5" svg:d="M20079 17217h345v22h572" svg:viewBox="0 0 918 23">
          <text:p/>
        </draw:connector>
        <draw:connector draw:style-name="gr10" draw:text-style-name="P4" draw:layer="layout" svg:x1="19.207cm" svg:y1="17.505cm" svg:x2="20.996cm" svg:y2="17.504cm" draw:start-shape="id16" draw:start-glue-point="1" draw:end-shape="id14" draw:end-glue-point="6" svg:d="M19207 17505h781v-1h1008" svg:viewBox="0 0 1790 2">
          <text:p/>
        </draw:connector>
        <draw:connector draw:style-name="gr41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1" draw:text-style-name="P4" draw:layer="layout" svg:x1="9.316cm" svg:y1="5.707cm" svg:x2="10.702cm" svg:y2="7.491cm" draw:start-shape="id17" draw:start-glue-point="8" draw:end-shape="id6" draw:end-glue-point="7" svg:d="M9316 5707v1784h1386" svg:viewBox="0 0 1387 1785">
          <text:p/>
        </draw:connector>
        <draw:connector draw:style-name="gr10" draw:text-style-name="P4" draw:layer="layout" svg:x1="18.829cm" svg:y1="17.217cm" svg:x2="13.504cm" svg:y2="15.399cm" draw:start-shape="id15" draw:start-glue-point="3" draw:end-shape="id5" draw:end-glue-point="14" svg:d="M18829 17217h-2659v-1818h-2666" svg:viewBox="0 0 5326 1819">
          <text:p/>
        </draw:connector>
        <draw:connector draw:style-name="gr10" draw:text-style-name="P4" draw:layer="layout" svg:x1="13.483cm" svg:y1="15.092cm" svg:x2="17.957cm" svg:y2="17.505cm" draw:start-shape="id5" draw:start-glue-point="13" draw:end-shape="id16" draw:end-glue-point="3" svg:d="M13483 15092h2251v2413h2223" svg:viewBox="0 0 4475 2414">
          <text:p/>
        </draw:connector>
        <draw:g draw:style-name="gr1" xml:id="id19" draw:id="id19">
          <draw:rect draw:style-name="gr50" draw:text-style-name="P5" draw:layer="layout" svg:width="0.75cm" svg:height="0.289cm" draw:transform="rotate (1.5707963267949) translate (7.149cm 13.642cm)">
            <text:p text:style-name="P2"><text:span text:style-name="T1">2.</text:span><text:span text:style-name="T1">2k</text:span></text:p>
          </draw:rect>
          <draw:line draw:style-name="gr51" draw:text-style-name="P1" draw:layer="layout" svg:x1="7.293cm" svg:y1="12.64cm" svg:x2="7.293cm" svg:y2="12.89cm">
            <text:p/>
          </draw:line>
          <draw:line draw:style-name="gr52" draw:text-style-name="P1" draw:layer="layout" svg:x1="7.293cm" svg:y1="13.64cm" svg:x2="7.293cm" svg:y2="13.89cm">
            <text:p/>
          </draw:line>
        </draw:g>
        <draw:connector draw:style-name="gr10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6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0" draw:text-style-name="P4" draw:layer="layout" svg:x1="7.293cm" svg:y1="12.64cm" svg:x2="7.292cm" svg:y2="9.362cm" draw:start-shape="id19" draw:start-glue-point="0" draw:end-shape="id18" draw:end-glue-point="4" svg:d="M7293 12640v-1602h-1v-1676" svg:viewBox="0 0 2 3279">
          <text:p/>
        </draw:connector>
        <draw:connector draw:style-name="gr53" draw:text-style-name="P4" draw:layer="layout" svg:x1="1.69cm" svg:y1="2.995cm" svg:x2="4.188cm" svg:y2="2.835cm" draw:start-shape="id20" draw:start-glue-point="0" draw:end-shape="id12" draw:end-glue-point="8" svg:d="M1690 2995v-518h1446v358h1052" svg:viewBox="0 0 2499 519">
          <text:p/>
        </draw:connector>
        <draw:connector draw:style-name="gr41" draw:text-style-name="P4" draw:layer="layout" draw:line-skew="-0.214cm 0.523cm" svg:x1="4.212cm" svg:y1="3.857cm" svg:x2="3.04cm" svg:y2="4.144cm" draw:start-shape="id12" draw:start-glue-point="9" draw:end-shape="id21" draw:end-glue-point="4" svg:d="M4212 3857h-760v292h-412v-5" svg:viewBox="0 0 1173 293">
          <text:p/>
        </draw:connector>
        <draw:connector draw:style-name="gr41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1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draw:style-name="gr1" xml:id="id23" draw:id="id23">
          <draw:circle draw:style-name="gr54" draw:text-style-name="P9" draw:layer="layout" svg:width="1cm" svg:height="1cm" svg:x="13.501cm" svg:y="3.053cm">
            <text:p text:style-name="P2"><text:span text:style-name="T4"><text:s text:c="4"/>U</text:span></text:p>
          </draw:circle>
          <draw:line draw:style-name="gr55" draw:text-style-name="P10" draw:layer="layout" svg:x1="13.628cm" svg:y1="3.616cm" svg:x2="13.703cm" svg:y2="3.616cm">
            <text:p/>
          </draw:line>
          <draw:line draw:style-name="gr56" draw:text-style-name="P10" draw:layer="layout" svg:x1="13.628cm" svg:y1="3.491cm" svg:x2="14.003cm" svg:y2="3.491cm">
            <text:p/>
          </draw:line>
          <draw:line draw:style-name="gr57" draw:text-style-name="P10" draw:layer="layout" svg:x1="13.778cm" svg:y1="3.616cm" svg:x2="13.853cm" svg:y2="3.616cm">
            <text:p/>
          </draw:line>
          <draw:line draw:style-name="gr58" draw:text-style-name="P10" draw:layer="layout" svg:x1="13.928cm" svg:y1="3.616cm" svg:x2="14.003cm" svg:y2="3.616cm">
            <text:p/>
          </draw:line>
        </draw:g>
        <draw:connector draw:style-name="gr26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3" draw:text-style-name="P4" draw:layer="layout" draw:line-skew="-0.146cm" svg:x1="13.501cm" svg:y1="3.553cm" svg:x2="7.115cm" svg:y2="4.149cm" draw:start-shape="id23" draw:end-shape="id12" draw:end-glue-point="6" svg:d="M13501 3553h-3334v596h-3052" svg:viewBox="0 0 6387 597">
          <text:p/>
        </draw:connector>
        <draw:g draw:style-name="gr1" xml:id="id24" draw:id="id24">
          <draw:rect draw:style-name="gr59" draw:text-style-name="P3" draw:layer="layout" svg:width="0.75cm" svg:height="0.318cm" svg:x="13.958cm" svg:y="4.667cm">
            <text:p text:style-name="P2"><text:span text:style-name="T1">10k</text:span></text:p>
          </draw:rect>
          <draw:line draw:style-name="gr60" draw:text-style-name="P1" draw:layer="layout" svg:x1="13.708cm" svg:y1="4.826cm" svg:x2="13.958cm" svg:y2="4.826cm">
            <text:p/>
          </draw:line>
          <draw:line draw:style-name="gr61" draw:text-style-name="P1" draw:layer="layout" svg:x1="14.708cm" svg:y1="4.826cm" svg:x2="14.958cm" svg:y2="4.826cm">
            <text:p/>
          </draw:line>
        </draw:g>
        <draw:g draw:style-name="gr1" xml:id="id25" draw:id="id25">
          <draw:rect draw:style-name="gr62" draw:text-style-name="P3" draw:layer="layout" svg:width="0.75cm" svg:height="0.333cm" svg:x="16.226cm" svg:y="4.652cm">
            <text:p text:style-name="P2"><text:span text:style-name="T1">20k</text:span></text:p>
          </draw:rect>
          <draw:line draw:style-name="gr63" draw:text-style-name="P1" draw:layer="layout" svg:x1="15.976cm" svg:y1="4.819cm" svg:x2="16.226cm" svg:y2="4.819cm">
            <text:p/>
          </draw:line>
          <draw:line draw:style-name="gr64" draw:text-style-name="P1" draw:layer="layout" svg:x1="16.976cm" svg:y1="4.819cm" svg:x2="17.226cm" svg:y2="4.819cm">
            <text:p/>
          </draw:line>
        </draw:g>
        <draw:connector draw:style-name="gr10" draw:text-style-name="P4" xml:id="id26" draw:id="id26" draw:layer="layout" svg:x1="14.958cm" svg:y1="4.826cm" svg:x2="15.976cm" svg:y2="4.818cm" draw:start-shape="id24" draw:start-glue-point="1" draw:end-shape="id25" draw:end-glue-point="3" svg:d="M14958 4826h509v-8h509" svg:viewBox="0 0 1019 9">
          <text:p/>
        </draw:connector>
        <draw:connector draw:style-name="gr10" draw:text-style-name="P4" draw:layer="layout" draw:line-skew="1.239cm" svg:x1="15.467cm" svg:y1="4.822cm" svg:x2="13.525cm" svg:y2="12.755cm" draw:start-shape="id26" draw:start-glue-point="0" draw:end-shape="id5" draw:end-glue-point="6" svg:d="M15467 4822h7v7933h-1949" svg:viewBox="0 0 1950 7934">
          <text:p/>
        </draw:connector>
        <draw:connector draw:style-name="gr10" draw:text-style-name="P4" draw:layer="layout" svg:x1="13.501cm" svg:y1="3.553cm" svg:x2="13.708cm" svg:y2="4.826cm" draw:start-shape="id23" draw:start-glue-point="3" draw:end-shape="id24" draw:end-glue-point="3" svg:d="M13501 3553h-518v1273h725" svg:viewBox="0 0 726 1274">
          <text:p/>
        </draw:connector>
        <draw:connector draw:style-name="gr53" draw:text-style-name="P4" draw:layer="layout" svg:x1="17.226cm" svg:y1="4.818cm" svg:x2="14.001cm" svg:y2="2.458cm" draw:start-shape="id25" draw:start-glue-point="1" draw:end-shape="id27" draw:end-glue-point="0" svg:d="M17226 4818h518v-2360h-3743" svg:viewBox="0 0 3744 2361">
          <text:p/>
        </draw:connector>
        <draw:connector draw:style-name="gr41" draw:text-style-name="P4" draw:layer="layout" draw:line-skew="0.279cm -0.695cm" svg:x1="14.159cm" svg:y1="8.173cm" svg:x2="9.085cm" svg:y2="5.634cm" draw:start-shape="id6" draw:start-glue-point="6" draw:end-shape="id28" draw:end-glue-point="0" svg:d="M14159 8173h855v-2535h-5929v-4" svg:viewBox="0 0 5930 2540">
          <text:p/>
        </draw:connector>
        <draw:frame draw:style-name="gr17" draw:text-style-name="P6" xml:id="id29" draw:id="id29" draw:layer="layout" svg:width="2.333cm" svg:height="2.504cm" svg:x="22.69cm" svg:y="5.019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0" draw:text-style-name="P4" draw:layer="layout" svg:x1="22.502cm" svg:y1="11.296cm" svg:x2="23.435cm" svg:y2="7.523cm" draw:start-shape="id4" draw:start-glue-point="1" draw:end-shape="id29" draw:end-glue-point="6" svg:d="M22502 11296h933v-3773" svg:viewBox="0 0 934 3774">
          <text:p/>
        </draw:connector>
        <draw:connector draw:style-name="gr26" draw:text-style-name="P4" draw:layer="layout" draw:line-skew="7.81cm 0.02cm" svg:x1="14.001cm" svg:y1="2.458cm" svg:x2="23.932cm" svg:y2="7.523cm" draw:start-shape="id27" draw:start-glue-point="0" draw:end-shape="id29" draw:end-glue-point="7" svg:d="M14001 2458h12168v5585h-2237v-520" svg:viewBox="0 0 12169 5586">
          <text:p/>
        </draw:connector>
        <draw:connector draw:style-name="gr26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1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3" draw:text-style-name="P4" draw:layer="layout" draw:line-skew="0.978cm" svg:x1="20.571cm" svg:y1="9.676cm" svg:x2="22.982cm" svg:y2="7.513cm" draw:start-shape="id3" draw:start-glue-point="0" draw:end-shape="id29" draw:end-glue-point="5" svg:d="M20571 9676v-107h2411v-2056" svg:viewBox="0 0 2412 2164">
          <text:p/>
        </draw:connector>
        <draw:connector draw:style-name="gr43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5" draw:text-style-name="P11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5.394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xml:id="id17" draw:id="id17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3" draw:layer="layout" svg:width="18.301cm" svg:height="0.962cm" svg:x="7.527cm" svg:y="1.13cm">
          <draw:text-box>
            <text:p><text:span text:style-name="T5">Схема часов на ESP8266 NodeMCU + матрица на WS2812B</text:span></text:p>
          </draw:text-box>
        </draw:frame>
        <draw:connector draw:style-name="gr10" draw:text-style-name="P4" draw:layer="layout" svg:x1="19.518cm" svg:y1="18.452cm" svg:x2="20.801cm" svg:y2="18.31cm" draw:start-shape="id30" draw:start-glue-point="4" svg:d="M19518 18452h930v-142h353" svg:viewBox="0 0 1284 143">
          <text:p/>
        </draw:connector>
        <draw:connector draw:style-name="gr10" draw:text-style-name="P4" draw:layer="layout" svg:x1="19.499cm" svg:y1="19.012cm" svg:x2="20.824cm" svg:y2="18.825cm" draw:start-shape="id30" draw:start-glue-point="5" draw:end-shape="id14" draw:end-glue-point="9" svg:d="M19499 19012h674v-187h651" svg:viewBox="0 0 1326 188">
          <text:p/>
        </draw:connector>
        <draw:custom-shape draw:style-name="gr65" draw:text-style-name="P11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4" draw:layer="layout" svg:width="3.791cm" svg:height="1.039cm" svg:x="9.044cm" svg:y="10.564cm">
          <draw:text-box>
            <text:p><text:span text:style-name="T6">E</text:span><text:span text:style-name="T6">S</text:span><text:span text:style-name="T6">P</text:span><text:span text:style-name="T6">8</text:span><text:span text:style-name="T6">2</text:span><text:span text:style-name="T6">6</text:span><text:span text:style-name="T6">6</text:span><text:span text:style-name="T6"> </text:span><text:span text:style-name="T6">N</text:span><text:span text:style-name="T6">o</text:span><text:span text:style-name="T6">d</text:span><text:span text:style-name="T6">e</text:span><text:span text:style-name="T6">M</text:span><text:span text:style-name="T6">C</text:span><text:span text:style-name="T6">U</text:span></text:p>
          </draw:text-box>
        </draw:frame>
        <draw:frame draw:style-name="gr71" draw:text-style-name="P14" draw:layer="layout" svg:width="2.886cm" svg:height="1.433cm" svg:x="5.022cm" svg:y="7.608cm">
          <draw:text-box>
            <text:p><text:span text:style-name="T6">Фоторези</text:span><text:span text:style-name="T6">стор LDR </text:span><text:span text:style-name="T6">20k</text:span></text:p>
          </draw:text-box>
        </draw:frame>
        <draw:frame draw:style-name="gr71" draw:text-style-name="P14" draw:layer="layout" svg:width="3.541cm" svg:height="1.433cm" svg:x="1.77cm" svg:y="11.796cm">
          <draw:text-box>
            <text:p><text:span text:style-name="T6">С</text:span><text:span text:style-name="T6">е</text:span><text:span text:style-name="T6">н</text:span><text:span text:style-name="T6">с</text:span><text:span text:style-name="T6">о</text:span><text:span text:style-name="T6">р</text:span><text:span text:style-name="T6">н</text:span><text:span text:style-name="T6">а</text:span><text:span text:style-name="T6">я</text:span><text:span text:style-name="T6"> </text:span><text:span text:style-name="T6">к</text:span><text:span text:style-name="T6">н</text:span><text:span text:style-name="T6">о</text:span><text:span text:style-name="T6">п</text:span><text:span text:style-name="T6">к</text:span><text:span text:style-name="T6">а</text:span><text:span text:style-name="T6"> </text:span><text:span text:style-name="T6">T</text:span><text:span text:style-name="T6">T</text:span><text:span text:style-name="T6">P</text:span><text:span text:style-name="T6">2</text:span><text:span text:style-name="T6">2</text:span><text:span text:style-name="T6">3</text:span><text:span text:style-name="T6">b</text:span></text:p>
          </draw:text-box>
        </draw:frame>
        <draw:frame draw:style-name="gr72" draw:text-style-name="P14" draw:layer="layout" svg:width="4.618cm" svg:height="0.645cm" svg:x="10.333cm" svg:y="6.484cm">
          <draw:text-box>
            <text:p><text:span text:style-name="T6">Модуль реле 5В High Lvl</text:span></text:p>
          </draw:text-box>
        </draw:frame>
        <draw:frame draw:style-name="gr72" draw:text-style-name="P14" draw:layer="layout" svg:width="4.503cm" svg:height="0.645cm" svg:x="3.079cm" svg:y="1.751cm">
          <draw:text-box>
            <text:p><text:span text:style-name="T6"><text:s/>Модуль заряда J5019</text:span></text:p>
          </draw:text-box>
        </draw:frame>
        <draw:frame draw:style-name="gr72" draw:text-style-name="P14" draw:layer="layout" svg:width="4.579cm" svg:height="0.645cm" svg:x="21.341cm" svg:y="4.407cm">
          <draw:text-box>
            <text:p><text:span text:style-name="T6">Матрица WS2812B 32x8</text:span></text:p>
          </draw:text-box>
        </draw:frame>
        <draw:frame draw:style-name="gr72" draw:text-style-name="P14" draw:layer="layout" svg:width="2.576cm" svg:height="0.645cm" svg:x="21.448cm" svg:y="18.997cm">
          <draw:text-box>
            <text:p><text:span text:style-name="T6">M</text:span><text:span text:style-name="T6">P</text:span><text:span text:style-name="T6">3</text:span><text:span text:style-name="T6">-</text:span><text:span text:style-name="T6">T</text:span><text:span text:style-name="T6">F</text:span><text:span text:style-name="T6">-</text:span><text:span text:style-name="T6">1</text:span><text:span text:style-name="T6">6</text:span><text:span text:style-name="T6">P</text:span></text:p>
          </draw:text-box>
        </draw:frame>
        <draw:frame draw:style-name="gr70" draw:text-style-name="P14" draw:layer="layout" svg:width="2.751cm" svg:height="1.039cm" svg:x="14.605cm" svg:y="2.858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7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1" draw:text-style-name="P14" draw:layer="layout" svg:width="2.857cm" svg:height="1.433cm" svg:x="23.815cm" svg:y="8.22cm">
          <draw:text-box>
            <text:p><text:span text:style-name="T6">Датчик </text:span><text:span text:style-name="T6">движен</text:span><text:span text:style-name="T6">ия</text:span></text:p>
            <text:p><text:span text:style-name="T6">RCWL-0</text:span><text:span text:style-name="T6">516</text:span></text:p>
          </draw:text-box>
        </draw:frame>
        <draw:g draw:style-name="gr73">
          <draw:g draw:style-name="gr73" xml:id="id21" draw:id="id21">
            <draw:glue-point draw:id="4" svg:x="-0.086cm" svg:y="-0.158cm" draw:align="right"/>
            <draw:glue-point draw:id="5" svg:x="-4.24cm" svg:y="-5.015cm"/>
            <draw:g draw:style-name="gr1">
              <draw:line draw:style-name="gr74" draw:text-style-name="P1" draw:layer="layout" svg:x1="3.126cm" svg:y1="4.144cm" svg:x2="2.876cm" svg:y2="4.144cm">
                <text:p/>
              </draw:line>
              <draw:line draw:style-name="gr75" draw:text-style-name="P1" draw:layer="layout" svg:x1="2.933cm" svg:y1="4.422cm" svg:x2="2.376cm" svg:y2="4.144cm">
                <text:p/>
              </draw:line>
              <draw:line draw:style-name="gr76" draw:text-style-name="P1" draw:layer="layout" svg:x1="2.376cm" svg:y1="4.144cm" svg:x2="2.126cm" svg:y2="4.144cm">
                <text:p/>
              </draw:line>
            </draw:g>
            <draw:line draw:style-name="gr77" draw:text-style-name="P1" draw:layer="layout" svg:x1="2.876cm" svg:y1="4.144cm" svg:x2="2.876cm" svg:y2="4.461cm">
              <text:p/>
            </draw:line>
          </draw:g>
          <draw:g draw:style-name="gr1">
            <draw:line draw:style-name="gr78" draw:text-style-name="P1" draw:layer="layout" svg:x1="2.623cm" svg:y1="4.255cm" svg:x2="2.623cm" svg:y2="3.88cm">
              <text:p/>
            </draw:line>
            <draw:line draw:style-name="gr79" draw:text-style-name="P1" draw:layer="layout" svg:x1="2.748cm" svg:y1="3.88cm" svg:x2="2.498cm" svg:y2="3.88cm">
              <text:p/>
            </draw:line>
          </draw:g>
          <draw:line draw:style-name="gr80" draw:text-style-name="P1" draw:layer="layout" svg:x1="2.496cm" svg:y1="4.007cm" svg:x2="2.496cm" svg:y2="3.882cm">
            <text:p/>
          </draw:line>
          <draw:line draw:style-name="gr81" draw:text-style-name="P1" draw:layer="layout" svg:x1="2.746cm" svg:y1="3.882cm" svg:x2="2.746cm" svg:y2="4.007cm">
            <text:p/>
          </draw:line>
        </draw:g>
        <draw:custom-shape draw:style-name="gr68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5" draw:layer="layout" svg:width="1.499cm" svg:height="0.887cm" svg:x="1.659cm" svg:y="2.469cm">
          <draw:text-box>
            <text:p><text:span text:style-name="T7">L</text:span><text:span text:style-name="T7">i</text:span><text:span text:style-name="T7">-</text:span><text:span text:style-name="T7">I</text:span><text:span text:style-name="T7">o</text:span><text:span text:style-name="T7">n</text:span></text:p>
            <text:p><text:span text:style-name="T7">1</text:span><text:span text:style-name="T7">8</text:span><text:span text:style-name="T7">6</text:span><text:span text:style-name="T7">5</text:span><text:span text:style-name="T7">0</text:span></text:p>
          </draw:text-box>
        </draw:frame>
        <draw:custom-shape draw:style-name="gr83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4" draw:layer="layout" svg:width="1.887cm" svg:height="0.645cm" svg:x="18.433cm" svg:y="11.131cm">
          <draw:text-box>
            <text:p><text:span text:style-name="T6">B</text:span><text:span text:style-name="T6">C</text:span><text:span text:style-name="T6">5</text:span><text:span text:style-name="T6">5</text:span><text:span text:style-name="T6">7</text:span></text:p>
          </draw:text-box>
        </draw:frame>
        <draw:custom-shape draw:style-name="gr84" draw:text-style-name="P16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30" draw:id="id30" draw:layer="layout" svg:width="1.899cm" svg:height="1.823cm" svg:x="17.695cm" svg:y="17.845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3">
          <draw:g draw:style-name="gr1" xml:id="id20" draw:id="id20">
            <draw:line draw:style-name="gr85" draw:text-style-name="P1" draw:layer="layout" svg:x1="1.815cm" svg:y1="3.245cm" svg:x2="1.565cm" svg:y2="3.245cm">
              <text:p/>
            </draw:line>
            <draw:line draw:style-name="gr86" draw:text-style-name="P1" draw:layer="layout" svg:x1="2.065cm" svg:y1="3.37cm" svg:x2="1.315cm" svg:y2="3.37cm">
              <text:p/>
            </draw:line>
            <draw:line draw:style-name="gr87" draw:text-style-name="P1" draw:layer="layout" svg:x1="1.69cm" svg:y1="3.245cm" svg:x2="1.69cm" svg:y2="2.995cm">
              <text:p/>
            </draw:line>
            <draw:line draw:style-name="gr88" draw:text-style-name="P1" draw:layer="layout" svg:x1="1.69cm" svg:y1="3.37cm" svg:x2="1.69cm" svg:y2="3.62cm">
              <text:p/>
            </draw:line>
          </draw:g>
          <draw:frame draw:style-name="gr89" draw:text-style-name="P15" draw:layer="layout" svg:width="0.376cm" svg:height="0.569cm" svg:x="1.235cm" svg:y="3.297cm">
            <draw:text-box>
              <text:p><text:span text:style-name="T7">+</text:span></text:p>
            </draw:text-box>
          </draw:frame>
        </draw:g>
        <draw:frame draw:style-name="gr72" draw:text-style-name="P14" draw:layer="layout" svg:width="0.201cm" svg:height="0.645cm" svg:x="13.776cm" svg:y="2.628cm">
          <draw:text-box>
            <text:p><text:span text:style-name="T6">-</text:span></text:p>
          </draw:text-box>
        </draw:frame>
        <draw:frame draw:style-name="gr72" draw:text-style-name="P14" draw:layer="layout" svg:width="0.365cm" svg:height="0.645cm" svg:x="13.193cm" svg:y="3.047cm">
          <draw:text-box>
            <text:p><text:span text:style-name="T6">+</text:span></text:p>
          </draw:text-box>
        </draw:frame>
        <draw:frame draw:style-name="gr90" draw:text-style-name="P15" draw:layer="layout" svg:width="2.117cm" svg:height="0.74cm" svg:x="2.011cm" svg:y="3.334cm">
          <draw:text-box>
            <text:p><text:span text:style-name="T7">«reset»</text:span></text:p>
          </draw:text-box>
        </draw:frame>
        <draw:g draw:style-name="gr1">
          <draw:line draw:style-name="gr91" draw:text-style-name="P1" draw:layer="layout" svg:x1="24.984cm" svg:y1="14.725cm" svg:x2="24.984cm" svg:y2="15.225cm">
            <text:p/>
          </draw:line>
          <draw:line draw:style-name="gr92" draw:text-style-name="P1" draw:layer="layout" svg:x1="25.109cm" svg:y1="14.725cm" svg:x2="25.109cm" svg:y2="15.225cm">
            <text:p/>
          </draw:line>
          <draw:line draw:style-name="gr93" draw:text-style-name="P1" draw:layer="layout" svg:x1="24.984cm" svg:y1="14.975cm" svg:x2="24.734cm" svg:y2="14.975cm">
            <text:p/>
          </draw:line>
          <draw:line draw:style-name="gr94" draw:text-style-name="P1" draw:layer="layout" svg:x1="25.109cm" svg:y1="14.975cm" svg:x2="25.359cm" svg:y2="14.975cm">
            <text:p/>
          </draw:line>
        </draw:g>
        <draw:frame draw:style-name="gr95" draw:text-style-name="P15" draw:layer="layout" svg:width="1.234cm" svg:height="0.569cm" svg:x="24.218cm" svg:y="15.24cm">
          <draw:text-box>
            <text:p><text:span text:style-name="T7">47nF</text:span></text:p>
          </draw:text-box>
        </draw:frame>
      </draw:page>
      <draw:page draw:name="page2" draw:style-name="dp1" draw:master-page-name="Звичайний">
        <draw:g draw:style-name="gr1" xml:id="id32" draw:id="id32">
          <draw:glue-point draw:id="4" svg:x="4.675cm" svg:y="5cm"/>
          <draw:glue-point draw:id="5" svg:x="5cm" svg:y="-4.832cm"/>
          <draw:line draw:style-name="gr96" draw:text-style-name="P1" draw:layer="layout" svg:x1="20.108cm" svg:y1="12.939cm" svg:x2="20.141cm" svg:y2="11.94cm">
            <text:p/>
          </draw:line>
          <draw:line draw:style-name="gr97" draw:text-style-name="P1" draw:layer="layout" svg:x1="20.608cm" svg:y1="12.957cm" svg:x2="20.117cm" svg:y2="12.69cm">
            <text:p/>
          </draw:line>
          <draw:line draw:style-name="gr98" draw:text-style-name="P1" draw:layer="layout" svg:x1="20.387cm" svg:y1="12.074cm" svg:x2="20.133cm" svg:y2="12.191cm">
            <text:p/>
          </draw:line>
          <draw:line draw:style-name="gr99" draw:text-style-name="P1" draw:layer="layout" svg:x1="20.125cm" svg:y1="12.44cm" svg:x2="19.625cm" svg:y2="12.423cm">
            <text:p/>
          </draw:line>
          <draw:line draw:style-name="gr100" draw:text-style-name="P1" draw:layer="layout" svg:x1="20.387cm" svg:y1="12.074cm" svg:x2="20.641cm" svg:y2="11.957cm">
            <text:p/>
          </draw:line>
        </draw:g>
        <draw:g draw:style-name="gr1" xml:id="id31" draw:id="id31">
          <draw:rect draw:style-name="gr101" draw:text-style-name="P3" draw:layer="layout" svg:width="0.75cm" svg:height="0.463cm" svg:x="18.334cm" svg:y="12.214cm">
            <text:p text:style-name="P2"><text:span text:style-name="T1">3</text:span><text:span text:style-name="T1">.</text:span><text:span text:style-name="T1">3</text:span><text:span text:style-name="T1">k</text:span></text:p>
          </draw:rect>
          <draw:line draw:style-name="gr102" draw:text-style-name="P1" draw:layer="layout" svg:x1="18.084cm" svg:y1="12.446cm" svg:x2="18.334cm" svg:y2="12.446cm">
            <text:p/>
          </draw:line>
          <draw:line draw:style-name="gr103" draw:text-style-name="P1" draw:layer="layout" svg:x1="19.084cm" svg:y1="12.446cm" svg:x2="19.334cm" svg:y2="12.446cm">
            <text:p/>
          </draw:line>
        </draw:g>
        <draw:connector draw:style-name="gr10" draw:text-style-name="P4" draw:layer="layout" svg:x1="19.334cm" svg:y1="12.445cm" svg:x2="19.625cm" svg:y2="12.448cm" draw:start-shape="id31" draw:start-glue-point="1" draw:end-shape="id32" draw:end-glue-point="3" svg:d="M19334 12445h146v3h145" svg:viewBox="0 0 292 4">
          <text:p/>
        </draw:connector>
        <draw:g draw:style-name="gr1" xml:id="id34" draw:id="id34">
          <draw:rect draw:style-name="gr104" draw:text-style-name="P3" draw:layer="layout" svg:width="0.75cm" svg:height="0.413cm" svg:x="22.278cm" svg:y="11.123cm">
            <text:p text:style-name="P2"><text:span text:style-name="T1">470</text:span></text:p>
          </draw:rect>
          <draw:line draw:style-name="gr105" draw:text-style-name="P1" draw:layer="layout" svg:x1="22.028cm" svg:y1="11.33cm" svg:x2="22.278cm" svg:y2="11.33cm">
            <text:p/>
          </draw:line>
          <draw:line draw:style-name="gr106" draw:text-style-name="P1" draw:layer="layout" svg:x1="23.028cm" svg:y1="11.33cm" svg:x2="23.278cm" svg:y2="11.33cm">
            <text:p/>
          </draw:line>
        </draw:g>
        <draw:g draw:style-name="gr1" xml:id="id33" draw:id="id33">
          <draw:rect draw:style-name="gr107" draw:text-style-name="P5" draw:layer="layout" svg:width="0.75cm" svg:height="0.381cm" draw:transform="rotate (1.5707963267949) translate (21.165cm 10.711cm)">
            <text:p text:style-name="P2"><text:span text:style-name="T2">1k</text:span></text:p>
          </draw:rect>
          <draw:line draw:style-name="gr108" draw:text-style-name="P1" draw:layer="layout" svg:x1="21.353cm" svg:y1="10.962cm" svg:x2="21.353cm" svg:y2="10.712cm">
            <text:p/>
          </draw:line>
          <draw:line draw:style-name="gr109" draw:text-style-name="P1" draw:layer="layout" svg:x1="21.353cm" svg:y1="9.961cm" svg:x2="21.353cm" svg:y2="9.711cm">
            <text:p/>
          </draw:line>
        </draw:g>
        <draw:connector draw:style-name="gr10" draw:text-style-name="P4" draw:layer="layout" svg:x1="20.641cm" svg:y1="11.957cm" svg:x2="21.355cm" svg:y2="10.962cm" draw:start-shape="id32" draw:start-glue-point="5" draw:end-shape="id33" draw:end-glue-point="2" svg:d="M20641 11957h714v-995" svg:viewBox="0 0 715 996">
          <text:p/>
        </draw:connector>
        <draw:connector draw:style-name="gr10" draw:text-style-name="P4" draw:layer="layout" svg:x1="20.641cm" svg:y1="11.957cm" svg:x2="22.028cm" svg:y2="11.329cm" draw:start-shape="id32" draw:start-glue-point="5" draw:end-shape="id34" draw:end-glue-point="3" svg:d="M20641 11957h694v-628h693" svg:viewBox="0 0 1388 629">
          <text:p/>
        </draw:connector>
        <draw:frame draw:style-name="gr17" draw:text-style-name="P6" xml:id="id36" draw:id="id36" draw:layer="layout" svg:width="3.545cm" svg:height="1.877cm" svg:x="11.466cm" svg:y="7.033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35" draw:id="id35" draw:layer="layout" svg:width="5.243cm" svg:height="6.656cm" svg:x="9.062cm" svg:y="11.205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7" draw:text-style-name="P6" xml:id="id37" draw:id="id37" draw:layer="layout" svg:width="3.763cm" svg:height="1.866cm" draw:transform="rotate (-1.56713113536571) translate (26.728cm 9.554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38" draw:id="id38" draw:layer="layout" svg:width="2.163cm" svg:height="1.612cm" draw:transform="rotate (1.5707963267949) translate (4.931cm 15.518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frame draw:style-name="gr17" draw:text-style-name="P6" xml:id="id45" draw:id="id45" draw:layer="layout" svg:width="1.137cm" svg:height="1cm" draw:transform="rotate (-1.5707963267949) translate (8.236cm 10.683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0" draw:text-style-name="P4" draw:layer="layout" draw:line-skew="1.573cm" svg:x1="14.28cm" svg:y1="13.447cm" svg:x2="18.084cm" svg:y2="12.445cm" draw:start-shape="id35" draw:start-glue-point="8" draw:end-shape="id31" draw:end-glue-point="3" svg:d="M14280 13447h3479v-1002h325" svg:viewBox="0 0 3805 1003">
          <text:p/>
        </draw:connector>
        <draw:connector draw:style-name="gr10" draw:text-style-name="P4" draw:layer="layout" svg:x1="14.93cm" svg:y1="7.695cm" svg:x2="14.28cm" svg:y2="13.15cm" draw:start-shape="id36" draw:start-glue-point="4" draw:end-shape="id35" draw:end-glue-point="7" svg:d="M14930 7695h581v5455h-1231" svg:viewBox="0 0 1232 5456">
          <text:p/>
        </draw:connector>
        <draw:connector draw:style-name="gr25" draw:text-style-name="P4" draw:layer="layout" svg:x1="14.28cm" svg:y1="14.113cm" svg:x2="20.607cm" svg:y2="12.956cm" draw:start-shape="id35" draw:start-glue-point="10" draw:end-shape="id32" draw:end-glue-point="4" svg:d="M14280 14113h6327v-1157" svg:viewBox="0 0 6328 1158">
          <text:p/>
        </draw:connector>
        <draw:connector draw:style-name="gr10" draw:text-style-name="P4" draw:layer="layout" svg:x1="14.28cm" svg:y1="14.42cm" svg:x2="25.815cm" svg:y2="13.209cm" draw:start-shape="id35" draw:start-glue-point="11" draw:end-shape="id37" draw:end-glue-point="6" svg:d="M14280 14420h11535v-1211" svg:viewBox="0 0 11536 1212">
          <text:p/>
        </draw:connector>
        <draw:connector draw:style-name="gr26" draw:text-style-name="P4" draw:layer="layout" svg:x1="14.259cm" svg:y1="16.44cm" svg:x2="26.077cm" svg:y2="13.2cm" draw:start-shape="id35" draw:start-glue-point="17" draw:end-shape="id37" draw:end-glue-point="7" svg:d="M14259 16440h11818v-3240" svg:viewBox="0 0 11819 3241">
          <text:p/>
        </draw:connector>
        <draw:connector draw:style-name="gr27" draw:text-style-name="P4" draw:layer="layout" svg:x1="6.058cm" svg:y1="15.374cm" svg:x2="9.096cm" svg:y2="15.477cm" draw:start-shape="id38" draw:start-glue-point="6" draw:end-shape="id35" draw:end-glue-point="29" svg:d="M6058 15374v644h1745v-541h1293" svg:viewBox="0 0 3039 645">
          <text:p/>
        </draw:connector>
        <draw:connector draw:style-name="gr26" draw:text-style-name="P4" draw:layer="layout" svg:x1="5.298cm" svg:y1="15.363cm" svg:x2="9.096cm" svg:y2="16.462cm" draw:start-shape="id38" draw:start-glue-point="4" draw:end-shape="id35" draw:end-glue-point="32" svg:d="M5298 15363v1099h3798" svg:viewBox="0 0 3799 1100">
          <text:p/>
        </draw:connector>
        <draw:connector draw:style-name="gr10" draw:text-style-name="P4" draw:layer="layout" draw:line-skew="0.603cm" svg:x1="5.679cm" svg:y1="15.374cm" svg:x2="14.28cm" svg:y2="14.789cm" draw:start-shape="id38" draw:start-glue-point="5" draw:end-shape="id35" draw:end-glue-point="12" svg:d="M5679 15374v3590h9126v-4175h-525" svg:viewBox="0 0 9127 4176">
          <text:p/>
        </draw:connector>
        <draw:frame draw:style-name="gr17" draw:text-style-name="P6" xml:id="id40" draw:id="id40" draw:layer="layout" svg:width="3.686cm" svg:height="2.954cm" draw:transform="rotate (1.5707963267949) translate (4.964cm 5.981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41" draw:id="id41">
          <draw:glue-point draw:id="4" svg:x="-5cm" svg:y="5.04cm"/>
          <draw:glue-point draw:id="5" svg:x="5cm" svg:y="5.04cm"/>
          <draw:line draw:style-name="gr110" draw:text-style-name="P1" draw:layer="layout" svg:x1="8.334cm" svg:y1="5.652cm" svg:x2="8.584cm" svg:y2="5.652cm">
            <text:p/>
          </draw:line>
          <draw:line draw:style-name="gr111" draw:text-style-name="P1" draw:layer="layout" svg:x1="9.334cm" svg:y1="5.652cm" svg:x2="9.584cm" svg:y2="5.652cm">
            <text:p/>
          </draw:line>
          <draw:path draw:style-name="gr112" draw:text-style-name="P5" draw:layer="layout" svg:width="0.187cm" svg:height="0.123cm" svg:x="8.584cm" svg:y="5.528cm" svg:viewBox="0 0 188 124" svg:d="M0 124c94-279 188 0 188 0">
            <text:p/>
          </draw:path>
          <draw:path draw:style-name="gr113" draw:text-style-name="P5" draw:layer="layout" svg:width="0.187cm" svg:height="0.123cm" svg:x="8.773cm" svg:y="5.529cm" svg:viewBox="0 0 188 124" svg:d="M0 124c94-279 188 0 188 0">
            <text:p/>
          </draw:path>
          <draw:path draw:style-name="gr114" draw:text-style-name="P5" draw:layer="layout" svg:width="0.187cm" svg:height="0.123cm" svg:x="8.961cm" svg:y="5.528cm" svg:viewBox="0 0 188 124" svg:d="M0 124c94-279 188 0 188 0">
            <text:p/>
          </draw:path>
          <draw:path draw:style-name="gr115" draw:text-style-name="P5" draw:layer="layout" svg:width="0.187cm" svg:height="0.123cm" svg:x="9.147cm" svg:y="5.528cm" svg:viewBox="0 0 188 124" svg:d="M0 124c94-279 188 0 188 0">
            <text:p/>
          </draw:path>
        </draw:g>
        <draw:g draw:style-name="gr1" xml:id="id39" draw:id="id39">
          <draw:line draw:style-name="gr116" draw:text-style-name="P1" draw:layer="layout" svg:x1="9.846cm" svg:y1="4.885cm" svg:x2="10.346cm" svg:y2="4.885cm">
            <text:p/>
          </draw:line>
          <draw:line draw:style-name="gr117" draw:text-style-name="P1" draw:layer="layout" svg:x1="9.846cm" svg:y1="4.76cm" svg:x2="10.346cm" svg:y2="4.76cm">
            <text:p/>
          </draw:line>
          <draw:line draw:style-name="gr118" draw:text-style-name="P7" draw:layer="layout" svg:x1="10.096cm" svg:y1="4.885cm" svg:x2="10.096cm" svg:y2="5.135cm">
            <text:p text:style-name="P2"><text:span text:style-name="T1"/></text:p>
            <text:p text:style-name="P2"><text:span text:style-name="T1">+</text:span></text:p>
          </draw:line>
          <draw:line draw:style-name="gr119" draw:text-style-name="P1" draw:layer="layout" svg:x1="10.096cm" svg:y1="4.76cm" svg:x2="10.096cm" svg:y2="4.51cm">
            <text:p/>
          </draw:line>
        </draw:g>
        <draw:connector draw:style-name="gr41" draw:text-style-name="P4" xml:id="id55" draw:id="id55" draw:layer="layout" svg:x1="9.626cm" svg:y1="5.684cm" svg:x2="10.096cm" svg:y2="5.135cm" draw:end-shape="id39" draw:end-glue-point="2" svg:d="M9626 5684v-15h470v-534" svg:viewBox="0 0 471 550">
          <text:p/>
        </draw:connector>
        <draw:connector draw:style-name="gr26" draw:text-style-name="P4" xml:id="id49" draw:id="id49" draw:layer="layout" svg:x1="7.918cm" svg:y1="2.493cm" svg:x2="10.096cm" svg:y2="4.51cm" draw:start-shape="id40" draw:start-glue-point="7" draw:end-shape="id39" draw:end-glue-point="0" svg:d="M7918 2493h2178v2017" svg:viewBox="0 0 2179 2018">
          <text:p/>
        </draw:connector>
        <draw:connector draw:style-name="gr41" draw:text-style-name="P4" draw:layer="layout" svg:x1="7.905cm" svg:y1="5.706cm" svg:x2="8.334cm" svg:y2="5.653cm" draw:start-shape="id40" draw:start-glue-point="4" draw:end-shape="id41" draw:end-glue-point="4" svg:d="M7905 5706h429v-53" svg:viewBox="0 0 430 54">
          <text:p/>
        </draw:connector>
        <draw:frame draw:style-name="gr42" draw:text-style-name="P8" draw:layer="layout" svg:width="1.408cm" svg:height="0.607cm" svg:x="8.755cm" svg:y="4.232cm">
          <draw:text-box>
            <text:p><text:span text:style-name="T3">470uF</text:span></text:p>
          </draw:text-box>
        </draw:frame>
        <draw:connector draw:style-name="gr26" draw:text-style-name="P4" draw:layer="layout" draw:line-skew="2.996cm" svg:x1="7.918cm" svg:y1="2.493cm" svg:x2="14.93cm" svg:y2="7.935cm" draw:start-shape="id40" draw:start-glue-point="7" draw:end-shape="id36" draw:end-glue-point="5" svg:d="M7918 2493h10589v5442h-3577" svg:viewBox="0 0 10590 5443">
          <text:p/>
        </draw:connector>
        <draw:connector draw:style-name="gr43" draw:text-style-name="P4" draw:layer="layout" draw:line-skew="-0.573cm 3.104cm" svg:x1="11.498cm" svg:y1="8.03cm" svg:x2="21.355cm" svg:y2="9.711cm" draw:start-shape="id36" draw:start-glue-point="8" draw:end-shape="id33" draw:end-glue-point="0" svg:d="M11498 8030h-1105v1607h10962v74" svg:viewBox="0 0 10963 1682">
          <text:p/>
        </draw:connector>
        <draw:frame draw:style-name="gr17" draw:text-style-name="P6" xml:id="id42" draw:id="id42" draw:layer="layout" svg:width="3.936cm" svg:height="2.426cm" svg:x="21.527cm" svg:y="16.747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6.077cm" svg:y1="13.2cm" svg:x2="25.037cm" svg:y2="18.595cm" draw:start-shape="id37" draw:start-glue-point="7" draw:end-shape="id42" draw:end-glue-point="10" svg:d="M26077 13200v5395h-1040" svg:viewBox="0 0 1041 5396">
          <text:p/>
        </draw:connector>
        <draw:g draw:style-name="gr1" xml:id="id43" draw:id="id43">
          <draw:rect draw:style-name="gr120" draw:text-style-name="P3" draw:layer="layout" svg:width="0.75cm" svg:height="0.413cm" svg:x="18.635cm" svg:y="17.333cm">
            <text:p text:style-name="P2"><text:span text:style-name="T1">1k</text:span></text:p>
          </draw:rect>
          <draw:line draw:style-name="gr121" draw:text-style-name="P1" draw:layer="layout" svg:x1="18.385cm" svg:y1="17.54cm" svg:x2="18.635cm" svg:y2="17.54cm">
            <text:p/>
          </draw:line>
          <draw:line draw:style-name="gr122" draw:text-style-name="P1" draw:layer="layout" svg:x1="19.385cm" svg:y1="17.54cm" svg:x2="19.635cm" svg:y2="17.54cm">
            <text:p/>
          </draw:line>
        </draw:g>
        <draw:connector draw:style-name="gr10" draw:text-style-name="P4" draw:layer="layout" svg:x1="19.635cm" svg:y1="17.539cm" svg:x2="21.772cm" svg:y2="17.539cm" draw:start-shape="id43" draw:start-glue-point="1" draw:end-shape="id42" draw:end-glue-point="6" svg:d="M19635 17539h2137" svg:viewBox="0 0 2138 1">
          <text:p/>
        </draw:connector>
        <draw:connector draw:style-name="gr41" draw:text-style-name="P4" draw:layer="layout" svg:x1="25.552cm" svg:y1="13.2cm" svg:x2="21.758cm" svg:y2="17.036cm" draw:start-shape="id37" draw:start-glue-point="5" draw:end-shape="id42" draw:end-glue-point="4" svg:d="M25552 13200v1836h-4525v2000h731" svg:viewBox="0 0 4526 3837">
          <text:p/>
        </draw:connector>
        <draw:connector draw:style-name="gr41" draw:text-style-name="P4" draw:layer="layout" draw:line-skew="2.443cm" svg:x1="10.092cm" svg:y1="5.575cm" svg:x2="11.478cm" svg:y2="7.526cm" draw:start-shape="id44" draw:start-glue-point="4" draw:end-shape="id36" draw:end-glue-point="7" svg:d="M10092 5575v1941h729v10h657" svg:viewBox="0 0 1387 1952">
          <text:p/>
        </draw:connector>
        <draw:connector draw:style-name="gr10" draw:text-style-name="P4" draw:layer="layout" draw:line-skew="-1.078cm" svg:x1="14.259cm" svg:y1="15.127cm" svg:x2="18.385cm" svg:y2="17.539cm" draw:start-shape="id35" draw:start-glue-point="13" draw:end-shape="id43" draw:end-glue-point="3" svg:d="M14259 15127h999v2412h3127" svg:viewBox="0 0 4127 2413">
          <text:p/>
        </draw:connector>
        <draw:g draw:style-name="gr1" xml:id="id46" draw:id="id46">
          <draw:rect draw:style-name="gr123" draw:text-style-name="P5" draw:layer="layout" svg:width="0.75cm" svg:height="0.289cm" draw:transform="rotate (1.5707963267949) translate (7.925cm 13.677cm)">
            <text:p text:style-name="P2"><text:span text:style-name="T1">2.2k</text:span></text:p>
          </draw:rect>
          <draw:line draw:style-name="gr124" draw:text-style-name="P1" draw:layer="layout" svg:x1="8.069cm" svg:y1="12.675cm" svg:x2="8.069cm" svg:y2="12.925cm">
            <text:p/>
          </draw:line>
          <draw:line draw:style-name="gr125" draw:text-style-name="P1" draw:layer="layout" svg:x1="8.069cm" svg:y1="13.675cm" svg:x2="8.069cm" svg:y2="13.925cm">
            <text:p/>
          </draw:line>
        </draw:g>
        <draw:connector draw:style-name="gr10" draw:text-style-name="P4" draw:layer="layout" svg:x1="8.068cm" svg:y1="11.728cm" svg:x2="9.064cm" svg:y2="12.114cm" draw:start-shape="id45" draw:start-glue-point="4" draw:end-shape="id35" draw:end-glue-point="19" svg:d="M8068 11728v386h996" svg:viewBox="0 0 997 387">
          <text:p/>
        </draw:connector>
        <draw:connector draw:style-name="gr26" draw:text-style-name="P4" draw:layer="layout" svg:x1="8.069cm" svg:y1="13.925cm" svg:x2="9.096cm" svg:y2="15.16cm" draw:start-shape="id46" draw:start-glue-point="2" draw:end-shape="id35" draw:end-glue-point="28" svg:d="M8069 13925v1235h1027" svg:viewBox="0 0 1028 1236">
          <text:p/>
        </draw:connector>
        <draw:connector draw:style-name="gr10" draw:text-style-name="P4" draw:layer="layout" svg:x1="8.069cm" svg:y1="12.675cm" svg:x2="8.068cm" svg:y2="11.728cm" draw:start-shape="id46" draw:start-glue-point="0" draw:end-shape="id45" draw:end-glue-point="4" svg:d="M8069 12675v-436h-1v-511" svg:viewBox="0 0 2 948">
          <text:p/>
        </draw:connector>
        <draw:connector draw:style-name="gr53" draw:text-style-name="P4" draw:layer="layout" svg:x1="2.466cm" svg:y1="3.03cm" svg:x2="4.964cm" svg:y2="2.87cm" draw:start-shape="id47" draw:start-glue-point="0" draw:end-shape="id40" draw:end-glue-point="8" svg:d="M2466 3030v-518h1446v358h1052" svg:viewBox="0 0 2499 519">
          <text:p/>
        </draw:connector>
        <draw:connector draw:style-name="gr41" draw:text-style-name="P4" draw:layer="layout" draw:line-skew="-0.214cm 0.523cm" svg:x1="4.988cm" svg:y1="3.892cm" svg:x2="3.816cm" svg:y2="4.179cm" draw:start-shape="id40" draw:start-glue-point="9" draw:end-shape="id48" draw:end-glue-point="4" svg:d="M4988 3892h-760v292h-412v-5" svg:viewBox="0 0 1173 293">
          <text:p/>
        </draw:connector>
        <draw:connector draw:style-name="gr41" draw:text-style-name="P4" draw:layer="layout" draw:line-skew="0.267cm" svg:x1="2.466cm" svg:y1="3.655cm" svg:x2="2.978cm" svg:y2="4.179cm" draw:start-shape="id47" draw:start-glue-point="2" draw:end-shape="id48" draw:end-glue-point="5" svg:d="M2466 3655v529h512v-5" svg:viewBox="0 0 513 530">
          <text:p/>
        </draw:connector>
        <draw:connector draw:style-name="gr41" draw:text-style-name="P4" draw:layer="layout" svg:x1="21.758cm" svg:y1="17.036cm" svg:x2="9.096cm" svg:y2="16.8cm" draw:start-shape="id42" draw:start-glue-point="4" draw:end-shape="id35" draw:end-glue-point="33" svg:d="M21758 17036h-3842v1325h-9354v-1561h534" svg:viewBox="0 0 13197 1562">
          <text:p/>
        </draw:connector>
        <draw:g draw:style-name="gr1" xml:id="id50" draw:id="id50">
          <draw:circle draw:style-name="gr126" draw:text-style-name="P9" draw:layer="layout" svg:width="1cm" svg:height="1cm" svg:x="14.277cm" svg:y="3.088cm">
            <text:p text:style-name="P2"><text:span text:style-name="T4"><text:s text:c="4"/>U</text:span></text:p>
          </draw:circle>
          <draw:line draw:style-name="gr127" draw:text-style-name="P10" draw:layer="layout" svg:x1="14.404cm" svg:y1="3.651cm" svg:x2="14.479cm" svg:y2="3.651cm">
            <text:p/>
          </draw:line>
          <draw:line draw:style-name="gr128" draw:text-style-name="P10" draw:layer="layout" svg:x1="14.404cm" svg:y1="3.526cm" svg:x2="14.779cm" svg:y2="3.526cm">
            <text:p/>
          </draw:line>
          <draw:line draw:style-name="gr129" draw:text-style-name="P10" draw:layer="layout" svg:x1="14.554cm" svg:y1="3.651cm" svg:x2="14.629cm" svg:y2="3.651cm">
            <text:p/>
          </draw:line>
          <draw:line draw:style-name="gr130" draw:text-style-name="P10" draw:layer="layout" svg:x1="14.704cm" svg:y1="3.651cm" svg:x2="14.779cm" svg:y2="3.651cm">
            <text:p/>
          </draw:line>
        </draw:g>
        <draw:connector draw:style-name="gr26" draw:text-style-name="P4" xml:id="id54" draw:id="id54" draw:layer="layout" svg:x1="10.096cm" svg:y1="2.493cm" svg:x2="14.777cm" svg:y2="3.088cm" draw:start-shape="id49" draw:start-glue-point="0" draw:end-shape="id50" draw:end-glue-point="0" svg:d="M10096 2493h4681v595" svg:viewBox="0 0 4682 596">
          <text:p/>
        </draw:connector>
        <draw:connector draw:style-name="gr43" draw:text-style-name="P4" draw:layer="layout" draw:line-skew="-0.151cm" svg:x1="14.277cm" svg:y1="3.588cm" svg:x2="7.891cm" svg:y2="4.184cm" draw:start-shape="id50" draw:end-shape="id40" draw:end-glue-point="6" svg:d="M14277 3588h-3339v596h-3047" svg:viewBox="0 0 6387 597">
          <text:p/>
        </draw:connector>
        <draw:g draw:style-name="gr1" xml:id="id51" draw:id="id51">
          <draw:rect draw:style-name="gr131" draw:text-style-name="P3" draw:layer="layout" svg:width="0.75cm" svg:height="0.364cm" svg:x="14.734cm" svg:y="4.648cm">
            <text:p text:style-name="P2"><text:span text:style-name="T1">1</text:span><text:span text:style-name="T1">0</text:span><text:span text:style-name="T1">k</text:span></text:p>
          </draw:rect>
          <draw:line draw:style-name="gr132" draw:text-style-name="P1" draw:layer="layout" svg:x1="14.484cm" svg:y1="4.83cm" svg:x2="14.734cm" svg:y2="4.83cm">
            <text:p/>
          </draw:line>
          <draw:line draw:style-name="gr133" draw:text-style-name="P1" draw:layer="layout" svg:x1="15.484cm" svg:y1="4.83cm" svg:x2="15.734cm" svg:y2="4.83cm">
            <text:p/>
          </draw:line>
        </draw:g>
        <draw:g draw:style-name="gr1" xml:id="id52" draw:id="id52">
          <draw:rect draw:style-name="gr134" draw:text-style-name="P3" draw:layer="layout" svg:width="0.75cm" svg:height="0.38cm" svg:x="17.002cm" svg:y="4.615cm">
            <text:p text:style-name="P2"><text:span text:style-name="T1">2</text:span><text:span text:style-name="T1">0</text:span><text:span text:style-name="T1">k</text:span></text:p>
          </draw:rect>
          <draw:line draw:style-name="gr135" draw:text-style-name="P1" draw:layer="layout" svg:x1="16.752cm" svg:y1="4.805cm" svg:x2="17.002cm" svg:y2="4.805cm">
            <text:p/>
          </draw:line>
          <draw:line draw:style-name="gr136" draw:text-style-name="P1" draw:layer="layout" svg:x1="17.752cm" svg:y1="4.805cm" svg:x2="18.002cm" svg:y2="4.805cm">
            <text:p/>
          </draw:line>
        </draw:g>
        <draw:connector draw:style-name="gr10" draw:text-style-name="P4" xml:id="id53" draw:id="id53" draw:layer="layout" svg:x1="15.734cm" svg:y1="4.83cm" svg:x2="16.752cm" svg:y2="4.805cm" draw:start-shape="id51" draw:start-glue-point="1" draw:end-shape="id52" draw:end-glue-point="3" svg:d="M15734 4830h509v-25h509" svg:viewBox="0 0 1019 26">
          <text:p/>
        </draw:connector>
        <draw:connector draw:style-name="gr10" draw:text-style-name="P4" draw:layer="layout" draw:line-skew="1.243cm" svg:x1="16.243cm" svg:y1="4.817cm" svg:x2="14.301cm" svg:y2="12.124cm" draw:start-shape="id53" draw:start-glue-point="0" draw:end-shape="id35" draw:end-glue-point="4" svg:d="M16243 4817h11v7307h-1953" svg:viewBox="0 0 1954 7308">
          <text:p/>
        </draw:connector>
        <draw:connector draw:style-name="gr10" draw:text-style-name="P4" draw:layer="layout" svg:x1="14.277cm" svg:y1="3.588cm" svg:x2="14.484cm" svg:y2="4.83cm" draw:start-shape="id50" draw:start-glue-point="3" draw:end-shape="id51" draw:end-glue-point="3" svg:d="M14277 3588h-518v1242h725" svg:viewBox="0 0 726 1243">
          <text:p/>
        </draw:connector>
        <draw:connector draw:style-name="gr53" draw:text-style-name="P4" draw:layer="layout" svg:x1="18.002cm" svg:y1="4.805cm" svg:x2="14.777cm" svg:y2="2.493cm" draw:start-shape="id52" draw:start-glue-point="1" draw:end-shape="id54" draw:end-glue-point="0" svg:d="M18002 4805h518v-2312h-3743" svg:viewBox="0 0 3744 2313">
          <text:p/>
        </draw:connector>
        <draw:connector draw:style-name="gr41" draw:text-style-name="P4" draw:layer="layout" draw:line-skew="0.279cm -0.695cm" svg:x1="14.935cm" svg:y1="8.208cm" svg:x2="9.861cm" svg:y2="5.669cm" draw:start-shape="id36" draw:start-glue-point="6" draw:end-shape="id55" draw:end-glue-point="0" svg:d="M14935 8208h855v-2535h-5929v-4" svg:viewBox="0 0 5930 2540">
          <text:p/>
        </draw:connector>
        <draw:frame draw:style-name="gr17" draw:text-style-name="P6" xml:id="id56" draw:id="id56" draw:layer="layout" svg:width="2.333cm" svg:height="2.504cm" svg:x="23.466cm" svg:y="5.054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0" draw:text-style-name="P4" draw:layer="layout" svg:x1="23.278cm" svg:y1="11.329cm" svg:x2="24.211cm" svg:y2="7.558cm" draw:start-shape="id34" draw:start-glue-point="1" draw:end-shape="id56" draw:end-glue-point="6" svg:d="M23278 11329h933v-3771" svg:viewBox="0 0 934 3772">
          <text:p/>
        </draw:connector>
        <draw:connector draw:style-name="gr26" draw:text-style-name="P4" draw:layer="layout" draw:line-skew="7.81cm 0.02cm" svg:x1="14.777cm" svg:y1="2.493cm" svg:x2="24.708cm" svg:y2="7.558cm" draw:start-shape="id54" draw:start-glue-point="0" draw:end-shape="id56" draw:end-glue-point="7" svg:d="M14777 2493h12168v5585h-2237v-520" svg:viewBox="0 0 12169 5586">
          <text:p/>
        </draw:connector>
        <draw:connector draw:style-name="gr26" draw:text-style-name="P4" draw:layer="layout" draw:line-skew="7.127cm" svg:x1="14.777cm" svg:y1="2.493cm" svg:x2="26.077cm" svg:y2="13.2cm" draw:start-shape="id54" draw:start-glue-point="0" draw:end-shape="id37" draw:end-glue-point="7" svg:d="M14777 2493h12183v11331h-883v-624" svg:viewBox="0 0 12184 11332">
          <text:p/>
        </draw:connector>
        <draw:connector draw:style-name="gr41" draw:text-style-name="P4" draw:layer="layout" draw:line-skew="3.412cm" svg:x1="14.935cm" svg:y1="8.208cm" svg:x2="25.552cm" svg:y2="13.2cm" draw:start-shape="id36" draw:start-glue-point="6" draw:end-shape="id37" draw:end-glue-point="5" svg:d="M14935 8208h8414v5616h2203v-624" svg:viewBox="0 0 10618 5617">
          <text:p/>
        </draw:connector>
        <draw:connector draw:style-name="gr43" draw:text-style-name="P4" draw:layer="layout" draw:line-skew="0.978cm" svg:x1="21.355cm" svg:y1="9.711cm" svg:x2="23.758cm" svg:y2="7.548cm" draw:start-shape="id33" draw:start-glue-point="0" draw:end-shape="id56" draw:end-glue-point="5" svg:d="M21355 9711v-107h2403v-2056" svg:viewBox="0 0 2404 2164">
          <text:p/>
        </draw:connector>
        <draw:connector draw:style-name="gr43" draw:text-style-name="P4" draw:layer="layout" svg:x1="14.277cm" svg:y1="3.588cm" svg:x2="11.467cm" svg:y2="8.501cm" draw:start-shape="id50" draw:start-glue-point="3" draw:end-shape="id36" draw:end-glue-point="9" svg:d="M14277 3588h-3311v4913h501" svg:viewBox="0 0 3312 4914">
          <text:p/>
        </draw:connector>
        <draw:custom-shape draw:style-name="gr65" draw:text-style-name="P11" draw:layer="layout" svg:width="0.167cm" svg:height="0.167cm" svg:x="10.875cm" svg:y="4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3.806cm" svg:y="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6.182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xml:id="id44" draw:id="id44" draw:layer="layout" svg:width="0.167cm" svg:height="0.167cm" svg:x="10.008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0.167cm" svg:height="0.167cm" svg:x="15.706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432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4.702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435cm" svg:y="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0.977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.804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21.272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5.474cm" svg:y="1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03cm" svg:y="1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86cm" svg:y="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03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7" draw:layer="layout" svg:width="21.486cm" svg:height="0.962cm" svg:x="6.751cm" svg:y="1.129cm">
          <draw:text-box>
            <text:p>Схема часов на ESP8266 NodeMCU + матрица на WS2812B Вариант 2</text:p>
          </draw:text-box>
        </draw:frame>
        <draw:connector draw:style-name="gr10" draw:text-style-name="P4" draw:layer="layout" svg:x1="20.673cm" svg:y1="18.438cm" svg:x2="21.577cm" svg:y2="18.345cm" svg:d="M20673 18438h740v-93h164" svg:viewBox="0 0 905 94">
          <text:p/>
        </draw:connector>
        <draw:connector draw:style-name="gr10" draw:text-style-name="P4" draw:layer="layout" svg:x1="19.878cm" svg:y1="18.963cm" svg:x2="21.6cm" svg:y2="18.86cm" draw:start-shape="id57" draw:start-glue-point="5" draw:end-shape="id42" draw:end-glue-point="9" svg:d="M19878 18963h872v-103h850" svg:viewBox="0 0 1723 104">
          <text:p/>
        </draw:connector>
        <draw:custom-shape draw:style-name="gr65" draw:text-style-name="P11" draw:layer="layout" svg:width="0.167cm" svg:height="0.167cm" svg:x="21.264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7.988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4" draw:layer="layout" svg:width="3.791cm" svg:height="1.039cm" svg:x="9.82cm" svg:y="10.599cm">
          <draw:text-box>
            <text:p><text:span text:style-name="T6">ESP8266 NodeMCU</text:span></text:p>
          </draw:text-box>
        </draw:frame>
        <draw:frame draw:style-name="gr71" draw:text-style-name="P14" draw:layer="layout" svg:width="2.886cm" svg:height="1.433cm" svg:x="4.792cm" svg:y="10.818cm">
          <draw:text-box>
            <text:p><text:span text:style-name="T6">Фоторезистор </text:span><text:span text:style-name="T6">LDR 20k</text:span></text:p>
          </draw:text-box>
        </draw:frame>
        <draw:frame draw:style-name="gr71" draw:text-style-name="P14" draw:layer="layout" svg:width="3.541cm" svg:height="1.433cm" svg:x="4.283cm" svg:y="12.393cm">
          <draw:text-box>
            <text:p><text:span text:style-name="T6">Сенсорная кнопка TTP223b</text:span></text:p>
          </draw:text-box>
        </draw:frame>
        <draw:frame draw:style-name="gr72" draw:text-style-name="P14" draw:layer="layout" svg:width="4.618cm" svg:height="0.645cm" svg:x="11.109cm" svg:y="6.519cm">
          <draw:text-box>
            <text:p><text:span text:style-name="T6">Модуль реле 5В High Lvl</text:span></text:p>
          </draw:text-box>
        </draw:frame>
        <draw:frame draw:style-name="gr72" draw:text-style-name="P14" draw:layer="layout" svg:width="4.503cm" svg:height="0.645cm" svg:x="3.079cm" svg:y="1.751cm">
          <draw:text-box>
            <text:p><text:span text:style-name="T6"><text:s/></text:span><text:span text:style-name="T6">Мо</text:span><text:span text:style-name="T6">ду</text:span><text:span text:style-name="T6">ль </text:span><text:span text:style-name="T6">за</text:span><text:span text:style-name="T6">ря</text:span><text:span text:style-name="T6">да </text:span><text:span text:style-name="T6">J5</text:span><text:span text:style-name="T6">01</text:span><text:span text:style-name="T6">9</text:span></text:p>
          </draw:text-box>
        </draw:frame>
        <draw:frame draw:style-name="gr72" draw:text-style-name="P14" draw:layer="layout" svg:width="4.579cm" svg:height="0.645cm" svg:x="22.117cm" svg:y="4.442cm">
          <draw:text-box>
            <text:p><text:span text:style-name="T6">Матрица WS2812B 32x8</text:span></text:p>
          </draw:text-box>
        </draw:frame>
        <draw:frame draw:style-name="gr72" draw:text-style-name="P14" draw:layer="layout" svg:width="2.576cm" svg:height="0.645cm" svg:x="21.448cm" svg:y="18.997cm">
          <draw:text-box>
            <text:p><text:span text:style-name="T6">MP3-TF-16P</text:span></text:p>
          </draw:text-box>
        </draw:frame>
        <draw:frame draw:style-name="gr70" draw:text-style-name="P14" draw:layer="layout" svg:width="2.751cm" svg:height="1.039cm" svg:x="15.381cm" svg:y="2.893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7" draw:text-style-name="P4" draw:layer="layout" svg:x1="7.831cm" svg:y1="11.72cm" svg:x2="9.096cm" svg:y2="15.477cm" draw:start-shape="id45" draw:start-glue-point="5" draw:end-shape="id35" draw:end-glue-point="29" svg:d="M7831 11720v3757h1265" svg:viewBox="0 0 1266 3758">
          <text:p/>
        </draw:connector>
        <draw:frame draw:style-name="gr71" draw:text-style-name="P14" draw:layer="layout" svg:width="2.857cm" svg:height="1.433cm" svg:x="24.591cm" svg:y="8.255cm">
          <draw:text-box>
            <text:p><text:span text:style-name="T6">Датчик </text:span><text:span text:style-name="T6">движения</text:span></text:p>
            <text:p><text:span text:style-name="T6">RCWL-0516</text:span></text:p>
          </draw:text-box>
        </draw:frame>
        <draw:g draw:style-name="gr73">
          <draw:g draw:style-name="gr73" xml:id="id48" draw:id="id48">
            <draw:glue-point draw:id="4" svg:x="-0.086cm" svg:y="-0.158cm" draw:align="right"/>
            <draw:glue-point draw:id="5" svg:x="-4.24cm" svg:y="-5.015cm"/>
            <draw:g draw:style-name="gr1">
              <draw:line draw:style-name="gr137" draw:text-style-name="P1" draw:layer="layout" svg:x1="3.902cm" svg:y1="4.179cm" svg:x2="3.652cm" svg:y2="4.179cm">
                <text:p/>
              </draw:line>
              <draw:line draw:style-name="gr138" draw:text-style-name="P1" draw:layer="layout" svg:x1="3.709cm" svg:y1="4.457cm" svg:x2="3.152cm" svg:y2="4.179cm">
                <text:p/>
              </draw:line>
              <draw:line draw:style-name="gr139" draw:text-style-name="P1" draw:layer="layout" svg:x1="3.152cm" svg:y1="4.179cm" svg:x2="2.902cm" svg:y2="4.179cm">
                <text:p/>
              </draw:line>
            </draw:g>
            <draw:line draw:style-name="gr140" draw:text-style-name="P1" draw:layer="layout" svg:x1="3.652cm" svg:y1="4.179cm" svg:x2="3.652cm" svg:y2="4.496cm">
              <text:p/>
            </draw:line>
          </draw:g>
          <draw:g draw:style-name="gr1">
            <draw:line draw:style-name="gr141" draw:text-style-name="P1" draw:layer="layout" svg:x1="3.399cm" svg:y1="4.29cm" svg:x2="3.399cm" svg:y2="3.915cm">
              <text:p/>
            </draw:line>
            <draw:line draw:style-name="gr142" draw:text-style-name="P1" draw:layer="layout" svg:x1="3.524cm" svg:y1="3.915cm" svg:x2="3.274cm" svg:y2="3.915cm">
              <text:p/>
            </draw:line>
          </draw:g>
          <draw:line draw:style-name="gr143" draw:text-style-name="P1" draw:layer="layout" svg:x1="3.272cm" svg:y1="4.042cm" svg:x2="3.272cm" svg:y2="3.917cm">
            <text:p/>
          </draw:line>
          <draw:line draw:style-name="gr144" draw:text-style-name="P1" draw:layer="layout" svg:x1="3.522cm" svg:y1="3.917cm" svg:x2="3.522cm" svg:y2="4.042cm">
            <text:p/>
          </draw:line>
        </draw:g>
        <draw:custom-shape draw:style-name="gr68" draw:text-style-name="P4" draw:layer="layout" svg:width="0.167cm" svg:height="0.167cm" svg:x="10.016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5" draw:layer="layout" svg:width="1.499cm" svg:height="0.887cm" svg:x="2.435cm" svg:y="2.504cm">
          <draw:text-box>
            <text:p><text:span text:style-name="T7">Li-</text:span><text:span text:style-name="T7">Ion</text:span></text:p>
            <text:p><text:span text:style-name="T7">186</text:span><text:span text:style-name="T7">50</text:span></text:p>
          </draw:text-box>
        </draw:frame>
        <draw:custom-shape draw:style-name="gr83" draw:text-style-name="P6" draw:layer="layout" svg:width="1.428cm" svg:height="1.428cm" svg:x="19.721cm" svg:y="11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4" draw:layer="layout" svg:width="1.887cm" svg:height="0.645cm" svg:x="19.209cm" svg:y="11.166cm">
          <draw:text-box>
            <text:p><text:span text:style-name="T6">BC557</text:span></text:p>
          </draw:text-box>
        </draw:frame>
        <draw:custom-shape draw:style-name="gr84" draw:text-style-name="P16" draw:layer="layout" svg:width="0.167cm" svg:height="0.167cm" svg:x="7.73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57" draw:id="id57" draw:layer="layout" svg:width="1.899cm" svg:height="1.823cm" svg:x="18.074cm" svg:y="17.796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3">
          <draw:g draw:style-name="gr1" xml:id="id47" draw:id="id47">
            <draw:line draw:style-name="gr145" draw:text-style-name="P1" draw:layer="layout" svg:x1="2.591cm" svg:y1="3.28cm" svg:x2="2.341cm" svg:y2="3.28cm">
              <text:p/>
            </draw:line>
            <draw:line draw:style-name="gr146" draw:text-style-name="P1" draw:layer="layout" svg:x1="2.841cm" svg:y1="3.405cm" svg:x2="2.091cm" svg:y2="3.405cm">
              <text:p/>
            </draw:line>
            <draw:line draw:style-name="gr147" draw:text-style-name="P1" draw:layer="layout" svg:x1="2.466cm" svg:y1="3.28cm" svg:x2="2.466cm" svg:y2="3.03cm">
              <text:p/>
            </draw:line>
            <draw:line draw:style-name="gr148" draw:text-style-name="P1" draw:layer="layout" svg:x1="2.466cm" svg:y1="3.405cm" svg:x2="2.466cm" svg:y2="3.655cm">
              <text:p/>
            </draw:line>
          </draw:g>
          <draw:frame draw:style-name="gr89" draw:text-style-name="P15" draw:layer="layout" svg:width="0.376cm" svg:height="0.569cm" svg:x="2.011cm" svg:y="3.332cm">
            <draw:text-box>
              <text:p><text:span text:style-name="T7">+</text:span></text:p>
            </draw:text-box>
          </draw:frame>
        </draw:g>
        <draw:frame draw:style-name="gr72" draw:text-style-name="P14" draw:layer="layout" svg:width="0.201cm" svg:height="0.645cm" svg:x="14.552cm" svg:y="2.663cm">
          <draw:text-box>
            <text:p><text:span text:style-name="T6">-</text:span></text:p>
          </draw:text-box>
        </draw:frame>
        <draw:frame draw:style-name="gr72" draw:text-style-name="P14" draw:layer="layout" svg:width="0.365cm" svg:height="0.645cm" svg:x="13.969cm" svg:y="3.082cm">
          <draw:text-box>
            <text:p><text:span text:style-name="T6">+</text:span></text:p>
          </draw:text-box>
        </draw:frame>
        <draw:frame draw:style-name="gr90" draw:text-style-name="P15" draw:layer="layout" svg:width="2.117cm" svg:height="0.74cm" svg:x="2.787cm" svg:y="3.369cm">
          <draw:text-box>
            <text:p><text:span text:style-name="T7">«reset»</text:span></text:p>
          </draw:text-box>
        </draw:frame>
        <draw:g draw:style-name="gr1">
          <draw:line draw:style-name="gr149" draw:text-style-name="P1" draw:layer="layout" svg:x1="25.76cm" svg:y1="14.76cm" svg:x2="25.76cm" svg:y2="15.26cm">
            <text:p/>
          </draw:line>
          <draw:line draw:style-name="gr150" draw:text-style-name="P1" draw:layer="layout" svg:x1="25.885cm" svg:y1="14.76cm" svg:x2="25.885cm" svg:y2="15.26cm">
            <text:p/>
          </draw:line>
          <draw:line draw:style-name="gr151" draw:text-style-name="P1" draw:layer="layout" svg:x1="25.76cm" svg:y1="15.01cm" svg:x2="25.51cm" svg:y2="15.01cm">
            <text:p/>
          </draw:line>
          <draw:line draw:style-name="gr152" draw:text-style-name="P1" draw:layer="layout" svg:x1="25.885cm" svg:y1="15.01cm" svg:x2="26.135cm" svg:y2="15.01cm">
            <text:p/>
          </draw:line>
        </draw:g>
        <draw:frame draw:style-name="gr95" draw:text-style-name="P15" draw:layer="layout" svg:width="1.234cm" svg:height="0.569cm" svg:x="24.994cm" svg:y="15.275cm">
          <draw:text-box>
            <text:p><text:span text:style-name="T7">47n</text:span><text:span text:style-name="T7">F</text:span></text:p>
          </draw:text-box>
        </draw:frame>
        <draw:g draw:style-name="gr1" xml:id="id58" draw:id="id58">
          <draw:glue-point draw:id="4" svg:x="5cm" svg:y="5cm"/>
          <draw:glue-point draw:id="5" svg:x="5cm" svg:y="-5cm"/>
          <draw:line draw:style-name="gr153" draw:text-style-name="P1" draw:layer="layout" svg:x1="18.213cm" svg:y1="15.941cm" svg:x2="18.213cm" svg:y2="14.941cm">
            <text:p/>
          </draw:line>
          <draw:line draw:style-name="gr154" draw:text-style-name="P1" draw:layer="layout" svg:x1="18.713cm" svg:y1="15.941cm" svg:x2="18.213cm" svg:y2="15.691cm">
            <text:p/>
          </draw:line>
          <draw:line draw:style-name="gr155" draw:text-style-name="P1" draw:layer="layout" svg:x1="18.463cm" svg:y1="15.066cm" svg:x2="18.213cm" svg:y2="15.191cm">
            <text:p/>
          </draw:line>
          <draw:line draw:style-name="gr156" draw:text-style-name="P1" draw:layer="layout" svg:x1="18.213cm" svg:y1="15.441cm" svg:x2="17.713cm" svg:y2="15.441cm">
            <text:p/>
          </draw:line>
          <draw:line draw:style-name="gr157" draw:text-style-name="P1" draw:layer="layout" svg:x1="18.463cm" svg:y1="15.066cm" svg:x2="18.713cm" svg:y2="14.941cm">
            <text:p/>
          </draw:line>
        </draw:g>
        <draw:custom-shape draw:style-name="gr158" draw:text-style-name="P6" draw:layer="layout" svg:width="1.413cm" svg:height="1.455cm" svg:x="17.615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59" draw:id="id59" draw:layer="layout" svg:width="0.168cm" svg:height="0.168cm" svg:x="18.633cm" svg:y="16.344cm">
          <draw:image xlink:href="Pictures/100000010000000600000006E598FA5F.png" xlink:type="simple" xlink:show="embed" xlink:actuate="onLoad" draw:mime-type="image/png">
            <text:p/>
          </draw:image>
        </draw:frame>
        <draw:connector draw:style-name="gr53" draw:text-style-name="P4" draw:layer="layout" draw:line-skew="-0.571cm" svg:x1="18.713cm" svg:y1="15.941cm" svg:x2="18.717cm" svg:y2="16.512cm" draw:start-shape="id58" draw:start-glue-point="4" draw:end-shape="id59" draw:end-glue-point="2" svg:d="M18713 15941v500h4v71" svg:viewBox="0 0 5 572">
          <text:p/>
        </draw:connector>
        <draw:connector draw:style-name="gr10" draw:text-style-name="P4" draw:layer="layout" draw:line-skew="-0.544cm" svg:x1="21.772cm" svg:y1="17.274cm" svg:x2="18.713cm" svg:y2="14.941cm" draw:start-shape="id42" draw:start-glue-point="5" draw:end-shape="id58" draw:end-glue-point="5" svg:d="M21772 17274h-2187v-2333h-872" svg:viewBox="0 0 3060 2334">
          <text:p/>
        </draw:connector>
        <draw:g draw:style-name="gr1" xml:id="id60" draw:id="id60">
          <draw:rect draw:style-name="gr159" draw:text-style-name="P3" draw:layer="layout" svg:width="0.75cm" svg:height="0.446cm" svg:x="16.505cm" svg:y="15.216cm">
            <text:p text:style-name="P2"><text:span text:style-name="T1">1k</text:span></text:p>
          </draw:rect>
          <draw:line draw:style-name="gr160" draw:text-style-name="P1" draw:layer="layout" svg:x1="16.255cm" svg:y1="15.439cm" svg:x2="16.505cm" svg:y2="15.439cm">
            <text:p/>
          </draw:line>
          <draw:line draw:style-name="gr161" draw:text-style-name="P1" draw:layer="layout" svg:x1="17.255cm" svg:y1="15.439cm" svg:x2="17.505cm" svg:y2="15.439cm">
            <text:p/>
          </draw:line>
        </draw:g>
        <draw:connector draw:style-name="gr10" draw:text-style-name="P4" draw:layer="layout" svg:x1="14.28cm" svg:y1="15.434cm" svg:x2="16.255cm" svg:y2="15.439cm" draw:start-shape="id35" draw:start-glue-point="14" draw:end-shape="id60" draw:end-glue-point="3" svg:d="M14280 15434h991v5h984" svg:viewBox="0 0 1976 6">
          <text:p/>
        </draw:connector>
        <draw:connector draw:style-name="gr10" draw:text-style-name="P4" draw:layer="layout" svg:x1="17.505cm" svg:y1="15.439cm" svg:x2="17.713cm" svg:y2="15.441cm" draw:start-shape="id60" draw:start-glue-point="1" draw:end-shape="id58" draw:end-glue-point="3" svg:d="M17505 15439h104v2h104" svg:viewBox="0 0 209 3">
          <text:p/>
        </draw:connector>
        <draw:custom-shape draw:style-name="gr162" draw:text-style-name="P6" draw:layer="layout" svg:width="4.063cm" svg:height="2.116cm" svg:x="16.065cm" svg:y="14.568cm">
          <text:p/>
          <draw:enhanced-geometry svg:viewBox="0 0 21600 21600" draw:type="rectangle" draw:enhanced-path="M 0 0 L 21600 0 21600 21600 0 21600 0 0 Z N"/>
        </draw:custom-shape>
        <draw:frame draw:style-name="gr72" draw:text-style-name="P14" draw:layer="layout" svg:width="1.887cm" svg:height="0.645cm" svg:x="16.356cm" svg:y="14.588cm">
          <draw:text-box>
            <text:p><text:span text:style-name="T6">BC557</text:span></text:p>
          </draw:text-box>
        </draw:frame>
        <draw:frame draw:style-name="gr163" draw:text-style-name="P17" draw:layer="layout" svg:width="6.926cm" svg:height="0.962cm" svg:x="18.894cm" svg:y="2.648cm">
          <draw:text-box>
            <text:p>dfPlayer MH2024K-24 </text:p>
          </draw:text-box>
        </draw:frame>
        <draw:frame draw:style-name="gr17" draw:text-style-name="P6" xml:id="id62" draw:id="id62" draw:layer="layout" svg:width="3.675cm" svg:height="3.749cm" draw:transform="rotate (-1.59435827169682) translate (5.669cm 6.366cm)">
          <draw:image xlink:href="Pictures/10000001000000FA000000FF1D7E8260.png" xlink:type="simple" xlink:show="embed" xlink:actuate="onLoad" draw:mime-type="image/png">
            <text:p/>
          </draw:image>
          <draw:glue-point draw:id="4" svg:x="2.899cm" svg:y="4.372cm"/>
          <draw:glue-point draw:id="5" svg:x="1.916cm" svg:y="4.295cm"/>
          <draw:glue-point draw:id="6" svg:x="1.129cm" svg:y="4.33cm"/>
          <draw:glue-point draw:id="7" svg:x="0.242cm" svg:y="4.255cm"/>
          <draw:glue-point draw:id="8" svg:x="-0.581cm" svg:y="4.29cm"/>
          <draw:glue-point draw:id="9" svg:x="-1.47cm" svg:y="4.364cm"/>
          <draw:glue-point draw:id="10" svg:x="-2.302cm" svg:y="4.194cm"/>
          <draw:glue-point draw:id="11" svg:x="1.671cm" svg:y="-4.284cm"/>
          <draw:glue-point draw:id="12" svg:x="0.787cm" svg:y="-4.359cm"/>
          <draw:glue-point draw:id="13" svg:x="-0.036cm" svg:y="-4.327cm"/>
          <draw:glue-point draw:id="14" svg:x="-0.925cm" svg:y="-4.298cm"/>
          <draw:glue-point draw:id="15" svg:x="-1.76cm" svg:y="-4.417cm"/>
        </draw:frame>
        <draw:frame draw:style-name="gr17" draw:text-style-name="P6" xml:id="id61" draw:id="id61" draw:layer="layout" svg:width="2.484cm" svg:height="1.921cm" draw:transform="rotate (1.5707963267949) translate (2.21cm 13.678cm)">
          <draw:image xlink:href="Pictures/100000010000009600000074D54675B0.png" xlink:type="simple" xlink:show="embed" xlink:actuate="onLoad" draw:mime-type="image/png">
            <text:p/>
          </draw:image>
          <draw:glue-point draw:id="4" svg:x="3.503cm" svg:y="-4.496cm"/>
          <draw:glue-point draw:id="5" svg:x="1.046cm" svg:y="-4.343cm"/>
          <draw:glue-point draw:id="6" svg:x="-1.509cm" svg:y="-4.496cm"/>
          <draw:glue-point draw:id="7" svg:x="-3.774cm" svg:y="-4.343cm"/>
        </draw:frame>
        <draw:connector draw:style-name="gr10" draw:text-style-name="P4" draw:layer="layout" draw:line-skew="0.051cm" svg:x1="3.37cm" svg:y1="11.358cm" svg:x2="4.183cm" svg:y2="9.787cm" draw:start-shape="id61" draw:start-glue-point="5" draw:end-shape="id62" draw:end-glue-point="6" svg:d="M3370 11358v-690h813v-881" svg:viewBox="0 0 814 1572">
          <text:p/>
        </draw:connector>
        <draw:connector draw:style-name="gr10" draw:text-style-name="P4" draw:layer="layout" svg:x1="3.842cm" svg:y1="11.32cm" svg:x2="3.843cm" svg:y2="9.759cm" draw:start-shape="id61" draw:start-glue-point="4" draw:end-shape="id62" draw:end-glue-point="7" svg:d="M3842 11320v-703h1v-858" svg:viewBox="0 0 2 1562">
          <text:p/>
        </draw:connector>
        <draw:connector draw:style-name="gr41" draw:text-style-name="P4" draw:layer="layout" draw:line-skew="-0.405cm -4.588cm" svg:x1="2.446cm" svg:y1="11.358cm" svg:x2="9.096cm" svg:y2="16.8cm" draw:start-shape="id61" draw:start-glue-point="7" draw:end-shape="id35" draw:end-glue-point="33" svg:d="M2446 11358v-1069h-437v6511h7087" svg:viewBox="0 0 7088 6512">
          <text:p/>
        </draw:connector>
        <draw:connector draw:style-name="gr53" draw:text-style-name="P4" draw:layer="layout" svg:x1="2.881cm" svg:y1="11.32cm" svg:x2="3.188cm" svg:y2="9.8cm" draw:start-shape="id61" draw:start-glue-point="6" draw:end-shape="id62" draw:end-glue-point="9" svg:d="M2881 11320v-703h307v-817" svg:viewBox="0 0 308 1521">
          <text:p/>
        </draw:connector>
        <draw:connector draw:style-name="gr41" draw:text-style-name="P4" draw:layer="layout" draw:line-skew="-0.326cm" svg:x1="3.529cm" svg:y1="9.772cm" svg:x2="2.446cm" svg:y2="11.358cm" draw:start-shape="id62" draw:start-glue-point="8" draw:end-shape="id61" draw:end-glue-point="7" svg:d="M3529 9772v519h-1083v1067" svg:viewBox="0 0 1084 1587">
          <text:p/>
        </draw:connector>
        <draw:custom-shape draw:style-name="gr84" draw:text-style-name="P16" draw:layer="layout" svg:width="0.167cm" svg:height="0.167cm" svg:x="8.473cm" svg:y="1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0.167cm" svg:height="0.167cm" svg:x="4.105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4.301cm" svg:y1="12.441cm" svg:x2="4.183cm" svg:y2="9.787cm" draw:start-shape="id35" draw:start-glue-point="5" draw:end-shape="id62" draw:end-glue-point="6" svg:d="M14301 12441h504v-1818h-10622v-836" svg:viewBox="0 0 10623 2655">
          <text:p/>
        </draw:connector>
        <draw:connector draw:style-name="gr10" draw:text-style-name="P4" draw:layer="layout" draw:line-skew="0.374cm -0.351cm" svg:x1="14.301cm" svg:y1="12.79cm" svg:x2="3.843cm" svg:y2="9.759cm" draw:start-shape="id35" draw:start-glue-point="6" draw:end-shape="id62" draw:end-glue-point="7" svg:d="M14301 12790h878v-2518h-11336v-513" svg:viewBox="0 0 11337 3032">
          <text:p/>
        </draw:connector>
        <draw:custom-shape draw:style-name="gr164" draw:text-style-name="P18" draw:layer="layout" svg:width="0.167cm" svg:height="0.167cm" svg:x="3.764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9" draw:layer="layout" svg:width="0.167cm" svg:height="0.167cm" svg:x="9.92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6" draw:layer="layout" svg:width="0.167cm" svg:height="0.167cm" svg:x="2.36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4" draw:layer="layout" svg:width="2.062cm" svg:height="2.629cm" svg:x="2.183cm" svg:y="13.794cm">
          <draw:text-box>
            <text:p><text:span text:style-name="T6">Да</text:span><text:span text:style-name="T6">тч</text:span><text:span text:style-name="T6">ик</text:span></text:p>
            <text:p><text:span text:style-name="T6">да</text:span><text:span text:style-name="T6">вл</text:span><text:span text:style-name="T6">ен</text:span><text:span text:style-name="T6">ия</text:span></text:p>
            <text:p><text:span text:style-name="T7">BM</text:span><text:span text:style-name="T7">P18</text:span><text:span text:style-name="T7">0</text:span></text:p>
            <text:p><text:span text:style-name="T7">(B</text:span><text:span text:style-name="T7">MP</text:span><text:span text:style-name="T7">280</text:span><text:span text:style-name="T7">,</text:span></text:p>
            <text:p><text:span text:style-name="T7">BM</text:span><text:span text:style-name="T7">E28</text:span><text:span text:style-name="T7">0,</text:span></text:p>
            <text:p><text:span text:style-name="T7">AH</text:span><text:span text:style-name="T7">T10</text:span><text:span text:style-name="T7">,</text:span></text:p>
            <text:p><text:span text:style-name="T7">AH</text:span><text:span text:style-name="T7">T20</text:span><text:span text:style-name="T7">) </text:span><text:span text:style-name="T7">5V</text:span></text:p>
          </draw:text-box>
        </draw:frame>
        <draw:frame draw:style-name="gr166" draw:text-style-name="P14" draw:layer="layout" svg:width="3.287cm" svg:height="0.963cm" svg:x="5.613cm" svg:y="6.801cm">
          <draw:text-box>
            <text:p><text:span text:style-name="T6">Мо</text:span><text:span text:style-name="T6">ду</text:span><text:span text:style-name="T6">ль </text:span><text:span text:style-name="T6">ча</text:span><text:span text:style-name="T6">со</text:span><text:span text:style-name="T6">в</text:span></text:p>
            <text:p><text:span text:style-name="T7">RT</text:span><text:span text:style-name="T7">C </text:span><text:span text:style-name="T7">DS</text:span><text:span text:style-name="T7">130</text:span><text:span text:style-name="T7">7/D</text:span><text:span text:style-name="T7">S32</text:span><text:span text:style-name="T7">31</text:span></text:p>
          </draw:text-box>
        </draw:frame>
        <draw:connector draw:style-name="gr53" draw:text-style-name="P4" draw:layer="layout" draw:line-skew="0cm -2.635cm 0.24cm" svg:x1="5.298cm" svg:y1="15.363cm" svg:x2="2.881cm" svg:y2="11.32cm" draw:start-shape="id38" draw:start-glue-point="4" draw:end-shape="id61" draw:end-glue-point="6" svg:d="M5298 15363v655h-890v-5084h-1527v386" svg:viewBox="0 0 2418 5085">
          <text:p/>
        </draw:connector>
        <draw:custom-shape draw:style-name="gr68" draw:text-style-name="P4" draw:layer="layout" svg:width="0.167cm" svg:height="0.167cm" svg:x="5.213cm" svg:y="1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Звичайний">
        <draw:frame draw:style-name="gr17" draw:text-style-name="P6" xml:id="id67" draw:id="id67" draw:layer="layout" svg:width="5.562cm" svg:height="4.811cm" svg:x="10.209cm" svg:y="11.472cm">
          <draw:image xlink:href="Pictures/100000000000017A0000014700683B33.jpg" xlink:type="simple" xlink:show="embed" xlink:actuate="onLoad" draw:mime-type="image/jpeg">
            <text:p/>
          </draw:image>
          <draw:glue-point draw:id="4" svg:x="-4.922cm" svg:y="-3.363cm"/>
          <draw:glue-point draw:id="5" svg:x="-4.888cm" svg:y="-2.382cm"/>
          <draw:glue-point draw:id="6" svg:x="-4.888cm" svg:y="-1.398cm"/>
          <draw:glue-point draw:id="7" svg:x="-4.888cm" svg:y="-0.455cm"/>
          <draw:glue-point draw:id="8" svg:x="-4.854cm" svg:y="0.565cm"/>
          <draw:glue-point draw:id="9" svg:x="-4.854cm" svg:y="1.546cm"/>
          <draw:glue-point draw:id="10" svg:x="-4.854cm" svg:y="2.45cm"/>
          <draw:glue-point draw:id="11" svg:x="-4.854cm" svg:y="3.471cm"/>
          <draw:glue-point draw:id="12" svg:x="4.829cm" svg:y="-3.284cm"/>
          <draw:glue-point draw:id="13" svg:x="4.863cm" svg:y="-2.263cm"/>
          <draw:glue-point draw:id="14" svg:x="4.863cm" svg:y="-1.319cm"/>
          <draw:glue-point draw:id="15" svg:x="4.897cm" svg:y="-0.417cm"/>
          <draw:glue-point draw:id="16" svg:x="4.829cm" svg:y="0.565cm"/>
          <draw:glue-point draw:id="17" svg:x="4.863cm" svg:y="1.585cm"/>
          <draw:glue-point draw:id="18" svg:x="4.897cm" svg:y="2.529cm"/>
          <draw:glue-point draw:id="19" svg:x="4.829cm" svg:y="3.51cm"/>
        </draw:frame>
        <draw:g draw:style-name="gr1" xml:id="id64" draw:id="id64">
          <draw:glue-point draw:id="4" svg:x="4.675cm" svg:y="5cm"/>
          <draw:glue-point draw:id="5" svg:x="5cm" svg:y="-4.832cm"/>
          <draw:line draw:style-name="gr167" draw:text-style-name="P1" draw:layer="layout" svg:x1="20.594cm" svg:y1="10.806cm" svg:x2="20.627cm" svg:y2="9.807cm">
            <text:p/>
          </draw:line>
          <draw:line draw:style-name="gr168" draw:text-style-name="P1" draw:layer="layout" svg:x1="21.094cm" svg:y1="10.824cm" svg:x2="20.603cm" svg:y2="10.557cm">
            <text:p/>
          </draw:line>
          <draw:line draw:style-name="gr169" draw:text-style-name="P1" draw:layer="layout" svg:x1="20.873cm" svg:y1="9.941cm" svg:x2="20.619cm" svg:y2="10.058cm">
            <text:p/>
          </draw:line>
          <draw:line draw:style-name="gr170" draw:text-style-name="P1" draw:layer="layout" svg:x1="20.611cm" svg:y1="10.307cm" svg:x2="20.111cm" svg:y2="10.29cm">
            <text:p/>
          </draw:line>
          <draw:line draw:style-name="gr171" draw:text-style-name="P1" draw:layer="layout" svg:x1="20.873cm" svg:y1="9.941cm" svg:x2="21.127cm" svg:y2="9.824cm">
            <text:p/>
          </draw:line>
        </draw:g>
        <draw:g draw:style-name="gr1" xml:id="id63" draw:id="id63">
          <draw:rect draw:style-name="gr172" draw:text-style-name="P3" draw:layer="layout" svg:width="0.75cm" svg:height="0.423cm" svg:x="18.809cm" svg:y="10.115cm">
            <text:p text:style-name="P2"><text:span text:style-name="T1">3.3k</text:span></text:p>
          </draw:rect>
          <draw:line draw:style-name="gr173" draw:text-style-name="P1" draw:layer="layout" svg:x1="18.559cm" svg:y1="10.327cm" svg:x2="18.809cm" svg:y2="10.327cm">
            <text:p/>
          </draw:line>
          <draw:line draw:style-name="gr174" draw:text-style-name="P1" draw:layer="layout" svg:x1="19.559cm" svg:y1="10.327cm" svg:x2="19.809cm" svg:y2="10.327cm">
            <text:p/>
          </draw:line>
        </draw:g>
        <draw:connector draw:style-name="gr10" draw:text-style-name="P4" draw:layer="layout" svg:x1="19.809cm" svg:y1="10.326cm" svg:x2="20.111cm" svg:y2="10.315cm" draw:start-shape="id63" draw:start-glue-point="1" draw:end-shape="id64" draw:end-glue-point="3" svg:d="M19809 10326h151v-11h151" svg:viewBox="0 0 303 12">
          <text:p/>
        </draw:connector>
        <draw:g draw:style-name="gr1" xml:id="id66" draw:id="id66">
          <draw:rect draw:style-name="gr175" draw:text-style-name="P3" draw:layer="layout" svg:width="0.75cm" svg:height="0.371cm" svg:x="22.764cm" svg:y="9.014cm">
            <text:p text:style-name="P2"><text:span text:style-name="T1">4</text:span><text:span text:style-name="T1">7</text:span><text:span text:style-name="T1">0</text:span></text:p>
          </draw:rect>
          <draw:line draw:style-name="gr176" draw:text-style-name="P1" draw:layer="layout" svg:x1="22.514cm" svg:y1="9.2cm" svg:x2="22.764cm" svg:y2="9.2cm">
            <text:p/>
          </draw:line>
          <draw:line draw:style-name="gr177" draw:text-style-name="P1" draw:layer="layout" svg:x1="23.514cm" svg:y1="9.2cm" svg:x2="23.764cm" svg:y2="9.2cm">
            <text:p/>
          </draw:line>
        </draw:g>
        <draw:g draw:style-name="gr1" xml:id="id65" draw:id="id65">
          <draw:rect draw:style-name="gr178" draw:text-style-name="P5" draw:layer="layout" svg:width="0.75cm" svg:height="0.397cm" draw:transform="rotate (1.5707963267949) translate (21.666cm 8.782cm)">
            <text:p text:style-name="P2"><text:span text:style-name="T2">1</text:span><text:span text:style-name="T2">k</text:span></text:p>
          </draw:rect>
          <draw:line draw:style-name="gr179" draw:text-style-name="P1" draw:layer="layout" svg:x1="21.861cm" svg:y1="9.033cm" svg:x2="21.861cm" svg:y2="8.783cm">
            <text:p/>
          </draw:line>
          <draw:line draw:style-name="gr180" draw:text-style-name="P1" draw:layer="layout" svg:x1="21.861cm" svg:y1="8.032cm" svg:x2="21.861cm" svg:y2="7.782cm">
            <text:p/>
          </draw:line>
        </draw:g>
        <draw:connector draw:style-name="gr10" draw:text-style-name="P4" draw:layer="layout" svg:x1="21.127cm" svg:y1="9.824cm" svg:x2="21.864cm" svg:y2="9.033cm" draw:start-shape="id64" draw:start-glue-point="5" draw:end-shape="id65" draw:end-glue-point="2" svg:d="M21127 9824h737v-791" svg:viewBox="0 0 738 792">
          <text:p/>
        </draw:connector>
        <draw:connector draw:style-name="gr10" draw:text-style-name="P4" draw:layer="layout" draw:line-skew="0.048cm" svg:x1="21.127cm" svg:y1="9.824cm" svg:x2="22.514cm" svg:y2="9.199cm" draw:start-shape="id64" draw:start-glue-point="5" draw:end-shape="id66" draw:end-glue-point="3" svg:d="M21127 9824h742v-625h645" svg:viewBox="0 0 1388 626">
          <text:p/>
        </draw:connector>
        <draw:frame draw:style-name="gr17" draw:text-style-name="P6" xml:id="id68" draw:id="id68" draw:layer="layout" svg:width="3.545cm" svg:height="1.877cm" svg:x="12.064cm" svg:y="6.335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70" draw:id="id70" draw:layer="layout" svg:width="3.763cm" svg:height="1.866cm" draw:transform="rotate (-1.56713113536571) translate (27.217cm 9.041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71" draw:id="id71" draw:layer="layout" svg:width="2.163cm" svg:height="1.612cm" draw:transform="rotate (1.5707963267949) translate (19.199cm 14.447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72" draw:id="id72">
          <draw:glue-point draw:id="4" svg:x="3.008cm" svg:y="5cm"/>
          <draw:glue-point draw:id="5" svg:x="3.008cm" svg:y="-5cm"/>
          <draw:line draw:style-name="gr181" draw:text-style-name="P1" draw:layer="layout" svg:x1="8.503cm" svg:y1="10.046cm" svg:x2="8.753cm" svg:y2="10.046cm">
            <text:p/>
          </draw:line>
          <draw:line draw:style-name="gr182" draw:text-style-name="P1" draw:layer="layout" svg:x1="8.628cm" svg:y1="9.796cm" svg:x2="8.503cm" svg:y2="10.046cm">
            <text:p/>
          </draw:line>
          <draw:line draw:style-name="gr183" draw:text-style-name="P1" draw:layer="layout" svg:x1="8.753cm" svg:y1="10.046cm" svg:x2="8.628cm" svg:y2="9.796cm">
            <text:p/>
          </draw:line>
          <draw:line draw:style-name="gr184" draw:text-style-name="P1" draw:layer="layout" svg:x1="8.628cm" svg:y1="9.421cm" svg:x2="8.628cm" svg:y2="10.421cm">
            <text:p/>
          </draw:line>
          <draw:line draw:style-name="gr185" draw:text-style-name="P1" draw:layer="layout" svg:x1="8.503cm" svg:y1="9.796cm" svg:x2="8.753cm" svg:y2="9.796cm">
            <text:p/>
          </draw:line>
          <draw:line draw:style-name="gr186" draw:text-style-name="P1" draw:layer="layout" svg:x1="8.378cm" svg:y1="9.796cm" svg:x2="8.128cm" svg:y2="9.546cm">
            <text:p/>
          </draw:line>
          <draw:line draw:style-name="gr187" draw:text-style-name="P1" draw:layer="layout" svg:x1="8.503cm" svg:y1="9.671cm" svg:x2="8.253cm" svg:y2="9.421cm">
            <text:p/>
          </draw:line>
        </draw:g>
        <draw:frame draw:style-name="gr188" draw:text-style-name="P6" xml:id="id95" draw:id="id95" draw:layer="layout" svg:width="1.137cm" svg:height="1cm" draw:transform="rotate (-1.5707963267949) translate (17.299cm 18.195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-4.186cm"/>
          <draw:glue-point draw:id="5" svg:x="0.95cm" svg:y="-4.116cm"/>
        </draw:frame>
        <draw:connector draw:style-name="gr10" draw:text-style-name="P4" draw:layer="layout" svg:x1="10.272cm" svg:y1="12.732cm" svg:x2="18.559cm" svg:y2="10.326cm" draw:start-shape="id67" draw:start-glue-point="5" draw:end-shape="id63" draw:end-glue-point="3" svg:d="M10272 12732h-563v-2406h8850" svg:viewBox="0 0 8851 2407">
          <text:p/>
        </draw:connector>
        <draw:connector draw:style-name="gr10" draw:text-style-name="P4" draw:layer="layout" draw:line-skew="0cm 0cm -0.572cm" svg:x1="15.528cm" svg:y1="6.997cm" svg:x2="10.272cm" svg:y2="13.205cm" draw:start-shape="id68" draw:start-glue-point="4" draw:end-shape="id67" draw:end-glue-point="6" svg:d="M15528 6997h581v2845h-6972v3363h1135" svg:viewBox="0 0 6973 6209">
          <text:p/>
        </draw:connector>
        <draw:connector draw:style-name="gr25" draw:text-style-name="P4" draw:layer="layout" draw:line-skew="-0.575cm -0.568cm -0.606cm" svg:x1="21.09cm" svg:y1="15.909cm" svg:x2="21.093cm" svg:y2="10.823cm" draw:start-shape="id69" draw:start-glue-point="8" draw:end-shape="id64" draw:end-glue-point="4" svg:d="M21090 15909v-74h9v-3150h-6v-1862" svg:viewBox="0 0 10 5087">
          <text:p/>
        </draw:connector>
        <draw:connector draw:style-name="gr10" draw:text-style-name="P4" draw:layer="layout" draw:line-skew="-1.213cm -0.149cm" svg:x1="10.291cm" svg:y1="14.62cm" svg:x2="26.304cm" svg:y2="12.696cm" draw:start-shape="id67" draw:start-glue-point="9" draw:end-shape="id70" draw:end-glue-point="6" svg:d="M10291 14620h-1795v2014h17808v-3938" svg:viewBox="0 0 17809 3939">
          <text:p/>
        </draw:connector>
        <draw:connector draw:style-name="gr10" draw:text-style-name="P4" draw:layer="layout" svg:x1="19.947cm" svg:y1="14.303cm" svg:x2="15.713cm" svg:y2="15.093cm" draw:start-shape="id71" draw:start-glue-point="5" draw:end-shape="id67" draw:end-glue-point="18" svg:d="M19947 14303v790h-4234" svg:viewBox="0 0 4235 791">
          <text:p/>
        </draw:connector>
        <draw:connector draw:style-name="gr10" draw:text-style-name="P4" draw:layer="layout" svg:x1="8.628cm" svg:y1="10.421cm" svg:x2="10.253cm" svg:y2="12.26cm" draw:start-shape="id72" draw:start-glue-point="4" draw:end-shape="id67" draw:end-glue-point="4" svg:d="M8628 10421v1839h1625" svg:viewBox="0 0 1626 1840">
          <text:p/>
        </draw:connector>
        <draw:g draw:style-name="gr1" xml:id="id99" draw:id="id99">
          <draw:rect draw:style-name="gr189" draw:text-style-name="P3" draw:layer="layout" svg:width="0.75cm" svg:height="0.37cm" svg:x="7.226cm" svg:y="9.058cm">
            <text:p text:style-name="P2"><text:span text:style-name="T1">2</text:span><text:span text:style-name="T1">2</text:span><text:span text:style-name="T1">0</text:span></text:p>
          </draw:rect>
          <draw:line draw:style-name="gr190" draw:text-style-name="P1" draw:layer="layout" svg:x1="6.976cm" svg:y1="9.243cm" svg:x2="7.226cm" svg:y2="9.243cm">
            <text:p/>
          </draw:line>
          <draw:line draw:style-name="gr191" draw:text-style-name="P1" draw:layer="layout" svg:x1="7.976cm" svg:y1="9.243cm" svg:x2="8.226cm" svg:y2="9.243cm">
            <text:p/>
          </draw:line>
        </draw:g>
        <draw:frame draw:style-name="gr17" draw:text-style-name="P6" xml:id="id74" draw:id="id74" draw:layer="layout" svg:width="3.686cm" svg:height="2.954cm" draw:transform="rotate (1.5707963267949) translate (5.391cm 5.994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75" draw:id="id75">
          <draw:glue-point draw:id="4" svg:x="-5cm" svg:y="5.04cm"/>
          <draw:glue-point draw:id="5" svg:x="5cm" svg:y="5.04cm"/>
          <draw:line draw:style-name="gr192" draw:text-style-name="P1" draw:layer="layout" svg:x1="8.761cm" svg:y1="5.665cm" svg:x2="9.011cm" svg:y2="5.665cm">
            <text:p/>
          </draw:line>
          <draw:line draw:style-name="gr193" draw:text-style-name="P1" draw:layer="layout" svg:x1="9.761cm" svg:y1="5.665cm" svg:x2="10.011cm" svg:y2="5.665cm">
            <text:p/>
          </draw:line>
          <draw:path draw:style-name="gr194" draw:text-style-name="P5" draw:layer="layout" svg:width="0.187cm" svg:height="0.123cm" svg:x="9.011cm" svg:y="5.541cm" svg:viewBox="0 0 188 124" svg:d="M0 124c94-279 188 0 188 0">
            <text:p/>
          </draw:path>
          <draw:path draw:style-name="gr195" draw:text-style-name="P5" draw:layer="layout" svg:width="0.187cm" svg:height="0.123cm" svg:x="9.2cm" svg:y="5.542cm" svg:viewBox="0 0 188 124" svg:d="M0 124c94-279 188 0 188 0">
            <text:p/>
          </draw:path>
          <draw:path draw:style-name="gr196" draw:text-style-name="P5" draw:layer="layout" svg:width="0.187cm" svg:height="0.123cm" svg:x="9.388cm" svg:y="5.541cm" svg:viewBox="0 0 188 124" svg:d="M0 124c94-279 188 0 188 0">
            <text:p/>
          </draw:path>
          <draw:path draw:style-name="gr197" draw:text-style-name="P5" draw:layer="layout" svg:width="0.187cm" svg:height="0.123cm" svg:x="9.574cm" svg:y="5.541cm" svg:viewBox="0 0 188 124" svg:d="M0 124c94-279 188 0 188 0">
            <text:p/>
          </draw:path>
        </draw:g>
        <draw:g draw:style-name="gr1" xml:id="id73" draw:id="id73">
          <draw:line draw:style-name="gr198" draw:text-style-name="P1" draw:layer="layout" svg:x1="10.273cm" svg:y1="4.898cm" svg:x2="10.773cm" svg:y2="4.898cm">
            <text:p/>
          </draw:line>
          <draw:line draw:style-name="gr199" draw:text-style-name="P1" draw:layer="layout" svg:x1="10.273cm" svg:y1="4.773cm" svg:x2="10.773cm" svg:y2="4.773cm">
            <text:p/>
          </draw:line>
          <draw:line draw:style-name="gr200" draw:text-style-name="P7" draw:layer="layout" svg:x1="10.523cm" svg:y1="4.898cm" svg:x2="10.523cm" svg:y2="5.148cm">
            <text:p text:style-name="P2"><text:span text:style-name="T1"/></text:p>
            <text:p text:style-name="P2"><text:span text:style-name="T1">+</text:span></text:p>
          </draw:line>
          <draw:line draw:style-name="gr201" draw:text-style-name="P1" draw:layer="layout" svg:x1="10.523cm" svg:y1="4.773cm" svg:x2="10.523cm" svg:y2="4.523cm">
            <text:p/>
          </draw:line>
        </draw:g>
        <draw:connector draw:style-name="gr41" draw:text-style-name="P4" draw:layer="layout" svg:x1="10.053cm" svg:y1="5.697cm" svg:x2="10.523cm" svg:y2="5.148cm" draw:end-shape="id73" draw:end-glue-point="2" svg:d="M10053 5697v-15h470v-534" svg:viewBox="0 0 471 550">
          <text:p/>
        </draw:connector>
        <draw:connector draw:style-name="gr26" draw:text-style-name="P4" xml:id="id84" draw:id="id84" draw:layer="layout" svg:x1="8.345cm" svg:y1="2.506cm" svg:x2="10.523cm" svg:y2="4.523cm" draw:start-shape="id74" draw:start-glue-point="7" draw:end-shape="id73" draw:end-glue-point="0" svg:d="M8345 2506h2178v2017" svg:viewBox="0 0 2179 2018">
          <text:p/>
        </draw:connector>
        <draw:connector draw:style-name="gr41" draw:text-style-name="P4" draw:layer="layout" svg:x1="8.332cm" svg:y1="5.719cm" svg:x2="8.761cm" svg:y2="5.666cm" draw:start-shape="id74" draw:start-glue-point="4" draw:end-shape="id75" draw:end-glue-point="4" svg:d="M8332 5719h429v-53" svg:viewBox="0 0 430 54">
          <text:p/>
        </draw:connector>
        <draw:frame draw:style-name="gr42" draw:text-style-name="P8" draw:layer="layout" svg:width="1.408cm" svg:height="0.607cm" svg:x="9.182cm" svg:y="4.245cm">
          <draw:text-box>
            <text:p text:style-name="P20"><text:span text:style-name="T3">470uF</text:span></text:p>
          </draw:text-box>
        </draw:frame>
        <draw:connector draw:style-name="gr26" draw:text-style-name="P4" draw:layer="layout" draw:line-skew="2.797cm" svg:x1="8.345cm" svg:y1="2.506cm" svg:x2="15.528cm" svg:y2="7.237cm" draw:start-shape="id74" draw:start-glue-point="7" draw:end-shape="id68" draw:end-glue-point="5" svg:d="M8345 2506h10561v4731h-3378" svg:viewBox="0 0 10562 4732">
          <text:p/>
        </draw:connector>
        <draw:connector draw:style-name="gr43" draw:text-style-name="P4" draw:layer="layout" draw:line-skew="-0.573cm -0.27cm" svg:x1="12.096cm" svg:y1="7.332cm" svg:x2="21.864cm" svg:y2="7.782cm" draw:start-shape="id68" draw:start-glue-point="8" draw:end-shape="id65" draw:end-glue-point="0" svg:d="M12096 7332h-1105v-1767h10873v2217" svg:viewBox="0 0 10874 2218">
          <text:p/>
        </draw:connector>
        <draw:frame draw:style-name="gr17" draw:text-style-name="P6" xml:id="id76" draw:id="id76" draw:layer="layout" svg:width="3.936cm" svg:height="2.426cm" svg:x="21.989cm" svg:y="16.74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6.566cm" svg:y1="12.687cm" svg:x2="25.499cm" svg:y2="18.59cm" draw:start-shape="id70" draw:start-glue-point="7" draw:end-shape="id76" draw:end-glue-point="10" svg:d="M26566 12687v5903h-1067" svg:viewBox="0 0 1068 5904">
          <text:p/>
        </draw:connector>
        <draw:g draw:style-name="gr1" xml:id="id77" draw:id="id77">
          <draw:rect draw:style-name="gr202" draw:text-style-name="P3" draw:layer="layout" svg:width="0.75cm" svg:height="0.25cm" svg:x="20.282cm" svg:y="17.14cm">
            <text:p text:style-name="P2"><text:span text:style-name="T1">1</text:span><text:span text:style-name="T1">k</text:span></text:p>
          </draw:rect>
          <draw:line draw:style-name="gr203" draw:text-style-name="P1" draw:layer="layout" svg:x1="20.032cm" svg:y1="17.265cm" svg:x2="20.282cm" svg:y2="17.265cm">
            <text:p/>
          </draw:line>
          <draw:line draw:style-name="gr204" draw:text-style-name="P1" draw:layer="layout" svg:x1="21.032cm" svg:y1="17.265cm" svg:x2="21.282cm" svg:y2="17.265cm">
            <text:p/>
          </draw:line>
        </draw:g>
        <draw:g draw:style-name="gr1" xml:id="id78" draw:id="id78">
          <draw:rect draw:style-name="gr205" draw:text-style-name="P3" draw:layer="layout" svg:width="0.75cm" svg:height="0.25cm" svg:x="19.41cm" svg:y="17.428cm">
            <text:p text:style-name="P2"><text:span text:style-name="T1">1k</text:span></text:p>
          </draw:rect>
          <draw:line draw:style-name="gr206" draw:text-style-name="P1" draw:layer="layout" svg:x1="19.16cm" svg:y1="17.553cm" svg:x2="19.41cm" svg:y2="17.553cm">
            <text:p/>
          </draw:line>
          <draw:line draw:style-name="gr207" draw:text-style-name="P1" draw:layer="layout" svg:x1="20.16cm" svg:y1="17.553cm" svg:x2="20.41cm" svg:y2="17.553cm">
            <text:p/>
          </draw:line>
        </draw:g>
        <draw:connector draw:style-name="gr10" draw:text-style-name="P4" draw:layer="layout" svg:x1="21.282cm" svg:y1="17.265cm" svg:x2="22.234cm" svg:y2="17.269cm" draw:start-shape="id77" draw:start-glue-point="1" draw:end-shape="id76" draw:end-glue-point="5" svg:d="M21282 17265h363v4h589" svg:viewBox="0 0 953 5">
          <text:p/>
        </draw:connector>
        <draw:connector draw:style-name="gr10" draw:text-style-name="P4" draw:layer="layout" svg:x1="20.41cm" svg:y1="17.553cm" svg:x2="22.234cm" svg:y2="17.534cm" draw:start-shape="id78" draw:start-glue-point="1" draw:end-shape="id76" draw:end-glue-point="6" svg:d="M20410 17553h799v-19h1025" svg:viewBox="0 0 1825 20">
          <text:p/>
        </draw:connector>
        <draw:connector draw:style-name="gr43" draw:text-style-name="P4" draw:layer="layout" svg:x1="26.041cm" svg:y1="12.687cm" svg:x2="22.22cm" svg:y2="17.031cm" draw:start-shape="id70" draw:start-glue-point="5" draw:end-shape="id76" draw:end-glue-point="4" svg:d="M26041 12687v2090h-4552v2254h731" svg:viewBox="0 0 4553 4345">
          <text:p/>
        </draw:connector>
        <draw:connector draw:style-name="gr41" draw:text-style-name="P4" draw:layer="layout" svg:x1="10.533cm" svg:y1="5.75cm" svg:x2="12.076cm" svg:y2="6.828cm" draw:start-shape="id79" draw:start-glue-point="8" draw:end-shape="id68" draw:end-glue-point="7" svg:d="M10533 5750v1078h1543" svg:viewBox="0 0 1544 1079">
          <text:p/>
        </draw:connector>
        <draw:connector draw:style-name="gr10" draw:text-style-name="P4" draw:layer="layout" draw:line-skew="-0.043cm" svg:x1="20.032cm" svg:y1="17.265cm" svg:x2="10.291cm" svg:y2="15.546cm" draw:start-shape="id77" draw:start-glue-point="3" draw:end-shape="id67" draw:end-glue-point="11" svg:d="M20032 17265h-10366v-1719h625" svg:viewBox="0 0 10367 1720">
          <text:p/>
        </draw:connector>
        <draw:connector draw:style-name="gr10" draw:text-style-name="P4" draw:layer="layout" draw:line-skew="-0.516cm" svg:x1="10.291cm" svg:y1="15.055cm" svg:x2="19.16cm" svg:y2="17.553cm" draw:start-shape="id67" draw:start-glue-point="10" draw:end-shape="id78" draw:end-glue-point="3" svg:d="M10291 15055h-1098v2498h9967" svg:viewBox="0 0 9968 2499">
          <text:p/>
        </draw:connector>
        <draw:g draw:style-name="gr1" xml:id="id80" draw:id="id80">
          <draw:rect draw:style-name="gr208" draw:text-style-name="P5" draw:layer="layout" svg:width="0.75cm" svg:height="0.391cm" svg:x="17.346cm" svg:y="15.663cm">
            <text:p text:style-name="P2"><text:span text:style-name="T1">2.2k</text:span></text:p>
          </draw:rect>
          <draw:line draw:style-name="gr209" draw:text-style-name="P1" draw:layer="layout" svg:x1="18.348cm" svg:y1="15.858cm" svg:x2="18.098cm" svg:y2="15.858cm">
            <text:p/>
          </draw:line>
          <draw:line draw:style-name="gr210" draw:text-style-name="P1" draw:layer="layout" svg:x1="17.348cm" svg:y1="15.858cm" svg:x2="17.098cm" svg:y2="15.858cm">
            <text:p/>
          </draw:line>
        </draw:g>
        <draw:connector draw:style-name="gr26" draw:text-style-name="P4" draw:layer="layout" svg:x1="18.348cm" svg:y1="15.858cm" svg:x2="19.566cm" svg:y2="14.292cm" draw:start-shape="id80" draw:start-glue-point="1" draw:end-shape="id71" draw:end-glue-point="4" svg:d="M18348 15858h1218v-1566" svg:viewBox="0 0 1219 1567">
          <text:p/>
        </draw:connector>
        <draw:connector draw:style-name="gr53" draw:text-style-name="P4" draw:layer="layout" svg:x1="2.893cm" svg:y1="3.043cm" svg:x2="5.391cm" svg:y2="2.883cm" draw:start-shape="id81" draw:start-glue-point="0" draw:end-shape="id74" draw:end-glue-point="8" svg:d="M2893 3043v-518h1446v358h1052" svg:viewBox="0 0 2499 519">
          <text:p/>
        </draw:connector>
        <draw:connector draw:style-name="gr41" draw:text-style-name="P4" draw:layer="layout" draw:line-skew="-0.214cm 0.523cm" svg:x1="5.415cm" svg:y1="3.905cm" svg:x2="4.243cm" svg:y2="4.192cm" draw:start-shape="id74" draw:start-glue-point="9" draw:end-shape="id82" draw:end-glue-point="4" svg:d="M5415 3905h-760v292h-412v-5" svg:viewBox="0 0 1173 293">
          <text:p/>
        </draw:connector>
        <draw:connector draw:style-name="gr41" draw:text-style-name="P4" draw:layer="layout" draw:line-skew="0.267cm" svg:x1="2.893cm" svg:y1="3.668cm" svg:x2="3.405cm" svg:y2="4.192cm" draw:start-shape="id81" draw:start-glue-point="2" draw:end-shape="id82" draw:end-glue-point="5" svg:d="M2893 3668v529h512v-5" svg:viewBox="0 0 513 530">
          <text:p/>
        </draw:connector>
        <draw:connector draw:style-name="gr43" draw:text-style-name="P4" draw:layer="layout" svg:x1="16.388cm" svg:y1="7.602cm" svg:x2="15.675cm" svg:y2="12.298cm" draw:start-shape="id83" draw:start-glue-point="8" draw:end-shape="id67" draw:end-glue-point="12" svg:d="M16388 7602v4696h-713" svg:viewBox="0 0 714 4697">
          <text:p/>
        </draw:connector>
        <draw:g draw:style-name="gr1" xml:id="id85" draw:id="id85">
          <draw:circle draw:style-name="gr211" draw:text-style-name="P9" draw:layer="layout" svg:width="1cm" svg:height="1cm" svg:x="14.704cm" svg:y="3.101cm">
            <text:p text:style-name="P2"><text:span text:style-name="T4"><text:s/></text:span><text:span text:style-name="T4"><text:s/></text:span><text:span text:style-name="T4"><text:s/></text:span><text:span text:style-name="T4"><text:s/></text:span><text:span text:style-name="T4">U</text:span></text:p>
          </draw:circle>
          <draw:line draw:style-name="gr212" draw:text-style-name="P10" draw:layer="layout" svg:x1="14.831cm" svg:y1="3.664cm" svg:x2="14.906cm" svg:y2="3.664cm">
            <text:p/>
          </draw:line>
          <draw:line draw:style-name="gr213" draw:text-style-name="P10" draw:layer="layout" svg:x1="14.831cm" svg:y1="3.539cm" svg:x2="15.206cm" svg:y2="3.539cm">
            <text:p/>
          </draw:line>
          <draw:line draw:style-name="gr214" draw:text-style-name="P10" draw:layer="layout" svg:x1="14.981cm" svg:y1="3.664cm" svg:x2="15.056cm" svg:y2="3.664cm">
            <text:p/>
          </draw:line>
          <draw:line draw:style-name="gr215" draw:text-style-name="P10" draw:layer="layout" svg:x1="15.131cm" svg:y1="3.664cm" svg:x2="15.206cm" svg:y2="3.664cm">
            <text:p/>
          </draw:line>
        </draw:g>
        <draw:connector draw:style-name="gr26" draw:text-style-name="P4" xml:id="id89" draw:id="id89" draw:layer="layout" svg:x1="10.523cm" svg:y1="2.506cm" svg:x2="15.204cm" svg:y2="3.101cm" draw:start-shape="id84" draw:start-glue-point="0" draw:end-shape="id85" draw:end-glue-point="0" svg:d="M10523 2506h4681v595" svg:viewBox="0 0 4682 596">
          <text:p/>
        </draw:connector>
        <draw:connector draw:style-name="gr43" draw:text-style-name="P4" draw:layer="layout" draw:line-skew="0.064cm" svg:x1="14.704cm" svg:y1="3.601cm" svg:x2="8.318cm" svg:y2="4.197cm" draw:start-shape="id85" draw:end-shape="id74" draw:end-glue-point="6" svg:d="M14704 3601h-3124v596h-3262" svg:viewBox="0 0 6387 597">
          <text:p/>
        </draw:connector>
        <draw:g draw:style-name="gr1" xml:id="id86" draw:id="id86">
          <draw:rect draw:style-name="gr216" draw:text-style-name="P3" draw:layer="layout" svg:width="0.75cm" svg:height="0.397cm" svg:x="15.161cm" svg:y="4.63cm">
            <text:p text:style-name="P2"><text:span text:style-name="T1">10k</text:span></text:p>
          </draw:rect>
          <draw:line draw:style-name="gr217" draw:text-style-name="P1" draw:layer="layout" svg:x1="14.911cm" svg:y1="4.829cm" svg:x2="15.161cm" svg:y2="4.829cm">
            <text:p/>
          </draw:line>
          <draw:line draw:style-name="gr218" draw:text-style-name="P1" draw:layer="layout" svg:x1="15.911cm" svg:y1="4.829cm" svg:x2="16.161cm" svg:y2="4.829cm">
            <text:p/>
          </draw:line>
        </draw:g>
        <draw:g draw:style-name="gr1" xml:id="id87" draw:id="id87">
          <draw:rect draw:style-name="gr219" draw:text-style-name="P3" draw:layer="layout" svg:width="0.75cm" svg:height="0.385cm" svg:x="17.429cm" svg:y="4.642cm">
            <text:p text:style-name="P2"><text:span text:style-name="T1">20k</text:span></text:p>
          </draw:rect>
          <draw:line draw:style-name="gr220" draw:text-style-name="P1" draw:layer="layout" svg:x1="17.179cm" svg:y1="4.835cm" svg:x2="17.429cm" svg:y2="4.835cm">
            <text:p/>
          </draw:line>
          <draw:line draw:style-name="gr221" draw:text-style-name="P1" draw:layer="layout" svg:x1="18.179cm" svg:y1="4.835cm" svg:x2="18.429cm" svg:y2="4.835cm">
            <text:p/>
          </draw:line>
        </draw:g>
        <draw:connector draw:style-name="gr10" draw:text-style-name="P4" xml:id="id88" draw:id="id88" draw:layer="layout" svg:x1="16.161cm" svg:y1="4.828cm" svg:x2="17.179cm" svg:y2="4.834cm" draw:start-shape="id86" draw:start-glue-point="1" draw:end-shape="id87" draw:end-glue-point="3" svg:d="M16161 4828h509v6h509" svg:viewBox="0 0 1019 7">
          <text:p/>
        </draw:connector>
        <draw:connector draw:style-name="gr10" draw:text-style-name="P4" draw:layer="layout" svg:x1="16.67cm" svg:y1="4.831cm" svg:x2="15.675cm" svg:y2="14.148cm" draw:start-shape="id88" draw:start-glue-point="0" draw:end-shape="id67" draw:end-glue-point="16" svg:d="M16670 4831v9317h-995" svg:viewBox="0 0 996 9318">
          <text:p/>
        </draw:connector>
        <draw:connector draw:style-name="gr10" draw:text-style-name="P4" draw:layer="layout" svg:x1="14.704cm" svg:y1="3.601cm" svg:x2="14.911cm" svg:y2="4.828cm" draw:start-shape="id85" draw:start-glue-point="3" draw:end-shape="id86" draw:end-glue-point="3" svg:d="M14704 3601h-518v1227h725" svg:viewBox="0 0 726 1228">
          <text:p/>
        </draw:connector>
        <draw:connector draw:style-name="gr53" draw:text-style-name="P4" draw:layer="layout" svg:x1="18.429cm" svg:y1="4.834cm" svg:x2="15.204cm" svg:y2="2.506cm" draw:start-shape="id87" draw:start-glue-point="1" draw:end-shape="id89" draw:end-glue-point="0" svg:d="M18429 4834h518v-2328h-3743" svg:viewBox="0 0 3744 2329">
          <text:p/>
        </draw:connector>
        <draw:connector draw:style-name="gr43" draw:text-style-name="P4" draw:layer="layout" draw:line-skew="0.295cm -0.076cm" svg:x1="15.533cm" svg:y1="7.51cm" svg:x2="10.533cm" svg:y2="5.75cm" draw:start-shape="id68" draw:start-glue-point="6" draw:end-shape="id79" draw:end-glue-point="8" svg:d="M15533 7510h871v1126h-5871v-2886" svg:viewBox="0 0 5872 2887">
          <text:p/>
        </draw:connector>
        <draw:frame draw:style-name="gr17" draw:text-style-name="P6" xml:id="id90" draw:id="id90" draw:layer="layout" svg:width="2.333cm" svg:height="2.504cm" svg:x="23.94cm" svg:y="3.944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0" draw:text-style-name="P4" draw:layer="layout" svg:x1="23.764cm" svg:y1="9.199cm" svg:x2="24.685cm" svg:y2="6.448cm" draw:start-shape="id66" draw:start-glue-point="1" draw:end-shape="id90" draw:end-glue-point="6" svg:d="M23764 9199h921v-2751" svg:viewBox="0 0 922 2752">
          <text:p/>
        </draw:connector>
        <draw:connector draw:style-name="gr26" draw:text-style-name="P4" draw:layer="layout" svg:x1="27.534cm" svg:y1="6.978cm" svg:x2="25.182cm" svg:y2="6.448cm" draw:start-shape="id91" draw:start-glue-point="6" draw:end-shape="id90" draw:end-glue-point="7" svg:d="M27534 6978h-2352v-530" svg:viewBox="0 0 2353 531">
          <text:p/>
        </draw:connector>
        <draw:connector draw:style-name="gr26" draw:text-style-name="P4" draw:layer="layout" draw:line-skew="0.478cm" svg:x1="15.204cm" svg:y1="2.506cm" svg:x2="26.64cm" svg:y2="15.852cm" draw:start-shape="id89" draw:start-glue-point="0" draw:end-shape="id92" draw:end-glue-point="10" svg:d="M15204 2506h12415v13346h-979" svg:viewBox="0 0 12416 13347">
          <text:p/>
        </draw:connector>
        <draw:connector draw:style-name="gr43" draw:text-style-name="P4" draw:layer="layout" svg:x1="15.533cm" svg:y1="7.51cm" svg:x2="24.213cm" svg:y2="14.663cm" draw:start-shape="id68" draw:start-glue-point="6" draw:end-shape="id93" draw:end-glue-point="4" svg:d="M15533 7510h8680v7153" svg:viewBox="0 0 8681 7154">
          <text:p/>
        </draw:connector>
        <draw:connector draw:style-name="gr43" draw:text-style-name="P4" draw:layer="layout" svg:x1="21.868cm" svg:y1="6.495cm" svg:x2="24.232cm" svg:y2="6.438cm" draw:end-shape="id90" draw:end-glue-point="5" svg:d="M21868 6495v453h2364v-510" svg:viewBox="0 0 2365 511">
          <text:p/>
        </draw:connector>
        <draw:connector draw:style-name="gr43" draw:text-style-name="P4" draw:layer="layout" svg:x1="14.704cm" svg:y1="3.601cm" svg:x2="12.065cm" svg:y2="7.803cm" draw:start-shape="id85" draw:start-glue-point="3" draw:end-shape="id68" draw:end-glue-point="9" svg:d="M14704 3601h-3140v4202h501" svg:viewBox="0 0 3141 4203">
          <text:p/>
        </draw:connector>
        <draw:custom-shape draw:style-name="gr65" draw:text-style-name="P11" draw:layer="layout" svg:width="0.167cm" svg:height="0.167cm" svg:x="11.491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xml:id="id79" draw:id="id79" draw:layer="layout" svg:width="0.167cm" svg:height="0.167cm" svg:x="10.449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4.129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6.60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xml:id="id83" draw:id="id83" draw:layer="layout" svg:width="0.167cm" svg:height="0.167cm" svg:x="16.304cm" svg:y="7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59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5.12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62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6.31cm" svg:y="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69" draw:id="id69" draw:layer="layout" svg:width="0.154cm" svg:height="0.167cm" svg:x="21.012cm" svg:y="15.7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21.78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5.99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9.471cm" svg:y="15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91" draw:id="id91" draw:layer="layout" svg:width="0.167cm" svg:height="0.167cm" svg:x="27.534cm" svg:y="6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92" draw:id="id92" draw:layer="layout" svg:width="0.167cm" svg:height="0.167cm" svg:x="26.473cm" svg:y="15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13" draw:layer="layout" svg:width="18.278cm" svg:height="0.962cm" svg:x="8.73cm" svg:y="1.178cm">
          <draw:text-box>
            <text:p text:style-name="P21">Схема часов на ESP32c3 + матрица на WS2812B</text:p>
          </draw:text-box>
        </draw:frame>
        <draw:connector draw:style-name="gr10" draw:text-style-name="P4" draw:layer="layout" svg:x1="20.721cm" svg:y1="18.5cm" svg:x2="22.004cm" svg:y2="18.358cm" draw:start-shape="id94" draw:start-glue-point="4" svg:d="M20721 18500h930v-142h353" svg:viewBox="0 0 1284 143">
          <text:p/>
        </draw:connector>
        <draw:connector draw:style-name="gr10" draw:text-style-name="P4" draw:layer="layout" svg:x1="20.702cm" svg:y1="19.06cm" svg:x2="22.062cm" svg:y2="18.855cm" draw:start-shape="id94" draw:start-glue-point="5" draw:end-shape="id76" draw:end-glue-point="9" svg:d="M20702 19060h691v-205h669" svg:viewBox="0 0 1361 206">
          <text:p/>
        </draw:connector>
        <draw:custom-shape draw:style-name="gr65" draw:text-style-name="P11" draw:layer="layout" svg:width="0.167cm" svg:height="0.167cm" svg:x="21.794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6.52cm" svg:y="15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14" draw:layer="layout" svg:width="3.828cm" svg:height="0.695cm" svg:x="10.694cm" svg:y="10.794cm">
          <draw:text-box>
            <text:p text:style-name="P22"><text:span text:style-name="T6">ESP32c3 super mini</text:span></text:p>
          </draw:text-box>
        </draw:frame>
        <draw:frame draw:style-name="gr70" draw:text-style-name="P14" draw:layer="layout" svg:width="2.886cm" svg:height="1.039cm" svg:x="13.316cm" svg:y="18.324cm">
          <draw:text-box>
            <text:p text:style-name="P22"><text:span text:style-name="T6">Фоторе</text:span><text:span text:style-name="T6">зистор </text:span><text:span text:style-name="T6">LDR </text:span><text:span text:style-name="T6">20k</text:span></text:p>
          </draw:text-box>
        </draw:frame>
        <draw:frame draw:style-name="gr70" draw:text-style-name="P14" draw:layer="layout" svg:width="3.51cm" svg:height="1.039cm" svg:x="17.621cm" svg:y="11.214cm">
          <draw:text-box>
            <text:p text:style-name="P22"><text:span text:style-name="T6">Сенсорная </text:span><text:span text:style-name="T6">кнопка </text:span><text:span text:style-name="T6">TTP223b</text:span></text:p>
          </draw:text-box>
        </draw:frame>
        <draw:frame draw:style-name="gr224" draw:text-style-name="P14" draw:layer="layout" svg:width="4.618cm" svg:height="0.764cm" svg:x="11.512cm" svg:y="5.77cm">
          <draw:text-box>
            <text:p text:style-name="P22"><text:span text:style-name="T6">Модуль реле 5В High Lvl</text:span></text:p>
          </draw:text-box>
        </draw:frame>
        <draw:frame draw:style-name="gr72" draw:text-style-name="P14" draw:layer="layout" svg:width="4.503cm" svg:height="0.645cm" svg:x="4.282cm" svg:y="1.799cm">
          <draw:text-box>
            <text:p text:style-name="P22"><text:span text:style-name="T6"><text:s/>Модуль заряда J5019</text:span></text:p>
          </draw:text-box>
        </draw:frame>
        <draw:frame draw:style-name="gr72" draw:text-style-name="P14" draw:layer="layout" svg:width="4.579cm" svg:height="0.645cm" svg:x="22.345cm" svg:y="3.149cm">
          <draw:text-box>
            <text:p text:style-name="P22"><text:span text:style-name="T6">Матрица WS2812B 32x8</text:span></text:p>
          </draw:text-box>
        </draw:frame>
        <draw:frame draw:style-name="gr72" draw:text-style-name="P14" draw:layer="layout" svg:width="2.576cm" svg:height="0.645cm" svg:x="22.651cm" svg:y="19.045cm">
          <draw:text-box>
            <text:p text:style-name="P22"><text:span text:style-name="T6">MP3-TF-16P</text:span></text:p>
          </draw:text-box>
        </draw:frame>
        <draw:frame draw:style-name="gr70" draw:text-style-name="P14" draw:layer="layout" svg:width="2.751cm" svg:height="1.039cm" svg:x="15.808cm" svg:y="2.906cm">
          <draw:text-box>
            <text:p text:style-name="P22"><text:span text:style-name="T6">AC </text:span><text:span text:style-name="T6">220V</text:span></text:p>
            <text:p text:style-name="P22"><text:span text:style-name="T6">DC 5V </text:span><text:span text:style-name="T6">2.5A</text:span></text:p>
          </draw:text-box>
        </draw:frame>
        <draw:connector draw:style-name="gr225" draw:text-style-name="P4" draw:layer="layout" svg:x1="17.131cm" svg:y1="18.288cm" svg:x2="20.326cm" svg:y2="14.303cm" draw:start-shape="id95" draw:start-glue-point="4" draw:end-shape="id71" draw:end-glue-point="6" svg:d="M17131 18288v-1967h3195v-2018" svg:viewBox="0 0 3196 3986">
          <text:p/>
        </draw:connector>
        <draw:frame draw:style-name="gr71" draw:text-style-name="P14" draw:layer="layout" svg:width="2.857cm" svg:height="1.433cm" svg:x="24.93cm" svg:y="7.526cm">
          <draw:text-box>
            <text:p text:style-name="P22"><text:span text:style-name="T6">Датчик движения</text:span></text:p>
            <text:p text:style-name="P22"><text:span text:style-name="T6">RCWL-0516</text:span></text:p>
          </draw:text-box>
        </draw:frame>
        <draw:g draw:style-name="gr73">
          <draw:g draw:style-name="gr73" xml:id="id82" draw:id="id82">
            <draw:glue-point draw:id="4" svg:x="-0.086cm" svg:y="-0.158cm" draw:align="right"/>
            <draw:glue-point draw:id="5" svg:x="-4.24cm" svg:y="-5.015cm"/>
            <draw:g draw:style-name="gr1">
              <draw:line draw:style-name="gr226" draw:text-style-name="P1" draw:layer="layout" svg:x1="4.329cm" svg:y1="4.192cm" svg:x2="4.079cm" svg:y2="4.192cm">
                <text:p/>
              </draw:line>
              <draw:line draw:style-name="gr227" draw:text-style-name="P1" draw:layer="layout" svg:x1="4.136cm" svg:y1="4.47cm" svg:x2="3.579cm" svg:y2="4.192cm">
                <text:p/>
              </draw:line>
              <draw:line draw:style-name="gr228" draw:text-style-name="P1" draw:layer="layout" svg:x1="3.579cm" svg:y1="4.192cm" svg:x2="3.329cm" svg:y2="4.192cm">
                <text:p/>
              </draw:line>
            </draw:g>
            <draw:line draw:style-name="gr229" draw:text-style-name="P1" draw:layer="layout" svg:x1="4.079cm" svg:y1="4.192cm" svg:x2="4.079cm" svg:y2="4.509cm">
              <text:p/>
            </draw:line>
          </draw:g>
          <draw:g draw:style-name="gr1">
            <draw:line draw:style-name="gr230" draw:text-style-name="P1" draw:layer="layout" svg:x1="3.826cm" svg:y1="4.303cm" svg:x2="3.826cm" svg:y2="3.928cm">
              <text:p/>
            </draw:line>
            <draw:line draw:style-name="gr231" draw:text-style-name="P1" draw:layer="layout" svg:x1="3.951cm" svg:y1="3.928cm" svg:x2="3.701cm" svg:y2="3.928cm">
              <text:p/>
            </draw:line>
          </draw:g>
          <draw:line draw:style-name="gr232" draw:text-style-name="P1" draw:layer="layout" svg:x1="3.699cm" svg:y1="4.055cm" svg:x2="3.699cm" svg:y2="3.93cm">
            <text:p/>
          </draw:line>
          <draw:line draw:style-name="gr233" draw:text-style-name="P1" draw:layer="layout" svg:x1="3.949cm" svg:y1="3.93cm" svg:x2="3.949cm" svg:y2="4.055cm">
            <text:p/>
          </draw:line>
        </draw:g>
        <draw:custom-shape draw:style-name="gr68" draw:text-style-name="P4" draw:layer="layout" svg:width="0.167cm" svg:height="0.167cm" svg:x="10.443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5" draw:layer="layout" svg:width="1.499cm" svg:height="0.887cm" svg:x="2.862cm" svg:y="2.517cm">
          <draw:text-box>
            <text:p text:style-name="P23"><text:span text:style-name="T7">Li-Ion</text:span></text:p>
            <text:p text:style-name="P23"><text:span text:style-name="T7">18650</text:span></text:p>
          </draw:text-box>
        </draw:frame>
        <draw:custom-shape draw:style-name="gr234" draw:text-style-name="P6" draw:layer="layout" svg:width="1.428cm" svg:height="1.428cm" svg:x="20.207cm" svg:y="9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4" draw:layer="layout" svg:width="1.887cm" svg:height="0.645cm" svg:x="19.695cm" svg:y="9.033cm">
          <draw:text-box>
            <text:p text:style-name="P22"><text:span text:style-name="T6">B</text:span><text:span text:style-name="T6">C</text:span><text:span text:style-name="T6">5</text:span><text:span text:style-name="T6">5</text:span><text:span text:style-name="T6">7</text:span></text:p>
          </draw:text-box>
        </draw:frame>
        <draw:custom-shape draw:style-name="gr84" draw:text-style-name="P16" draw:layer="layout" svg:width="0.167cm" svg:height="0.167cm" svg:x="17.042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94" draw:id="id94" draw:layer="layout" svg:width="1.899cm" svg:height="1.823cm" svg:x="18.898cm" svg:y="17.893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3">
          <draw:g draw:style-name="gr1" xml:id="id81" draw:id="id81">
            <draw:line draw:style-name="gr235" draw:text-style-name="P1" draw:layer="layout" svg:x1="3.018cm" svg:y1="3.293cm" svg:x2="2.768cm" svg:y2="3.293cm">
              <text:p/>
            </draw:line>
            <draw:line draw:style-name="gr236" draw:text-style-name="P1" draw:layer="layout" svg:x1="3.268cm" svg:y1="3.418cm" svg:x2="2.518cm" svg:y2="3.418cm">
              <text:p/>
            </draw:line>
            <draw:line draw:style-name="gr237" draw:text-style-name="P1" draw:layer="layout" svg:x1="2.893cm" svg:y1="3.293cm" svg:x2="2.893cm" svg:y2="3.043cm">
              <text:p/>
            </draw:line>
            <draw:line draw:style-name="gr238" draw:text-style-name="P1" draw:layer="layout" svg:x1="2.893cm" svg:y1="3.418cm" svg:x2="2.893cm" svg:y2="3.668cm">
              <text:p/>
            </draw:line>
          </draw:g>
          <draw:frame draw:style-name="gr89" draw:text-style-name="P15" draw:layer="layout" svg:width="0.376cm" svg:height="0.569cm" svg:x="2.438cm" svg:y="3.345cm">
            <draw:text-box>
              <text:p><text:span text:style-name="T7">+</text:span></text:p>
            </draw:text-box>
          </draw:frame>
        </draw:g>
        <draw:frame draw:style-name="gr72" draw:text-style-name="P14" draw:layer="layout" svg:width="0.201cm" svg:height="0.645cm" svg:x="14.979cm" svg:y="2.676cm">
          <draw:text-box>
            <text:p text:style-name="P22"><text:span text:style-name="T6">-</text:span></text:p>
          </draw:text-box>
        </draw:frame>
        <draw:frame draw:style-name="gr72" draw:text-style-name="P14" draw:layer="layout" svg:width="0.365cm" svg:height="0.645cm" svg:x="14.396cm" svg:y="3.095cm">
          <draw:text-box>
            <text:p text:style-name="P22"><text:span text:style-name="T6">+</text:span></text:p>
          </draw:text-box>
        </draw:frame>
        <draw:frame draw:style-name="gr90" draw:text-style-name="P15" draw:layer="layout" svg:width="2.117cm" svg:height="0.74cm" svg:x="3.214cm" svg:y="3.382cm">
          <draw:text-box>
            <text:p text:style-name="P23"><text:span text:style-name="T7">«re</text:span><text:span text:style-name="T7">set</text:span><text:span text:style-name="T7">»</text:span></text:p>
          </draw:text-box>
        </draw:frame>
        <draw:connector draw:style-name="gr26" draw:text-style-name="P4" draw:layer="layout" svg:x1="26.473cm" svg:y1="15.852cm" svg:x2="21.064cm" svg:y2="15.86cm" draw:start-shape="id92" draw:start-glue-point="6" draw:end-shape="id96" draw:end-glue-point="2" svg:d="M26473 15852h-2692v8h-2717" svg:viewBox="0 0 5410 9">
          <text:p/>
        </draw:connector>
        <draw:connector draw:style-name="gr26" draw:text-style-name="P4" xml:id="id96" draw:id="id96" draw:layer="layout" svg:x1="21.064cm" svg:y1="15.86cm" svg:x2="15.694cm" svg:y2="12.789cm" draw:end-shape="id67" draw:end-glue-point="13" svg:d="M21064 15860h-2396v-3071h-2974" svg:viewBox="0 0 5371 3072">
          <text:p/>
        </draw:connector>
        <draw:connector draw:style-name="gr239" draw:text-style-name="P4" draw:layer="layout" svg:x1="17.131cm" svg:y1="18.288cm" svg:x2="15.694cm" svg:y2="13.243cm" draw:start-shape="id95" draw:start-glue-point="4" draw:end-shape="id67" draw:end-glue-point="14" svg:d="M17131 18288v-5045h-1437" svg:viewBox="0 0 1438 5046">
          <text:p/>
        </draw:connector>
        <draw:custom-shape draw:style-name="gr240" draw:text-style-name="P24" draw:layer="layout" svg:width="0.154cm" svg:height="0.167cm" svg:x="6.448cm" svg:y="12.97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5.675cm" svg:y1="15.565cm" svg:x2="17.098cm" svg:y2="15.858cm" draw:start-shape="id67" draw:start-glue-point="19" draw:end-shape="id80" draw:end-glue-point="3" svg:d="M15675 15565h751v293h672" svg:viewBox="0 0 1424 294">
          <text:p/>
        </draw:connector>
        <draw:connector draw:style-name="gr10" draw:text-style-name="P4" draw:layer="layout" svg:x1="17.098cm" svg:y1="15.858cm" svg:x2="16.894cm" svg:y2="18.296cm" draw:start-shape="id80" draw:start-glue-point="3" draw:end-shape="id95" draw:end-glue-point="5" svg:d="M17098 15858h-518v1276h314v1162" svg:viewBox="0 0 519 2439">
          <text:p/>
        </draw:connector>
        <draw:frame draw:style-name="gr17" draw:text-style-name="P6" xml:id="id98" draw:id="id98" draw:layer="layout" svg:width="3.675cm" svg:height="3.749cm" svg:x="1.83cm" svg:y="10.671cm">
          <draw:image xlink:href="Pictures/10000001000000FA000000FF1D7E8260.png" xlink:type="simple" xlink:show="embed" xlink:actuate="onLoad" draw:mime-type="image/png">
            <text:p/>
          </draw:image>
          <draw:glue-point draw:id="4" svg:x="4.413cm" svg:y="-3.075cm"/>
          <draw:glue-point draw:id="5" svg:x="4.361cm" svg:y="-2.067cm"/>
          <draw:glue-point draw:id="6" svg:x="4.413cm" svg:y="-1.261cm"/>
          <draw:glue-point draw:id="7" svg:x="4.361cm" svg:y="-0.352cm"/>
          <draw:glue-point draw:id="8" svg:x="4.413cm" svg:y="0.504cm"/>
          <draw:glue-point draw:id="9" svg:x="4.514cm" svg:y="1.411cm"/>
          <draw:glue-point draw:id="10" svg:x="4.361cm" svg:y="2.267cm"/>
          <draw:glue-point draw:id="11" svg:x="-4.432cm" svg:y="-1.613cm"/>
          <draw:glue-point draw:id="12" svg:x="-4.484cm" svg:y="-0.706cm"/>
          <draw:glue-point draw:id="13" svg:x="-4.432cm" svg:y="0.152cm"/>
          <draw:glue-point draw:id="14" svg:x="-4.38cm" svg:y="1.058cm"/>
          <draw:glue-point draw:id="15" svg:x="-4.484cm" svg:y="1.915cm"/>
        </draw:frame>
        <draw:frame draw:style-name="gr17" draw:text-style-name="P6" xml:id="id97" draw:id="id97" draw:layer="layout" svg:width="2.484cm" svg:height="1.921cm" draw:transform="rotate (1.5707963267949) translate (5.85cm 18.536cm)">
          <draw:image xlink:href="Pictures/100000010000009600000074D54675B0.png" xlink:type="simple" xlink:show="embed" xlink:actuate="onLoad" draw:mime-type="image/png">
            <text:p/>
          </draw:image>
          <draw:glue-point draw:id="4" svg:x="3.503cm" svg:y="-4.496cm"/>
          <draw:glue-point draw:id="5" svg:x="1.046cm" svg:y="-4.343cm"/>
          <draw:glue-point draw:id="6" svg:x="-1.509cm" svg:y="-4.496cm"/>
          <draw:glue-point draw:id="7" svg:x="-3.774cm" svg:y="-4.343cm"/>
        </draw:frame>
        <draw:connector draw:style-name="gr10" draw:text-style-name="P4" draw:layer="layout" svg:x1="7.482cm" svg:y1="16.178cm" svg:x2="10.272cm" svg:y2="13.659cm" draw:start-shape="id97" draw:start-glue-point="4" draw:end-shape="id67" draw:end-glue-point="7" svg:d="M7482 16178v-2519h2790" svg:viewBox="0 0 2791 2520">
          <text:p/>
        </draw:connector>
        <draw:connector draw:style-name="gr10" draw:text-style-name="P4" draw:layer="layout" svg:x1="10.291cm" svg:y1="14.148cm" svg:x2="7.01cm" svg:y2="16.216cm" draw:start-shape="id67" draw:start-glue-point="8" draw:end-shape="id97" draw:end-glue-point="5" svg:d="M10291 14148h-3281v2068" svg:viewBox="0 0 3282 2069">
          <text:p/>
        </draw:connector>
        <draw:connector draw:style-name="gr10" draw:text-style-name="P4" draw:layer="layout" draw:line-skew="-0.367cm" svg:x1="10.272cm" svg:y1="13.659cm" svg:x2="5.269cm" svg:y2="12.414cm" draw:start-shape="id67" draw:start-glue-point="7" draw:end-shape="id98" draw:end-glue-point="7" svg:d="M10272 13659h-2782v-1245h-2221" svg:viewBox="0 0 5004 1246">
          <text:p/>
        </draw:connector>
        <draw:connector draw:style-name="gr10" draw:text-style-name="P4" draw:layer="layout" draw:line-skew="-0.855cm" svg:x1="5.288cm" svg:y1="12.073cm" svg:x2="10.291cm" svg:y2="14.148cm" draw:start-shape="id98" draw:start-glue-point="6" draw:end-shape="id67" draw:end-glue-point="8" svg:d="M5288 12073h1714v2075h3289" svg:viewBox="0 0 5004 2076">
          <text:p/>
        </draw:connector>
        <draw:connector draw:style-name="gr241" draw:text-style-name="P4" draw:layer="layout" draw:line-skew="-2.239cm" svg:x1="6.086cm" svg:y1="16.216cm" svg:x2="10.533cm" svg:y2="5.75cm" draw:start-shape="id97" draw:start-glue-point="7" draw:end-shape="id79" draw:end-glue-point="8" svg:d="M6086 16216v-7553h4447v-2913" svg:viewBox="0 0 4448 10467">
          <text:p/>
        </draw:connector>
        <draw:connector draw:style-name="gr242" draw:text-style-name="P4" draw:layer="layout" svg:x1="5.288cm" svg:y1="12.733cm" svg:x2="6.086cm" svg:y2="16.216cm" draw:start-shape="id98" draw:start-glue-point="8" draw:end-shape="id97" draw:end-glue-point="7" svg:d="M5288 12733h798v3483" svg:viewBox="0 0 799 3484">
          <text:p/>
        </draw:connector>
        <draw:custom-shape draw:style-name="gr243" draw:text-style-name="P18" draw:layer="layout" svg:width="0.173cm" svg:height="0.168cm" svg:x="6.922cm" svg:y="14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8" draw:layer="layout" svg:width="0.18cm" svg:height="0.162cm" svg:x="7.396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line-skew="-0.205cm -6.2cm" svg:x1="15.694cm" svg:y1="12.789cm" svg:x2="5.325cm" svg:y2="13.073cm" draw:start-shape="id67" draw:start-glue-point="13" draw:end-shape="id98" draw:end-glue-point="9" svg:d="M15694 12789h372v-2206h-8209v2490h-2532" svg:viewBox="0 0 10742 2491">
          <text:p/>
        </draw:connector>
        <draw:connector draw:style-name="gr26" draw:text-style-name="P4" draw:layer="layout" svg:x1="5.325cm" svg:y1="13.073cm" svg:x2="6.521cm" svg:y2="16.178cm" draw:start-shape="id98" draw:start-glue-point="9" draw:end-shape="id97" draw:end-glue-point="6" svg:d="M5325 13073h1196v3105" svg:viewBox="0 0 1197 3106">
          <text:p/>
        </draw:connector>
        <draw:custom-shape draw:style-name="gr244" draw:text-style-name="P25" draw:layer="layout" svg:width="0.212cm" svg:height="0.211cm" svg:x="10.424cm" svg:y="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8.226cm" svg:y1="9.243cm" svg:x2="8.628cm" svg:y2="9.421cm" draw:start-shape="id99" draw:start-glue-point="1" draw:end-shape="id72" draw:end-glue-point="5" svg:d="M8226 9243h402v178" svg:viewBox="0 0 403 179">
          <text:p/>
        </draw:connector>
        <draw:custom-shape draw:style-name="gr245" draw:text-style-name="P4" xml:id="id100" draw:id="id100" draw:layer="layout" svg:width="0.198cm" svg:height="0.198cm" svg:x="7.751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svg:x1="6.976cm" svg:y1="9.243cm" svg:x2="7.751cm" svg:y2="10.591cm" draw:start-shape="id99" draw:start-glue-point="3" draw:end-shape="id100" draw:end-glue-point="6" svg:d="M6976 9243h-518v1348h1293" svg:viewBox="0 0 1294 1349">
          <text:p/>
        </draw:connector>
        <draw:custom-shape draw:style-name="gr245" draw:text-style-name="P4" draw:layer="layout" svg:width="0.132cm" svg:height="0.145cm" svg:x="16.001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6" draw:text-style-name="P14" draw:layer="layout" svg:width="3.589cm" svg:height="1.433cm" svg:x="1.587cm" svg:y="9.27cm">
          <draw:text-box>
            <text:p text:style-name="P22"><text:span text:style-name="T6">Модуль времени и памяти EEPROM</text:span></text:p>
            <text:p text:style-name="P22"><text:span text:style-name="T6">HW-111 (DS1307)</text:span></text:p>
          </draw:text-box>
        </draw:frame>
        <draw:frame draw:style-name="gr247" draw:text-style-name="P14" draw:layer="layout" svg:width="3.311cm" svg:height="0.645cm" svg:x="5.226cm" svg:y="18.62cm">
          <draw:text-box>
            <text:p text:style-name="P22"><text:span text:style-name="T6">Барометр BM180</text:span></text:p>
          </draw:text-box>
        </draw:frame>
        <draw:custom-shape draw:style-name="gr244" draw:text-style-name="P25" xml:id="id93" draw:id="id93" draw:layer="layout" svg:width="0.144cm" svg:height="0.18cm" svg:x="24.141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25" draw:layer="layout" svg:width="0.193cm" svg:height="0.193cm" svg:x="10.443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4" draw:layer="layout" svg:width="0.186cm" svg:height="0.185cm" svg:x="18.573cm" svg:y="1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Звичайний">
        <draw:frame draw:style-name="gr17" draw:text-style-name="P6" xml:id="id105" draw:id="id105" draw:layer="layout" svg:width="9.728cm" svg:height="6.566cm" svg:x="5.636cm" svg:y="11.305cm">
          <draw:image xlink:href="Pictures/100000010000029F000001C5868357A6.png" xlink:type="simple" xlink:show="embed" xlink:actuate="onLoad" draw:mime-type="image/png">
            <text:p/>
          </draw:image>
          <draw:glue-point draw:id="4" svg:x="4.33cm" svg:y="-3.702cm"/>
          <draw:glue-point draw:id="5" svg:x="4.351cm" svg:y="-3.237cm"/>
          <draw:glue-point draw:id="6" svg:x="4.351cm" svg:y="-2.741cm"/>
          <draw:glue-point draw:id="7" svg:x="4.309cm" svg:y="-2.153cm"/>
          <draw:glue-point draw:id="8" svg:x="4.309cm" svg:y="-1.812cm"/>
          <draw:glue-point draw:id="9" svg:x="4.371cm" svg:y="-1.192cm"/>
          <draw:glue-point draw:id="10" svg:x="4.351cm" svg:y="-0.665cm"/>
          <draw:glue-point draw:id="11" svg:x="4.371cm" svg:y="-0.261cm"/>
          <draw:glue-point draw:id="12" svg:x="4.351cm" svg:y="0.265cm"/>
          <draw:glue-point draw:id="13" svg:x="4.351cm" svg:y="0.729cm"/>
          <draw:glue-point draw:id="14" svg:x="4.937cm" svg:y="1.256cm"/>
          <draw:glue-point draw:id="15" svg:x="4.957cm" svg:y="1.752cm"/>
          <draw:glue-point draw:id="16" svg:x="5cm" svg:y="2.187cm"/>
          <draw:glue-point draw:id="17" svg:x="-4.247cm" svg:y="-3.237cm"/>
          <draw:glue-point draw:id="18" svg:x="-4.1cm" svg:y="0.205cm"/>
          <draw:glue-point draw:id="19" svg:x="-4.082cm" svg:y="-0.304cm"/>
          <draw:glue-point draw:id="20" svg:x="-4.97cm" svg:y="-0.787cm"/>
          <draw:glue-point draw:id="21" svg:x="-4.952cm" svg:y="-1.271cm"/>
          <draw:glue-point draw:id="22" svg:x="-4.118cm" svg:y="-1.781cm"/>
          <draw:glue-point draw:id="23" svg:x="-4.082cm" svg:y="-2.238cm"/>
          <draw:glue-point draw:id="24" svg:x="-4.082cm" svg:y="0.796cm"/>
          <draw:glue-point draw:id="25" svg:x="-4.934cm" svg:y="1.253cm"/>
          <draw:glue-point draw:id="26" svg:x="-4.97cm" svg:y="1.71cm"/>
          <draw:glue-point draw:id="27" svg:x="-4.952cm" svg:y="2.22cm"/>
          <draw:glue-point draw:id="28" svg:x="-2.268cm" svg:y="2.65cm"/>
          <draw:glue-point draw:id="29" svg:x="-2.268cm" svg:y="3.215cm"/>
          <draw:glue-point draw:id="30" svg:x="3.17cm" svg:y="2.65cm"/>
          <draw:glue-point draw:id="31" svg:x="3.152cm" svg:y="3.215cm"/>
        </draw:frame>
        <draw:g draw:style-name="gr1" xml:id="id102" draw:id="id102">
          <draw:glue-point draw:id="4" svg:x="4.675cm" svg:y="5cm"/>
          <draw:glue-point draw:id="5" svg:x="5cm" svg:y="-4.832cm"/>
          <draw:line draw:style-name="gr249" draw:text-style-name="P1" draw:layer="layout" svg:x1="20.535cm" svg:y1="12.952cm" svg:x2="20.568cm" svg:y2="11.953cm">
            <text:p/>
          </draw:line>
          <draw:line draw:style-name="gr250" draw:text-style-name="P1" draw:layer="layout" svg:x1="21.035cm" svg:y1="12.97cm" svg:x2="20.544cm" svg:y2="12.703cm">
            <text:p/>
          </draw:line>
          <draw:line draw:style-name="gr251" draw:text-style-name="P1" draw:layer="layout" svg:x1="20.814cm" svg:y1="12.087cm" svg:x2="20.56cm" svg:y2="12.204cm">
            <text:p/>
          </draw:line>
          <draw:line draw:style-name="gr252" draw:text-style-name="P1" draw:layer="layout" svg:x1="20.552cm" svg:y1="12.453cm" svg:x2="20.052cm" svg:y2="12.436cm">
            <text:p/>
          </draw:line>
          <draw:line draw:style-name="gr253" draw:text-style-name="P1" draw:layer="layout" svg:x1="20.814cm" svg:y1="12.087cm" svg:x2="21.068cm" svg:y2="11.97cm">
            <text:p/>
          </draw:line>
        </draw:g>
        <draw:g draw:style-name="gr1" xml:id="id101" draw:id="id101">
          <draw:rect draw:style-name="gr254" draw:text-style-name="P3" draw:layer="layout" svg:width="0.75cm" svg:height="0.423cm" svg:x="18.75cm" svg:y="12.261cm">
            <text:p text:style-name="P2"><text:span text:style-name="T1">3.3k</text:span></text:p>
          </draw:rect>
          <draw:line draw:style-name="gr255" draw:text-style-name="P1" draw:layer="layout" svg:x1="18.5cm" svg:y1="12.473cm" svg:x2="18.75cm" svg:y2="12.473cm">
            <text:p/>
          </draw:line>
          <draw:line draw:style-name="gr256" draw:text-style-name="P1" draw:layer="layout" svg:x1="19.5cm" svg:y1="12.473cm" svg:x2="19.75cm" svg:y2="12.473cm">
            <text:p/>
          </draw:line>
        </draw:g>
        <draw:connector draw:style-name="gr10" draw:text-style-name="P4" draw:layer="layout" svg:x1="19.75cm" svg:y1="12.472cm" svg:x2="20.052cm" svg:y2="12.461cm" draw:start-shape="id101" draw:start-glue-point="1" draw:end-shape="id102" draw:end-glue-point="3" svg:d="M19750 12472h151v-11h151" svg:viewBox="0 0 303 12">
          <text:p/>
        </draw:connector>
        <draw:g draw:style-name="gr1" xml:id="id104" draw:id="id104">
          <draw:rect draw:style-name="gr257" draw:text-style-name="P3" draw:layer="layout" svg:width="0.75cm" svg:height="0.371cm" svg:x="22.705cm" svg:y="11.16cm">
            <text:p text:style-name="P2"><text:span text:style-name="T1">470</text:span></text:p>
          </draw:rect>
          <draw:line draw:style-name="gr258" draw:text-style-name="P1" draw:layer="layout" svg:x1="22.455cm" svg:y1="11.346cm" svg:x2="22.705cm" svg:y2="11.346cm">
            <text:p/>
          </draw:line>
          <draw:line draw:style-name="gr259" draw:text-style-name="P1" draw:layer="layout" svg:x1="23.455cm" svg:y1="11.346cm" svg:x2="23.705cm" svg:y2="11.346cm">
            <text:p/>
          </draw:line>
        </draw:g>
        <draw:g draw:style-name="gr1" xml:id="id103" draw:id="id103">
          <draw:rect draw:style-name="gr260" draw:text-style-name="P5" draw:layer="layout" svg:width="0.75cm" svg:height="0.368cm" draw:transform="rotate (1.5707963267949) translate (21.592cm 10.724cm)">
            <text:p text:style-name="P2"><text:span text:style-name="T2">1k</text:span></text:p>
          </draw:rect>
          <draw:line draw:style-name="gr261" draw:text-style-name="P1" draw:layer="layout" svg:x1="21.773cm" svg:y1="10.975cm" svg:x2="21.773cm" svg:y2="10.725cm">
            <text:p/>
          </draw:line>
          <draw:line draw:style-name="gr262" draw:text-style-name="P1" draw:layer="layout" svg:x1="21.773cm" svg:y1="9.974cm" svg:x2="21.773cm" svg:y2="9.724cm">
            <text:p/>
          </draw:line>
        </draw:g>
        <draw:connector draw:style-name="gr10" draw:text-style-name="P4" draw:layer="layout" svg:x1="21.068cm" svg:y1="11.97cm" svg:x2="21.776cm" svg:y2="10.975cm" draw:start-shape="id102" draw:start-glue-point="5" draw:end-shape="id103" draw:end-glue-point="2" svg:d="M21068 11970h708v-995" svg:viewBox="0 0 709 996">
          <text:p/>
        </draw:connector>
        <draw:connector draw:style-name="gr10" draw:text-style-name="P4" draw:layer="layout" svg:x1="21.068cm" svg:y1="11.97cm" svg:x2="22.455cm" svg:y2="11.345cm" draw:start-shape="id102" draw:start-glue-point="5" draw:end-shape="id104" draw:end-glue-point="3" svg:d="M21068 11970h694v-625h693" svg:viewBox="0 0 1388 626">
          <text:p/>
        </draw:connector>
        <draw:frame draw:style-name="gr17" draw:text-style-name="P6" xml:id="id106" draw:id="id106" draw:layer="layout" svg:width="3.545cm" svg:height="1.877cm" svg:x="11.893cm" svg:y="7.046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108" draw:id="id108" draw:layer="layout" svg:width="3.763cm" svg:height="1.866cm" draw:transform="rotate (-1.56713113536571) translate (27.155cm 9.567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109" draw:id="id109" draw:layer="layout" svg:width="2.163cm" svg:height="1.612cm" draw:transform="rotate (1.5707963267949) translate (2.203cm 14.95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110" draw:id="id110">
          <draw:glue-point draw:id="4" svg:x="-5cm" svg:y="3.008cm"/>
          <draw:glue-point draw:id="5" svg:x="5cm" svg:y="3.008cm"/>
          <draw:line draw:style-name="gr263" draw:text-style-name="P1" draw:layer="layout" svg:x1="18.743cm" svg:y1="14.635cm" svg:x2="18.743cm" svg:y2="14.885cm">
            <text:p/>
          </draw:line>
          <draw:line draw:style-name="gr264" draw:text-style-name="P1" draw:layer="layout" svg:x1="18.993cm" svg:y1="14.76cm" svg:x2="18.743cm" svg:y2="14.635cm">
            <text:p/>
          </draw:line>
          <draw:line draw:style-name="gr265" draw:text-style-name="P1" draw:layer="layout" svg:x1="18.743cm" svg:y1="14.885cm" svg:x2="18.993cm" svg:y2="14.76cm">
            <text:p/>
          </draw:line>
          <draw:line draw:style-name="gr266" draw:text-style-name="P1" draw:layer="layout" svg:x1="19.368cm" svg:y1="14.76cm" svg:x2="18.368cm" svg:y2="14.76cm">
            <text:p/>
          </draw:line>
          <draw:line draw:style-name="gr267" draw:text-style-name="P1" draw:layer="layout" svg:x1="18.993cm" svg:y1="14.635cm" svg:x2="18.993cm" svg:y2="14.885cm">
            <text:p/>
          </draw:line>
          <draw:line draw:style-name="gr268" draw:text-style-name="P1" draw:layer="layout" svg:x1="18.993cm" svg:y1="14.51cm" svg:x2="19.243cm" svg:y2="14.26cm">
            <text:p/>
          </draw:line>
          <draw:line draw:style-name="gr269" draw:text-style-name="P1" draw:layer="layout" svg:x1="19.118cm" svg:y1="14.635cm" svg:x2="19.368cm" svg:y2="14.385cm">
            <text:p/>
          </draw:line>
        </draw:g>
        <draw:frame draw:style-name="gr17" draw:text-style-name="P6" xml:id="id119" draw:id="id119" draw:layer="layout" svg:width="1.137cm" svg:height="1cm" draw:transform="rotate (-1.5707963267949) translate (4.903cm 8.893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0" draw:text-style-name="P4" draw:layer="layout" svg:x1="14.732cm" svg:y1="12.463cm" svg:x2="18.5cm" svg:y2="12.472cm" draw:start-shape="id105" draw:start-glue-point="5" draw:end-shape="id101" draw:end-glue-point="3" svg:d="M14732 12463h2191v9h1577" svg:viewBox="0 0 3769 10">
          <text:p/>
        </draw:connector>
        <draw:connector draw:style-name="gr10" draw:text-style-name="P4" draw:layer="layout" svg:x1="15.357cm" svg:y1="7.708cm" svg:x2="6.512cm" svg:y2="14.722cm" draw:start-shape="id106" draw:start-glue-point="4" draw:end-shape="id105" draw:end-glue-point="18" svg:d="M15357 7708h581v2406h-10802v4608h1376" svg:viewBox="0 0 10803 7015">
          <text:p/>
        </draw:connector>
        <draw:connector draw:style-name="gr25" draw:text-style-name="P4" draw:layer="layout" draw:line-skew="-0.575cm -0.568cm -0.606cm" svg:x1="20.994cm" svg:y1="15.657cm" svg:x2="21.034cm" svg:y2="12.969cm" draw:start-shape="id107" draw:start-glue-point="8" draw:end-shape="id102" draw:end-glue-point="4" svg:d="M20994 15657v-74h9v-1951h31v-663" svg:viewBox="0 0 41 2689">
          <text:p/>
        </draw:connector>
        <draw:connector draw:style-name="gr10" draw:text-style-name="P4" draw:layer="layout" svg:x1="14.732cm" svg:y1="14.152cm" svg:x2="26.242cm" svg:y2="13.222cm" draw:start-shape="id105" draw:start-glue-point="10" draw:end-shape="id108" draw:end-glue-point="6" svg:d="M14732 14152h11510v-930" svg:viewBox="0 0 11511 931">
          <text:p/>
        </draw:connector>
        <draw:connector draw:style-name="gr26" draw:text-style-name="P4" draw:layer="layout" draw:line-skew="-1.999cm" svg:x1="2.57cm" svg:y1="14.796cm" svg:x2="8.294cm" svg:y2="16.327cm" draw:start-shape="id109" draw:start-glue-point="4" draw:end-shape="id105" draw:end-glue-point="28" svg:d="M2570 14796v1576h5724v-45" svg:viewBox="0 0 5725 1577">
          <text:p/>
        </draw:connector>
        <draw:connector draw:style-name="gr10" draw:text-style-name="P4" draw:layer="layout" svg:x1="2.951cm" svg:y1="14.807cm" svg:x2="14.752cm" svg:y2="13.806cm" draw:start-shape="id109" draw:start-glue-point="5" draw:end-shape="id105" draw:end-glue-point="9" svg:d="M2951 14807v3564h12913v-4565h-1112" svg:viewBox="0 0 12914 4566">
          <text:p/>
        </draw:connector>
        <draw:connector draw:style-name="gr10" draw:text-style-name="P4" draw:layer="layout" svg:x1="18.368cm" svg:y1="14.76cm" svg:x2="14.732cm" svg:y2="14.761cm" draw:start-shape="id110" draw:start-glue-point="4" draw:end-shape="id105" draw:end-glue-point="12" svg:d="M18368 14760h-1511v1h-2125" svg:viewBox="0 0 3637 2">
          <text:p/>
        </draw:connector>
        <draw:g draw:style-name="gr1" xml:id="id111" draw:id="id111">
          <draw:rect draw:style-name="gr270" draw:text-style-name="P3" draw:layer="layout" svg:width="0.75cm" svg:height="0.37cm" svg:x="19.703cm" svg:y="14.579cm">
            <text:p text:style-name="P2"><text:span text:style-name="T1">220</text:span></text:p>
          </draw:rect>
          <draw:line draw:style-name="gr271" draw:text-style-name="P1" draw:layer="layout" svg:x1="19.453cm" svg:y1="14.764cm" svg:x2="19.703cm" svg:y2="14.764cm">
            <text:p/>
          </draw:line>
          <draw:line draw:style-name="gr272" draw:text-style-name="P1" draw:layer="layout" svg:x1="20.453cm" svg:y1="14.764cm" svg:x2="20.703cm" svg:y2="14.764cm">
            <text:p/>
          </draw:line>
        </draw:g>
        <draw:connector draw:style-name="gr10" draw:text-style-name="P4" draw:layer="layout" svg:x1="19.368cm" svg:y1="14.76cm" svg:x2="19.453cm" svg:y2="14.764cm" draw:start-shape="id110" draw:start-glue-point="5" draw:end-shape="id111" draw:end-glue-point="3" svg:d="M19368 14760h43v4h42" svg:viewBox="0 0 86 5">
          <text:p/>
        </draw:connector>
        <draw:frame draw:style-name="gr17" draw:text-style-name="P6" xml:id="id113" draw:id="id113" draw:layer="layout" svg:width="3.686cm" svg:height="2.954cm" draw:transform="rotate (1.5707963267949) translate (5.391cm 5.994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14" draw:id="id114">
          <draw:glue-point draw:id="4" svg:x="-5cm" svg:y="5.04cm"/>
          <draw:glue-point draw:id="5" svg:x="5cm" svg:y="5.04cm"/>
          <draw:line draw:style-name="gr273" draw:text-style-name="P1" draw:layer="layout" svg:x1="8.761cm" svg:y1="5.665cm" svg:x2="9.011cm" svg:y2="5.665cm">
            <text:p/>
          </draw:line>
          <draw:line draw:style-name="gr274" draw:text-style-name="P1" draw:layer="layout" svg:x1="9.761cm" svg:y1="5.665cm" svg:x2="10.011cm" svg:y2="5.665cm">
            <text:p/>
          </draw:line>
          <draw:path draw:style-name="gr275" draw:text-style-name="P5" draw:layer="layout" svg:width="0.187cm" svg:height="0.123cm" svg:x="9.011cm" svg:y="5.541cm" svg:viewBox="0 0 188 124" svg:d="M0 124c94-279 188 0 188 0">
            <text:p/>
          </draw:path>
          <draw:path draw:style-name="gr276" draw:text-style-name="P5" draw:layer="layout" svg:width="0.187cm" svg:height="0.123cm" svg:x="9.2cm" svg:y="5.542cm" svg:viewBox="0 0 188 124" svg:d="M0 124c94-279 188 0 188 0">
            <text:p/>
          </draw:path>
          <draw:path draw:style-name="gr277" draw:text-style-name="P5" draw:layer="layout" svg:width="0.187cm" svg:height="0.123cm" svg:x="9.388cm" svg:y="5.541cm" svg:viewBox="0 0 188 124" svg:d="M0 124c94-279 188 0 188 0">
            <text:p/>
          </draw:path>
          <draw:path draw:style-name="gr278" draw:text-style-name="P5" draw:layer="layout" svg:width="0.187cm" svg:height="0.123cm" svg:x="9.574cm" svg:y="5.541cm" svg:viewBox="0 0 188 124" svg:d="M0 124c94-279 188 0 188 0">
            <text:p/>
          </draw:path>
        </draw:g>
        <draw:g draw:style-name="gr1" xml:id="id112" draw:id="id112">
          <draw:line draw:style-name="gr279" draw:text-style-name="P1" draw:layer="layout" svg:x1="10.273cm" svg:y1="4.898cm" svg:x2="10.773cm" svg:y2="4.898cm">
            <text:p/>
          </draw:line>
          <draw:line draw:style-name="gr280" draw:text-style-name="P1" draw:layer="layout" svg:x1="10.273cm" svg:y1="4.773cm" svg:x2="10.773cm" svg:y2="4.773cm">
            <text:p/>
          </draw:line>
          <draw:line draw:style-name="gr281" draw:text-style-name="P7" draw:layer="layout" svg:x1="10.523cm" svg:y1="4.898cm" svg:x2="10.523cm" svg:y2="5.148cm">
            <text:p text:style-name="P2"><text:span text:style-name="T1"/></text:p>
            <text:p text:style-name="P2"><text:span text:style-name="T1">+</text:span></text:p>
          </draw:line>
          <draw:line draw:style-name="gr282" draw:text-style-name="P1" draw:layer="layout" svg:x1="10.523cm" svg:y1="4.773cm" svg:x2="10.523cm" svg:y2="4.523cm">
            <text:p/>
          </draw:line>
        </draw:g>
        <draw:connector draw:style-name="gr41" draw:text-style-name="P4" draw:layer="layout" svg:x1="10.053cm" svg:y1="5.697cm" svg:x2="10.523cm" svg:y2="5.148cm" draw:end-shape="id112" draw:end-glue-point="2" svg:d="M10053 5697v-15h470v-534" svg:viewBox="0 0 471 550">
          <text:p/>
        </draw:connector>
        <draw:connector draw:style-name="gr26" draw:text-style-name="P4" xml:id="id123" draw:id="id123" draw:layer="layout" svg:x1="8.345cm" svg:y1="2.506cm" svg:x2="10.523cm" svg:y2="4.523cm" draw:start-shape="id113" draw:start-glue-point="7" draw:end-shape="id112" draw:end-glue-point="0" svg:d="M8345 2506h2178v2017" svg:viewBox="0 0 2179 2018">
          <text:p/>
        </draw:connector>
        <draw:connector draw:style-name="gr41" draw:text-style-name="P4" draw:layer="layout" svg:x1="8.332cm" svg:y1="5.719cm" svg:x2="8.761cm" svg:y2="5.666cm" draw:start-shape="id113" draw:start-glue-point="4" draw:end-shape="id114" draw:end-glue-point="4" svg:d="M8332 5719h429v-53" svg:viewBox="0 0 430 54">
          <text:p/>
        </draw:connector>
        <draw:frame draw:style-name="gr42" draw:text-style-name="P8" draw:layer="layout" svg:width="1.408cm" svg:height="0.607cm" svg:x="9.182cm" svg:y="4.245cm">
          <draw:text-box>
            <text:p><text:span text:style-name="T3">47</text:span><text:span text:style-name="T3">0u</text:span><text:span text:style-name="T3">F</text:span></text:p>
          </draw:text-box>
        </draw:frame>
        <draw:connector draw:style-name="gr26" draw:text-style-name="P4" draw:layer="layout" draw:line-skew="2.996cm" svg:x1="8.345cm" svg:y1="2.506cm" svg:x2="15.357cm" svg:y2="7.948cm" draw:start-shape="id113" draw:start-glue-point="7" draw:end-shape="id106" draw:end-glue-point="5" svg:d="M8345 2506h10589v5442h-3577" svg:viewBox="0 0 10590 5443">
          <text:p/>
        </draw:connector>
        <draw:connector draw:style-name="gr43" draw:text-style-name="P4" draw:layer="layout" draw:line-skew="-0.573cm 3.104cm" svg:x1="11.925cm" svg:y1="8.043cm" svg:x2="21.776cm" svg:y2="9.724cm" draw:start-shape="id106" draw:start-glue-point="8" draw:end-shape="id103" draw:end-glue-point="0" svg:d="M11925 8043h-1105v1607h10956v74" svg:viewBox="0 0 10957 1682">
          <text:p/>
        </draw:connector>
        <draw:frame draw:style-name="gr17" draw:text-style-name="P6" xml:id="id115" draw:id="id115" draw:layer="layout" svg:width="3.936cm" svg:height="2.426cm" svg:x="21.954cm" svg:y="16.76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6.504cm" svg:y1="13.213cm" svg:x2="25.464cm" svg:y2="18.608cm" draw:start-shape="id108" draw:start-glue-point="7" draw:end-shape="id115" draw:end-glue-point="10" svg:d="M26504 13213v5395h-1040" svg:viewBox="0 0 1041 5396">
          <text:p/>
        </draw:connector>
        <draw:g draw:style-name="gr1" xml:id="id116" draw:id="id116">
          <draw:rect draw:style-name="gr283" draw:text-style-name="P3" draw:layer="layout" svg:width="0.75cm" svg:height="0.25cm" svg:x="20.282cm" svg:y="17.14cm">
            <text:p text:style-name="P2"><text:span text:style-name="T1">1k</text:span></text:p>
          </draw:rect>
          <draw:line draw:style-name="gr284" draw:text-style-name="P1" draw:layer="layout" svg:x1="20.032cm" svg:y1="17.265cm" svg:x2="20.282cm" svg:y2="17.265cm">
            <text:p/>
          </draw:line>
          <draw:line draw:style-name="gr285" draw:text-style-name="P1" draw:layer="layout" svg:x1="21.032cm" svg:y1="17.265cm" svg:x2="21.282cm" svg:y2="17.265cm">
            <text:p/>
          </draw:line>
        </draw:g>
        <draw:g draw:style-name="gr1" xml:id="id117" draw:id="id117">
          <draw:rect draw:style-name="gr286" draw:text-style-name="P3" draw:layer="layout" svg:width="0.75cm" svg:height="0.25cm" svg:x="19.41cm" svg:y="17.428cm">
            <text:p text:style-name="P2"><text:span text:style-name="T1">1k</text:span></text:p>
          </draw:rect>
          <draw:line draw:style-name="gr287" draw:text-style-name="P1" draw:layer="layout" svg:x1="19.16cm" svg:y1="17.553cm" svg:x2="19.41cm" svg:y2="17.553cm">
            <text:p/>
          </draw:line>
          <draw:line draw:style-name="gr288" draw:text-style-name="P1" draw:layer="layout" svg:x1="20.16cm" svg:y1="17.553cm" svg:x2="20.41cm" svg:y2="17.553cm">
            <text:p/>
          </draw:line>
        </draw:g>
        <draw:connector draw:style-name="gr10" draw:text-style-name="P4" draw:layer="layout" svg:x1="21.282cm" svg:y1="17.265cm" svg:x2="22.199cm" svg:y2="17.287cm" draw:start-shape="id116" draw:start-glue-point="1" draw:end-shape="id115" draw:end-glue-point="5" svg:d="M21282 17265h345v22h572" svg:viewBox="0 0 918 23">
          <text:p/>
        </draw:connector>
        <draw:connector draw:style-name="gr10" draw:text-style-name="P4" draw:layer="layout" svg:x1="20.41cm" svg:y1="17.553cm" svg:x2="22.199cm" svg:y2="17.552cm" draw:start-shape="id117" draw:start-glue-point="1" draw:end-shape="id115" draw:end-glue-point="6" svg:d="M20410 17553h781v-1h1008" svg:viewBox="0 0 1790 2">
          <text:p/>
        </draw:connector>
        <draw:connector draw:style-name="gr41" draw:text-style-name="P4" draw:layer="layout" svg:x1="25.979cm" svg:y1="13.213cm" svg:x2="22.185cm" svg:y2="17.049cm" draw:start-shape="id108" draw:start-glue-point="5" draw:end-shape="id115" draw:end-glue-point="4" svg:d="M25979 13213v1836h-4525v2000h731" svg:viewBox="0 0 4526 3837">
          <text:p/>
        </draw:connector>
        <draw:connector draw:style-name="gr41" draw:text-style-name="P4" draw:layer="layout" svg:x1="10.519cm" svg:y1="5.755cm" svg:x2="11.905cm" svg:y2="7.539cm" draw:start-shape="id118" draw:start-glue-point="8" draw:end-shape="id106" draw:end-glue-point="7" svg:d="M10519 5755v1784h1386" svg:viewBox="0 0 1387 1785">
          <text:p/>
        </draw:connector>
        <draw:connector draw:style-name="gr10" draw:text-style-name="P4" draw:layer="layout" svg:x1="20.032cm" svg:y1="17.265cm" svg:x2="14.752cm" svg:y2="14.417cm" draw:start-shape="id116" draw:start-glue-point="3" draw:end-shape="id105" draw:end-glue-point="11" svg:d="M20032 17265h-2343v-2848h-2937" svg:viewBox="0 0 5281 2849">
          <text:p/>
        </draw:connector>
        <draw:connector draw:style-name="gr10" draw:text-style-name="P4" draw:layer="layout" svg:x1="14.712cm" svg:y1="12.158cm" svg:x2="19.16cm" svg:y2="17.553cm" draw:start-shape="id105" draw:start-glue-point="4" draw:end-shape="id117" draw:end-glue-point="3" svg:d="M14712 12158h2541v5395h1907" svg:viewBox="0 0 4449 5396">
          <text:p/>
        </draw:connector>
        <draw:g draw:style-name="gr1" xml:id="id120" draw:id="id120">
          <draw:rect draw:style-name="gr289" draw:text-style-name="P5" draw:layer="layout" svg:width="0.75cm" svg:height="0.289cm" draw:transform="rotate (1.5707963267949) translate (4.592cm 13.712cm)">
            <text:p text:style-name="P2"><text:span text:style-name="T1">2.2k</text:span></text:p>
          </draw:rect>
          <draw:line draw:style-name="gr290" draw:text-style-name="P1" draw:layer="layout" svg:x1="4.736cm" svg:y1="12.71cm" svg:x2="4.736cm" svg:y2="12.96cm">
            <text:p/>
          </draw:line>
          <draw:line draw:style-name="gr291" draw:text-style-name="P1" draw:layer="layout" svg:x1="4.736cm" svg:y1="13.71cm" svg:x2="4.736cm" svg:y2="13.96cm">
            <text:p/>
          </draw:line>
        </draw:g>
        <draw:connector draw:style-name="gr10" draw:text-style-name="P4" draw:layer="layout" svg:x1="4.735cm" svg:y1="9.938cm" svg:x2="6.369cm" svg:y2="12.463cm" draw:start-shape="id119" draw:start-glue-point="4" draw:end-shape="id105" draw:end-glue-point="17" svg:d="M4735 9938v2525h1634" svg:viewBox="0 0 1635 2526">
          <text:p/>
        </draw:connector>
        <draw:connector draw:style-name="gr26" draw:text-style-name="P4" draw:layer="layout" draw:line-skew="0.916cm" svg:x1="4.736cm" svg:y1="13.96cm" svg:x2="2.57cm" svg:y2="14.796cm" draw:start-shape="id120" draw:start-glue-point="2" draw:end-shape="id109" draw:end-glue-point="4" svg:d="M4736 13960v2407h-2166v-1571" svg:viewBox="0 0 2167 2408">
          <text:p/>
        </draw:connector>
        <draw:connector draw:style-name="gr10" draw:text-style-name="P4" draw:layer="layout" svg:x1="4.736cm" svg:y1="12.71cm" svg:x2="4.735cm" svg:y2="9.938cm" draw:start-shape="id120" draw:start-glue-point="0" draw:end-shape="id119" draw:end-glue-point="4" svg:d="M4736 12710v-1349h-1v-1423" svg:viewBox="0 0 2 2773">
          <text:p/>
        </draw:connector>
        <draw:connector draw:style-name="gr53" draw:text-style-name="P4" draw:layer="layout" svg:x1="2.893cm" svg:y1="3.043cm" svg:x2="5.391cm" svg:y2="2.883cm" draw:start-shape="id121" draw:start-glue-point="0" draw:end-shape="id113" draw:end-glue-point="8" svg:d="M2893 3043v-518h1446v358h1052" svg:viewBox="0 0 2499 519">
          <text:p/>
        </draw:connector>
        <draw:connector draw:style-name="gr41" draw:text-style-name="P4" draw:layer="layout" draw:line-skew="-0.214cm 0.523cm" svg:x1="5.415cm" svg:y1="3.905cm" svg:x2="4.243cm" svg:y2="4.192cm" draw:start-shape="id113" draw:start-glue-point="9" draw:end-shape="id122" draw:end-glue-point="4" svg:d="M5415 3905h-760v292h-412v-5" svg:viewBox="0 0 1173 293">
          <text:p/>
        </draw:connector>
        <draw:connector draw:style-name="gr41" draw:text-style-name="P4" draw:layer="layout" draw:line-skew="0.267cm" svg:x1="2.893cm" svg:y1="3.668cm" svg:x2="3.405cm" svg:y2="4.192cm" draw:start-shape="id121" draw:start-glue-point="2" draw:end-shape="id122" draw:end-glue-point="5" svg:d="M2893 3668v529h512v-5" svg:viewBox="0 0 513 530">
          <text:p/>
        </draw:connector>
        <draw:connector draw:style-name="gr41" draw:text-style-name="P4" draw:layer="layout" draw:line-skew="0cm 0.356cm" svg:x1="22.185cm" svg:y1="17.049cm" svg:x2="8.294cm" svg:y2="16.698cm" draw:start-shape="id115" draw:start-glue-point="4" draw:end-shape="id105" draw:end-glue-point="29" svg:d="M22185 17049h-3526v1678h-10365v-2029" svg:viewBox="0 0 13892 2030">
          <text:p/>
        </draw:connector>
        <draw:g draw:style-name="gr1" xml:id="id124" draw:id="id124">
          <draw:circle draw:style-name="gr292" draw:text-style-name="P9" draw:layer="layout" svg:width="1cm" svg:height="1cm" svg:x="14.704cm" svg:y="3.101cm">
            <text:p text:style-name="P2"><text:span text:style-name="T4"><text:s text:c="4"/></text:span><text:span text:style-name="T4">U</text:span></text:p>
          </draw:circle>
          <draw:line draw:style-name="gr293" draw:text-style-name="P10" draw:layer="layout" svg:x1="14.831cm" svg:y1="3.664cm" svg:x2="14.906cm" svg:y2="3.664cm">
            <text:p/>
          </draw:line>
          <draw:line draw:style-name="gr294" draw:text-style-name="P10" draw:layer="layout" svg:x1="14.831cm" svg:y1="3.539cm" svg:x2="15.206cm" svg:y2="3.539cm">
            <text:p/>
          </draw:line>
          <draw:line draw:style-name="gr295" draw:text-style-name="P10" draw:layer="layout" svg:x1="14.981cm" svg:y1="3.664cm" svg:x2="15.056cm" svg:y2="3.664cm">
            <text:p/>
          </draw:line>
          <draw:line draw:style-name="gr296" draw:text-style-name="P10" draw:layer="layout" svg:x1="15.131cm" svg:y1="3.664cm" svg:x2="15.206cm" svg:y2="3.664cm">
            <text:p/>
          </draw:line>
        </draw:g>
        <draw:connector draw:style-name="gr26" draw:text-style-name="P4" xml:id="id128" draw:id="id128" draw:layer="layout" svg:x1="10.523cm" svg:y1="2.506cm" svg:x2="15.204cm" svg:y2="3.101cm" draw:start-shape="id123" draw:start-glue-point="0" draw:end-shape="id124" draw:end-glue-point="0" svg:d="M10523 2506h4681v595" svg:viewBox="0 0 4682 596">
          <text:p/>
        </draw:connector>
        <draw:connector draw:style-name="gr43" draw:text-style-name="P4" draw:layer="layout" draw:line-skew="-0.146cm" svg:x1="14.704cm" svg:y1="3.601cm" svg:x2="8.318cm" svg:y2="4.197cm" draw:start-shape="id124" draw:end-shape="id113" draw:end-glue-point="6" svg:d="M14704 3601h-3334v596h-3052" svg:viewBox="0 0 6387 597">
          <text:p/>
        </draw:connector>
        <draw:g draw:style-name="gr1" xml:id="id125" draw:id="id125">
          <draw:rect draw:style-name="gr297" draw:text-style-name="P3" draw:layer="layout" svg:width="0.75cm" svg:height="0.397cm" svg:x="15.161cm" svg:y="4.63cm">
            <text:p text:style-name="P2"><text:span text:style-name="T1">10k</text:span></text:p>
          </draw:rect>
          <draw:line draw:style-name="gr298" draw:text-style-name="P1" draw:layer="layout" svg:x1="14.911cm" svg:y1="4.829cm" svg:x2="15.161cm" svg:y2="4.829cm">
            <text:p/>
          </draw:line>
          <draw:line draw:style-name="gr299" draw:text-style-name="P1" draw:layer="layout" svg:x1="15.911cm" svg:y1="4.829cm" svg:x2="16.161cm" svg:y2="4.829cm">
            <text:p/>
          </draw:line>
        </draw:g>
        <draw:g draw:style-name="gr1" xml:id="id126" draw:id="id126">
          <draw:rect draw:style-name="gr300" draw:text-style-name="P3" draw:layer="layout" svg:width="0.75cm" svg:height="0.385cm" svg:x="17.429cm" svg:y="4.642cm">
            <text:p text:style-name="P2"><text:span text:style-name="T1">2</text:span><text:span text:style-name="T1">0</text:span><text:span text:style-name="T1">k</text:span></text:p>
          </draw:rect>
          <draw:line draw:style-name="gr301" draw:text-style-name="P1" draw:layer="layout" svg:x1="17.179cm" svg:y1="4.835cm" svg:x2="17.429cm" svg:y2="4.835cm">
            <text:p/>
          </draw:line>
          <draw:line draw:style-name="gr302" draw:text-style-name="P1" draw:layer="layout" svg:x1="18.179cm" svg:y1="4.835cm" svg:x2="18.429cm" svg:y2="4.835cm">
            <text:p/>
          </draw:line>
        </draw:g>
        <draw:connector draw:style-name="gr10" draw:text-style-name="P4" xml:id="id127" draw:id="id127" draw:layer="layout" svg:x1="16.161cm" svg:y1="4.828cm" svg:x2="17.179cm" svg:y2="4.834cm" draw:start-shape="id125" draw:start-glue-point="1" draw:end-shape="id126" draw:end-glue-point="3" svg:d="M16161 4828h509v6h509" svg:viewBox="0 0 1019 7">
          <text:p/>
        </draw:connector>
        <draw:connector draw:style-name="gr10" draw:text-style-name="P4" draw:layer="layout" svg:x1="16.67cm" svg:y1="4.831cm" svg:x2="14.691cm" svg:y2="13.399cm" draw:start-shape="id127" draw:start-glue-point="0" draw:end-shape="id105" draw:end-glue-point="8" svg:d="M16670 4831v8568h-1979" svg:viewBox="0 0 1980 8569">
          <text:p/>
        </draw:connector>
        <draw:connector draw:style-name="gr10" draw:text-style-name="P4" draw:layer="layout" svg:x1="14.704cm" svg:y1="3.601cm" svg:x2="14.911cm" svg:y2="4.828cm" draw:start-shape="id124" draw:start-glue-point="3" draw:end-shape="id125" draw:end-glue-point="3" svg:d="M14704 3601h-518v1227h725" svg:viewBox="0 0 726 1228">
          <text:p/>
        </draw:connector>
        <draw:connector draw:style-name="gr53" draw:text-style-name="P4" draw:layer="layout" svg:x1="18.429cm" svg:y1="4.834cm" svg:x2="15.204cm" svg:y2="2.506cm" draw:start-shape="id126" draw:start-glue-point="1" draw:end-shape="id128" draw:end-glue-point="0" svg:d="M18429 4834h518v-2328h-3743" svg:viewBox="0 0 3744 2329">
          <text:p/>
        </draw:connector>
        <draw:connector draw:style-name="gr41" draw:text-style-name="P4" draw:layer="layout" draw:line-skew="0.284cm" svg:x1="15.362cm" svg:y1="8.221cm" svg:x2="10.602cm" svg:y2="5.672cm" draw:start-shape="id106" draw:start-glue-point="6" draw:end-shape="id118" draw:end-glue-point="10" svg:d="M15362 8221h860v-2549h-5620" svg:viewBox="0 0 5621 2550">
          <text:p/>
        </draw:connector>
        <draw:frame draw:style-name="gr17" draw:text-style-name="P6" xml:id="id129" draw:id="id129" draw:layer="layout" svg:width="2.333cm" svg:height="2.504cm" svg:x="23.893cm" svg:y="5.067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0" draw:text-style-name="P4" draw:layer="layout" svg:x1="23.705cm" svg:y1="11.345cm" svg:x2="24.638cm" svg:y2="7.571cm" draw:start-shape="id104" draw:start-glue-point="1" draw:end-shape="id129" draw:end-glue-point="6" svg:d="M23705 11345h933v-3774" svg:viewBox="0 0 934 3775">
          <text:p/>
        </draw:connector>
        <draw:connector draw:style-name="gr26" draw:text-style-name="P4" draw:layer="layout" draw:line-skew="7.81cm 0.02cm" svg:x1="15.204cm" svg:y1="2.506cm" svg:x2="25.135cm" svg:y2="7.571cm" draw:start-shape="id128" draw:start-glue-point="0" draw:end-shape="id129" draw:end-glue-point="7" svg:d="M15204 2506h12168v5585h-2237v-520" svg:viewBox="0 0 12169 5586">
          <text:p/>
        </draw:connector>
        <draw:connector draw:style-name="gr26" draw:text-style-name="P4" draw:layer="layout" draw:line-skew="7.127cm" svg:x1="15.204cm" svg:y1="2.506cm" svg:x2="26.504cm" svg:y2="13.213cm" draw:start-shape="id128" draw:start-glue-point="0" draw:end-shape="id108" draw:end-glue-point="7" svg:d="M15204 2506h12183v11331h-883v-624" svg:viewBox="0 0 12184 11332">
          <text:p/>
        </draw:connector>
        <draw:connector draw:style-name="gr41" draw:text-style-name="P4" draw:layer="layout" draw:line-skew="3.412cm" svg:x1="15.362cm" svg:y1="8.221cm" svg:x2="25.979cm" svg:y2="13.213cm" draw:start-shape="id106" draw:start-glue-point="6" draw:end-shape="id108" draw:end-glue-point="5" svg:d="M15362 8221h8414v5616h2203v-624" svg:viewBox="0 0 10618 5617">
          <text:p/>
        </draw:connector>
        <draw:connector draw:style-name="gr43" draw:text-style-name="P4" draw:layer="layout" draw:line-skew="0.978cm" svg:x1="21.776cm" svg:y1="9.724cm" svg:x2="24.185cm" svg:y2="7.561cm" draw:start-shape="id103" draw:start-glue-point="0" draw:end-shape="id129" draw:end-glue-point="5" svg:d="M21776 9724v-107h2409v-2056" svg:viewBox="0 0 2410 2164">
          <text:p/>
        </draw:connector>
        <draw:connector draw:style-name="gr43" draw:text-style-name="P4" draw:layer="layout" svg:x1="14.704cm" svg:y1="3.601cm" svg:x2="11.894cm" svg:y2="8.514cm" draw:start-shape="id124" draw:start-glue-point="3" draw:end-shape="id106" draw:end-glue-point="9" svg:d="M14704 3601h-3311v4913h501" svg:viewBox="0 0 3312 4914">
          <text:p/>
        </draw:connector>
        <draw:custom-shape draw:style-name="gr65" draw:text-style-name="P11" draw:layer="layout" svg:width="0.167cm" svg:height="0.167cm" svg:x="11.30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4.129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6.60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xml:id="id118" draw:id="id118" draw:layer="layout" svg:width="0.167cm" svg:height="0.167cm" svg:x="10.43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0.167cm" svg:height="0.167cm" svg:x="16.133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59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5.12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62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1.404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107" draw:id="id107" draw:layer="layout" svg:width="0.154cm" svg:height="0.167cm" svg:x="20.916cm" svg:y="15.4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21.699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5.901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43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7.287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131" draw:id="id131" draw:layer="layout" svg:width="0.167cm" svg:height="0.167cm" svg:x="26.43cm" svg:y="1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17" draw:layer="layout" svg:width="18.278cm" svg:height="0.962cm" svg:x="8.73cm" svg:y="1.178cm">
          <draw:text-box>
            <text:p>Схема часов на ESP32 (30 pin) + матрица на WS2812B</text:p>
          </draw:text-box>
        </draw:frame>
        <draw:connector draw:style-name="gr10" draw:text-style-name="P4" draw:layer="layout" svg:x1="20.721cm" svg:y1="18.5cm" svg:x2="22.004cm" svg:y2="18.358cm" draw:start-shape="id130" draw:start-glue-point="4" svg:d="M20721 18500h930v-142h353" svg:viewBox="0 0 1284 143">
          <text:p/>
        </draw:connector>
        <draw:connector draw:style-name="gr10" draw:text-style-name="P4" draw:layer="layout" svg:x1="20.702cm" svg:y1="19.06cm" svg:x2="22.027cm" svg:y2="18.873cm" draw:start-shape="id130" draw:start-glue-point="5" draw:end-shape="id115" draw:end-glue-point="9" svg:d="M20702 19060h674v-187h651" svg:viewBox="0 0 1326 188">
          <text:p/>
        </draw:connector>
        <draw:custom-shape draw:style-name="gr65" draw:text-style-name="P11" draw:layer="layout" svg:width="0.167cm" svg:height="0.167cm" svg:x="21.69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4.645cm" svg:y="12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3" draw:text-style-name="P14" draw:layer="layout" svg:width="2.962cm" svg:height="0.681cm" svg:x="9.288cm" svg:y="10.579cm">
          <draw:text-box>
            <text:p><text:span text:style-name="T6">E</text:span><text:span text:style-name="T6">S</text:span><text:span text:style-name="T6">P</text:span><text:span text:style-name="T6">3</text:span><text:span text:style-name="T6">2 </text:span><text:span text:style-name="T6">(3</text:span><text:span text:style-name="T6">0 </text:span><text:span text:style-name="T6">pi</text:span><text:span text:style-name="T6">n)</text:span></text:p>
          </draw:text-box>
        </draw:frame>
        <draw:frame draw:style-name="gr71" draw:text-style-name="P14" draw:layer="layout" svg:width="2.886cm" svg:height="1.433cm" svg:x="2.465cm" svg:y="8.184cm">
          <draw:text-box>
            <text:p><text:span text:style-name="T6">Фоторезистор LDR 20k</text:span></text:p>
          </draw:text-box>
        </draw:frame>
        <draw:frame draw:style-name="gr304" draw:text-style-name="P14" draw:layer="layout" svg:width="3.541cm" svg:height="1.041cm" svg:x="1.403cm" svg:y="11.619cm">
          <draw:text-box>
            <text:p><text:span text:style-name="T6">С</text:span><text:span text:style-name="T6">е</text:span><text:span text:style-name="T6">нс</text:span><text:span text:style-name="T6">о</text:span><text:span text:style-name="T6">р</text:span><text:span text:style-name="T6">н</text:span><text:span text:style-name="T6">а</text:span><text:span text:style-name="T6">я </text:span><text:span text:style-name="T6">кн</text:span><text:span text:style-name="T6">о</text:span><text:span text:style-name="T6">пк</text:span><text:span text:style-name="T6">а </text:span><text:span text:style-name="T6">T</text:span><text:span text:style-name="T6">T</text:span><text:span text:style-name="T6">P</text:span><text:span text:style-name="T6">2</text:span><text:span text:style-name="T6">2</text:span><text:span text:style-name="T6">3</text:span><text:span text:style-name="T6">b</text:span></text:p>
          </draw:text-box>
        </draw:frame>
        <draw:frame draw:style-name="gr72" draw:text-style-name="P14" draw:layer="layout" svg:width="4.618cm" svg:height="0.645cm" svg:x="11.536cm" svg:y="6.532cm">
          <draw:text-box>
            <text:p><text:span text:style-name="T6">М</text:span><text:span text:style-name="T6">о</text:span><text:span text:style-name="T6">д</text:span><text:span text:style-name="T6">у</text:span><text:span text:style-name="T6">л</text:span><text:span text:style-name="T6">ь </text:span><text:span text:style-name="T6">р</text:span><text:span text:style-name="T6">е</text:span><text:span text:style-name="T6">л</text:span><text:span text:style-name="T6">е </text:span><text:span text:style-name="T6">5</text:span><text:span text:style-name="T6">В </text:span><text:span text:style-name="T6">H</text:span><text:span text:style-name="T6">ig</text:span><text:span text:style-name="T6">h </text:span><text:span text:style-name="T6">L</text:span><text:span text:style-name="T6">vl</text:span></text:p>
          </draw:text-box>
        </draw:frame>
        <draw:frame draw:style-name="gr72" draw:text-style-name="P14" draw:layer="layout" svg:width="4.503cm" svg:height="0.645cm" svg:x="4.282cm" svg:y="1.799cm">
          <draw:text-box>
            <text:p><text:span text:style-name="T6"><text:s/></text:span><text:span text:style-name="T6">Мод</text:span><text:span text:style-name="T6">уль </text:span><text:span text:style-name="T6">заря</text:span><text:span text:style-name="T6">да </text:span><text:span text:style-name="T6">J501</text:span><text:span text:style-name="T6">9</text:span></text:p>
          </draw:text-box>
        </draw:frame>
        <draw:frame draw:style-name="gr72" draw:text-style-name="P14" draw:layer="layout" svg:width="4.579cm" svg:height="0.645cm" svg:x="22.544cm" svg:y="4.455cm">
          <draw:text-box>
            <text:p><text:span text:style-name="T6">Матрица WS2812B 32x8</text:span></text:p>
          </draw:text-box>
        </draw:frame>
        <draw:frame draw:style-name="gr72" draw:text-style-name="P14" draw:layer="layout" svg:width="2.576cm" svg:height="0.645cm" svg:x="22.651cm" svg:y="19.045cm">
          <draw:text-box>
            <text:p><text:span text:style-name="T6">MP3-TF-16P</text:span></text:p>
          </draw:text-box>
        </draw:frame>
        <draw:frame draw:style-name="gr70" draw:text-style-name="P14" draw:layer="layout" svg:width="2.751cm" svg:height="1.039cm" svg:x="15.808cm" svg:y="2.906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7" draw:text-style-name="P4" draw:layer="layout" svg:x1="4.498cm" svg:y1="9.93cm" svg:x2="3.33cm" svg:y2="14.807cm" draw:start-shape="id119" draw:start-glue-point="5" draw:end-shape="id109" draw:end-glue-point="6" svg:d="M4498 9930v5521h-1168v-644" svg:viewBox="0 0 1169 5522">
          <text:p/>
        </draw:connector>
        <draw:frame draw:style-name="gr71" draw:text-style-name="P14" draw:layer="layout" svg:width="2.857cm" svg:height="1.433cm" svg:x="25.018cm" svg:y="8.268cm">
          <draw:text-box>
            <text:p><text:span text:style-name="T6">Датчик движения</text:span></text:p>
            <text:p><text:span text:style-name="T6">RCWL-0516</text:span></text:p>
          </draw:text-box>
        </draw:frame>
        <draw:g draw:style-name="gr73">
          <draw:g draw:style-name="gr73" xml:id="id122" draw:id="id122">
            <draw:glue-point draw:id="4" svg:x="-0.086cm" svg:y="-0.158cm" draw:align="right"/>
            <draw:glue-point draw:id="5" svg:x="-4.24cm" svg:y="-5.015cm"/>
            <draw:g draw:style-name="gr1">
              <draw:line draw:style-name="gr305" draw:text-style-name="P1" draw:layer="layout" svg:x1="4.329cm" svg:y1="4.192cm" svg:x2="4.079cm" svg:y2="4.192cm">
                <text:p/>
              </draw:line>
              <draw:line draw:style-name="gr306" draw:text-style-name="P1" draw:layer="layout" svg:x1="4.136cm" svg:y1="4.47cm" svg:x2="3.579cm" svg:y2="4.192cm">
                <text:p/>
              </draw:line>
              <draw:line draw:style-name="gr307" draw:text-style-name="P1" draw:layer="layout" svg:x1="3.579cm" svg:y1="4.192cm" svg:x2="3.329cm" svg:y2="4.192cm">
                <text:p/>
              </draw:line>
            </draw:g>
            <draw:line draw:style-name="gr308" draw:text-style-name="P1" draw:layer="layout" svg:x1="4.079cm" svg:y1="4.192cm" svg:x2="4.079cm" svg:y2="4.509cm">
              <text:p/>
            </draw:line>
          </draw:g>
          <draw:g draw:style-name="gr1">
            <draw:line draw:style-name="gr309" draw:text-style-name="P1" draw:layer="layout" svg:x1="3.826cm" svg:y1="4.303cm" svg:x2="3.826cm" svg:y2="3.928cm">
              <text:p/>
            </draw:line>
            <draw:line draw:style-name="gr310" draw:text-style-name="P1" draw:layer="layout" svg:x1="3.951cm" svg:y1="3.928cm" svg:x2="3.701cm" svg:y2="3.928cm">
              <text:p/>
            </draw:line>
          </draw:g>
          <draw:line draw:style-name="gr311" draw:text-style-name="P1" draw:layer="layout" svg:x1="3.699cm" svg:y1="4.055cm" svg:x2="3.699cm" svg:y2="3.93cm">
            <text:p/>
          </draw:line>
          <draw:line draw:style-name="gr312" draw:text-style-name="P1" draw:layer="layout" svg:x1="3.949cm" svg:y1="3.93cm" svg:x2="3.949cm" svg:y2="4.055cm">
            <text:p/>
          </draw:line>
        </draw:g>
        <draw:custom-shape draw:style-name="gr68" draw:text-style-name="P4" draw:layer="layout" svg:width="0.167cm" svg:height="0.167cm" svg:x="10.443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5" draw:layer="layout" svg:width="1.499cm" svg:height="0.887cm" svg:x="2.862cm" svg:y="2.517cm">
          <draw:text-box>
            <text:p><text:span text:style-name="T7">Li-Ion</text:span></text:p>
            <text:p><text:span text:style-name="T7">18650</text:span></text:p>
          </draw:text-box>
        </draw:frame>
        <draw:custom-shape draw:style-name="gr83" draw:text-style-name="P6" draw:layer="layout" svg:width="1.428cm" svg:height="1.428cm" svg:x="20.148cm" svg:y="11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4" draw:layer="layout" svg:width="1.887cm" svg:height="0.645cm" svg:x="19.636cm" svg:y="11.179cm">
          <draw:text-box>
            <text:p><text:span text:style-name="T6">BC557</text:span></text:p>
          </draw:text-box>
        </draw:frame>
        <draw:custom-shape draw:style-name="gr84" draw:text-style-name="P16" draw:layer="layout" svg:width="0.167cm" svg:height="0.167cm" svg:x="3.273cm" svg:y="1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130" draw:id="id130" draw:layer="layout" svg:width="1.899cm" svg:height="1.823cm" svg:x="18.898cm" svg:y="17.893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3">
          <draw:g draw:style-name="gr1" xml:id="id121" draw:id="id121">
            <draw:line draw:style-name="gr313" draw:text-style-name="P1" draw:layer="layout" svg:x1="3.018cm" svg:y1="3.293cm" svg:x2="2.768cm" svg:y2="3.293cm">
              <text:p/>
            </draw:line>
            <draw:line draw:style-name="gr314" draw:text-style-name="P1" draw:layer="layout" svg:x1="3.268cm" svg:y1="3.418cm" svg:x2="2.518cm" svg:y2="3.418cm">
              <text:p/>
            </draw:line>
            <draw:line draw:style-name="gr315" draw:text-style-name="P1" draw:layer="layout" svg:x1="2.893cm" svg:y1="3.293cm" svg:x2="2.893cm" svg:y2="3.043cm">
              <text:p/>
            </draw:line>
            <draw:line draw:style-name="gr316" draw:text-style-name="P1" draw:layer="layout" svg:x1="2.893cm" svg:y1="3.418cm" svg:x2="2.893cm" svg:y2="3.668cm">
              <text:p/>
            </draw:line>
          </draw:g>
          <draw:frame draw:style-name="gr89" draw:text-style-name="P15" draw:layer="layout" svg:width="0.376cm" svg:height="0.569cm" svg:x="2.438cm" svg:y="3.345cm">
            <draw:text-box>
              <text:p><text:span text:style-name="T7">+</text:span></text:p>
            </draw:text-box>
          </draw:frame>
        </draw:g>
        <draw:frame draw:style-name="gr72" draw:text-style-name="P14" draw:layer="layout" svg:width="0.201cm" svg:height="0.645cm" svg:x="14.979cm" svg:y="2.676cm">
          <draw:text-box>
            <text:p><text:span text:style-name="T6">-</text:span></text:p>
          </draw:text-box>
        </draw:frame>
        <draw:frame draw:style-name="gr72" draw:text-style-name="P14" draw:layer="layout" svg:width="0.365cm" svg:height="0.645cm" svg:x="14.396cm" svg:y="3.095cm">
          <draw:text-box>
            <text:p><text:span text:style-name="T6">+</text:span></text:p>
          </draw:text-box>
        </draw:frame>
        <draw:frame draw:style-name="gr90" draw:text-style-name="P15" draw:layer="layout" svg:width="2.117cm" svg:height="0.74cm" svg:x="3.214cm" svg:y="3.382cm">
          <draw:text-box>
            <text:p><text:span text:style-name="T7">«reset»</text:span></text:p>
          </draw:text-box>
        </draw:frame>
        <draw:g draw:style-name="gr1">
          <draw:line draw:style-name="gr317" draw:text-style-name="P1" draw:layer="layout" svg:x1="26.187cm" svg:y1="14.773cm" svg:x2="26.187cm" svg:y2="15.273cm">
            <text:p/>
          </draw:line>
          <draw:line draw:style-name="gr318" draw:text-style-name="P1" draw:layer="layout" svg:x1="26.312cm" svg:y1="14.773cm" svg:x2="26.312cm" svg:y2="15.273cm">
            <text:p/>
          </draw:line>
          <draw:line draw:style-name="gr319" draw:text-style-name="P1" draw:layer="layout" svg:x1="26.187cm" svg:y1="15.023cm" svg:x2="25.937cm" svg:y2="15.023cm">
            <text:p/>
          </draw:line>
          <draw:line draw:style-name="gr320" draw:text-style-name="P1" draw:layer="layout" svg:x1="26.312cm" svg:y1="15.023cm" svg:x2="26.562cm" svg:y2="15.023cm">
            <text:p/>
          </draw:line>
        </draw:g>
        <draw:frame draw:style-name="gr95" draw:text-style-name="P15" draw:layer="layout" svg:width="1.234cm" svg:height="0.569cm" svg:x="25.421cm" svg:y="15.288cm">
          <draw:text-box>
            <text:p><text:span text:style-name="T7">47nF</text:span></text:p>
          </draw:text-box>
        </draw:frame>
        <draw:connector draw:style-name="gr26" draw:text-style-name="P4" draw:layer="layout" svg:x1="20.703cm" svg:y1="14.764cm" svg:x2="20.994cm" svg:y2="15.49cm" draw:start-shape="id111" draw:start-glue-point="1" draw:end-shape="id107" draw:end-glue-point="4" svg:d="M20703 14764h291v726" svg:viewBox="0 0 292 727">
          <text:p/>
        </draw:connector>
        <draw:connector draw:style-name="gr26" draw:text-style-name="P4" draw:layer="layout" svg:x1="26.454cm" svg:y1="16.541cm" svg:x2="21.07cm" svg:y2="15.574cm" draw:start-shape="id131" draw:start-glue-point="7" draw:end-shape="id107" draw:end-glue-point="6" svg:d="M26454 16541h-2704v-967h-2680" svg:viewBox="0 0 5385 968">
          <text:p/>
        </draw:connector>
        <draw:connector draw:style-name="gr26" draw:text-style-name="P4" draw:layer="layout" draw:line-skew="0cm -1.998cm" svg:x1="20.916cm" svg:y1="15.574cm" svg:x2="13.583cm" svg:y2="16.327cm" draw:start-shape="id107" draw:start-glue-point="10" draw:end-shape="id105" draw:end-glue-point="30" svg:d="M20916 15574h-2777v799h-4556v-46" svg:viewBox="0 0 7334 800">
          <text:p/>
        </draw:connector>
        <draw:connector draw:style-name="gr242" draw:text-style-name="P4" draw:layer="layout" draw:line-skew="-0.348cm" svg:x1="3.33cm" svg:y1="14.807cm" svg:x2="13.566cm" svg:y2="16.698cm" draw:start-shape="id109" draw:start-glue-point="6" draw:end-shape="id105" draw:end-glue-point="31" svg:d="M3330 14807v3216h10236v-1325" svg:viewBox="0 0 10237 3217">
          <text:p/>
        </draw:connector>
        <draw:custom-shape draw:style-name="gr321" draw:text-style-name="P24" draw:layer="layout" svg:width="0.154cm" svg:height="0.167cm" svg:x="4.66cm" svg:y="16.2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Звичайний">
        <draw:frame draw:style-name="gr17" draw:text-style-name="P6" xml:id="id136" draw:id="id136" draw:layer="layout" svg:width="9.728cm" svg:height="6.566cm" svg:x="7.427cm" svg:y="11.296cm">
          <draw:image xlink:href="Pictures/100000010000029F000001C5868357A6.png" xlink:type="simple" xlink:show="embed" xlink:actuate="onLoad" draw:mime-type="image/png">
            <text:p/>
          </draw:image>
          <draw:glue-point draw:id="4" svg:x="4.33cm" svg:y="-3.702cm"/>
          <draw:glue-point draw:id="5" svg:x="4.351cm" svg:y="-3.237cm"/>
          <draw:glue-point draw:id="6" svg:x="4.351cm" svg:y="-2.741cm"/>
          <draw:glue-point draw:id="7" svg:x="4.309cm" svg:y="-2.153cm"/>
          <draw:glue-point draw:id="8" svg:x="4.309cm" svg:y="-1.812cm"/>
          <draw:glue-point draw:id="9" svg:x="4.371cm" svg:y="-1.192cm"/>
          <draw:glue-point draw:id="10" svg:x="4.351cm" svg:y="-0.665cm"/>
          <draw:glue-point draw:id="11" svg:x="4.371cm" svg:y="-0.261cm"/>
          <draw:glue-point draw:id="12" svg:x="4.351cm" svg:y="0.265cm"/>
          <draw:glue-point draw:id="13" svg:x="4.351cm" svg:y="0.729cm"/>
          <draw:glue-point draw:id="14" svg:x="4.937cm" svg:y="1.256cm"/>
          <draw:glue-point draw:id="15" svg:x="4.957cm" svg:y="1.752cm"/>
          <draw:glue-point draw:id="16" svg:x="5cm" svg:y="2.187cm"/>
          <draw:glue-point draw:id="17" svg:x="-4.247cm" svg:y="-3.237cm"/>
          <draw:glue-point draw:id="18" svg:x="-4.1cm" svg:y="0.205cm"/>
          <draw:glue-point draw:id="19" svg:x="-4.082cm" svg:y="-0.304cm"/>
          <draw:glue-point draw:id="20" svg:x="-4.97cm" svg:y="-0.787cm"/>
          <draw:glue-point draw:id="21" svg:x="-4.952cm" svg:y="-1.271cm"/>
          <draw:glue-point draw:id="22" svg:x="-4.118cm" svg:y="-1.781cm"/>
          <draw:glue-point draw:id="23" svg:x="-4.082cm" svg:y="-2.238cm"/>
          <draw:glue-point draw:id="24" svg:x="-4.082cm" svg:y="0.796cm"/>
          <draw:glue-point draw:id="25" svg:x="-4.934cm" svg:y="1.253cm"/>
          <draw:glue-point draw:id="26" svg:x="-4.97cm" svg:y="1.71cm"/>
          <draw:glue-point draw:id="27" svg:x="-4.952cm" svg:y="2.22cm"/>
          <draw:glue-point draw:id="28" svg:x="-2.268cm" svg:y="2.65cm"/>
          <draw:glue-point draw:id="29" svg:x="-2.268cm" svg:y="3.215cm"/>
          <draw:glue-point draw:id="30" svg:x="3.17cm" svg:y="2.65cm"/>
          <draw:glue-point draw:id="31" svg:x="3.152cm" svg:y="3.215cm"/>
        </draw:frame>
        <draw:g draw:style-name="gr1" xml:id="id133" draw:id="id133">
          <draw:glue-point draw:id="4" svg:x="4.675cm" svg:y="5cm"/>
          <draw:glue-point draw:id="5" svg:x="5cm" svg:y="-4.832cm"/>
          <draw:line draw:style-name="gr322" draw:text-style-name="P1" draw:layer="layout" svg:x1="21.355cm" svg:y1="12.604cm" svg:x2="21.388cm" svg:y2="11.605cm">
            <text:p/>
          </draw:line>
          <draw:line draw:style-name="gr323" draw:text-style-name="P1" draw:layer="layout" svg:x1="21.855cm" svg:y1="12.622cm" svg:x2="21.364cm" svg:y2="12.355cm">
            <text:p/>
          </draw:line>
          <draw:line draw:style-name="gr324" draw:text-style-name="P1" draw:layer="layout" svg:x1="21.634cm" svg:y1="11.739cm" svg:x2="21.38cm" svg:y2="11.856cm">
            <text:p/>
          </draw:line>
          <draw:line draw:style-name="gr325" draw:text-style-name="P1" draw:layer="layout" svg:x1="21.372cm" svg:y1="12.105cm" svg:x2="20.872cm" svg:y2="12.088cm">
            <text:p/>
          </draw:line>
          <draw:line draw:style-name="gr326" draw:text-style-name="P1" draw:layer="layout" svg:x1="21.634cm" svg:y1="11.739cm" svg:x2="21.888cm" svg:y2="11.622cm">
            <text:p/>
          </draw:line>
        </draw:g>
        <draw:g draw:style-name="gr1" xml:id="id132" draw:id="id132">
          <draw:rect draw:style-name="gr327" draw:text-style-name="P3" draw:layer="layout" svg:width="0.902cm" svg:height="0.423cm" svg:x="19.412cm" svg:y="11.912cm">
            <text:p text:style-name="P2"><text:span text:style-name="T1">3.3</text:span><text:span text:style-name="T1">k</text:span></text:p>
          </draw:rect>
          <draw:line draw:style-name="gr328" draw:text-style-name="P1" draw:layer="layout" svg:x1="19.111cm" svg:y1="12.124cm" svg:x2="19.412cm" svg:y2="12.124cm">
            <text:p/>
          </draw:line>
          <draw:line draw:style-name="gr329" draw:text-style-name="P1" draw:layer="layout" svg:x1="20.314cm" svg:y1="12.124cm" svg:x2="20.615cm" svg:y2="12.124cm">
            <text:p/>
          </draw:line>
        </draw:g>
        <draw:connector draw:style-name="gr10" draw:text-style-name="P4" draw:layer="layout" svg:x1="20.615cm" svg:y1="12.123cm" svg:x2="20.872cm" svg:y2="12.113cm" draw:start-shape="id132" draw:start-glue-point="1" draw:end-shape="id133" draw:end-glue-point="3" svg:d="M20615 12123h129v-10h128" svg:viewBox="0 0 258 11">
          <text:p/>
        </draw:connector>
        <draw:g draw:style-name="gr1" xml:id="id135" draw:id="id135">
          <draw:rect draw:style-name="gr330" draw:text-style-name="P3" draw:layer="layout" svg:width="0.75cm" svg:height="0.371cm" svg:x="23.543cm" svg:y="11.151cm">
            <text:p text:style-name="P2"><text:span text:style-name="T1">470</text:span></text:p>
          </draw:rect>
          <draw:line draw:style-name="gr331" draw:text-style-name="P1" draw:layer="layout" svg:x1="23.293cm" svg:y1="11.337cm" svg:x2="23.543cm" svg:y2="11.337cm">
            <text:p/>
          </draw:line>
          <draw:line draw:style-name="gr332" draw:text-style-name="P1" draw:layer="layout" svg:x1="24.293cm" svg:y1="11.337cm" svg:x2="24.543cm" svg:y2="11.337cm">
            <text:p/>
          </draw:line>
        </draw:g>
        <draw:g draw:style-name="gr1" xml:id="id134" draw:id="id134">
          <draw:rect draw:style-name="gr333" draw:text-style-name="P5" draw:layer="layout" svg:width="0.75cm" svg:height="0.368cm" draw:transform="rotate (1.5707963267949) translate (22.43cm 10.715cm)">
            <text:p text:style-name="P2"><text:span text:style-name="T2">1k</text:span></text:p>
          </draw:rect>
          <draw:line draw:style-name="gr334" draw:text-style-name="P1" draw:layer="layout" svg:x1="22.611cm" svg:y1="10.966cm" svg:x2="22.611cm" svg:y2="10.716cm">
            <text:p/>
          </draw:line>
          <draw:line draw:style-name="gr335" draw:text-style-name="P1" draw:layer="layout" svg:x1="22.611cm" svg:y1="9.965cm" svg:x2="22.611cm" svg:y2="9.715cm">
            <text:p/>
          </draw:line>
        </draw:g>
        <draw:connector draw:style-name="gr10" draw:text-style-name="P4" draw:layer="layout" svg:x1="21.888cm" svg:y1="11.622cm" svg:x2="22.614cm" svg:y2="10.966cm" draw:start-shape="id133" draw:start-glue-point="5" draw:end-shape="id134" draw:end-glue-point="2" svg:d="M21888 11622h726v-656" svg:viewBox="0 0 727 657">
          <text:p/>
        </draw:connector>
        <draw:connector draw:style-name="gr10" draw:text-style-name="P4" draw:layer="layout" svg:x1="21.888cm" svg:y1="11.622cm" svg:x2="23.293cm" svg:y2="11.336cm" draw:start-shape="id133" draw:start-glue-point="5" draw:end-shape="id135" draw:end-glue-point="3" svg:d="M21888 11622h703v-286h702" svg:viewBox="0 0 1406 287">
          <text:p/>
        </draw:connector>
        <draw:frame draw:style-name="gr17" draw:text-style-name="P6" xml:id="id137" draw:id="id137" draw:layer="layout" svg:width="3.545cm" svg:height="1.877cm" svg:x="12.672cm" svg:y="6.47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139" draw:id="id139" draw:layer="layout" svg:width="3.763cm" svg:height="1.866cm" draw:transform="rotate (-1.56713113536571) translate (27.993cm 9.558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140" draw:id="id140" draw:layer="layout" svg:width="2.163cm" svg:height="1.612cm" draw:transform="rotate (1.5707963267949) translate (4.316cm 15.414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141" draw:id="id141">
          <draw:glue-point draw:id="4" svg:x="-5cm" svg:y="3.008cm"/>
          <draw:glue-point draw:id="5" svg:x="5cm" svg:y="3.008cm"/>
          <draw:line draw:style-name="gr336" draw:text-style-name="P1" draw:layer="layout" svg:x1="19.422cm" svg:y1="13.474cm" svg:x2="19.422cm" svg:y2="13.724cm">
            <text:p/>
          </draw:line>
          <draw:line draw:style-name="gr337" draw:text-style-name="P1" draw:layer="layout" svg:x1="19.672cm" svg:y1="13.599cm" svg:x2="19.422cm" svg:y2="13.474cm">
            <text:p/>
          </draw:line>
          <draw:line draw:style-name="gr338" draw:text-style-name="P1" draw:layer="layout" svg:x1="19.422cm" svg:y1="13.724cm" svg:x2="19.672cm" svg:y2="13.599cm">
            <text:p/>
          </draw:line>
          <draw:line draw:style-name="gr339" draw:text-style-name="P1" draw:layer="layout" svg:x1="20.047cm" svg:y1="13.599cm" svg:x2="19.047cm" svg:y2="13.599cm">
            <text:p/>
          </draw:line>
          <draw:line draw:style-name="gr340" draw:text-style-name="P1" draw:layer="layout" svg:x1="19.672cm" svg:y1="13.474cm" svg:x2="19.672cm" svg:y2="13.724cm">
            <text:p/>
          </draw:line>
          <draw:line draw:style-name="gr341" draw:text-style-name="P1" draw:layer="layout" svg:x1="19.672cm" svg:y1="13.349cm" svg:x2="19.922cm" svg:y2="13.099cm">
            <text:p/>
          </draw:line>
          <draw:line draw:style-name="gr342" draw:text-style-name="P1" draw:layer="layout" svg:x1="19.797cm" svg:y1="13.474cm" svg:x2="20.047cm" svg:y2="13.224cm">
            <text:p/>
          </draw:line>
        </draw:g>
        <draw:frame draw:style-name="gr17" draw:text-style-name="P6" xml:id="id149" draw:id="id149" draw:layer="layout" svg:width="1.137cm" svg:height="1cm" draw:transform="rotate (-1.5707963267949) translate (6.859cm 10.88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0" draw:text-style-name="P4" draw:layer="layout" svg:x1="16.503cm" svg:y1="12.149cm" svg:x2="19.111cm" svg:y2="12.123cm" draw:start-shape="id136" draw:start-glue-point="4" draw:end-shape="id132" draw:end-glue-point="3" svg:d="M16503 12149h1621v-26h987" svg:viewBox="0 0 2609 27">
          <text:p/>
        </draw:connector>
        <draw:connector draw:style-name="gr10" draw:text-style-name="P4" draw:layer="layout" draw:line-skew="0cm -0.261cm 0.217cm" svg:x1="16.136cm" svg:y1="7.14cm" svg:x2="8.303cm" svg:y2="14.713cm" draw:start-shape="id137" draw:start-glue-point="4" draw:end-shape="id136" draw:end-glue-point="18" svg:d="M16136 7140h581v2425h-9573v5148h1159" svg:viewBox="0 0 9574 7574">
          <text:p/>
        </draw:connector>
        <draw:connector draw:style-name="gr25" draw:text-style-name="P4" draw:layer="layout" draw:line-skew="-0.575cm -0.568cm -0.606cm" svg:x1="21.832cm" svg:y1="15.648cm" svg:x2="21.854cm" svg:y2="12.621cm" draw:start-shape="id138" draw:start-glue-point="8" draw:end-shape="id133" draw:end-glue-point="4" svg:d="M21832 15648v-74h9v-2120h13v-833" svg:viewBox="0 0 23 3028">
          <text:p/>
        </draw:connector>
        <draw:connector draw:style-name="gr10" draw:text-style-name="P4" draw:layer="layout" svg:x1="16.523cm" svg:y1="14.143cm" svg:x2="27.08cm" svg:y2="13.213cm" draw:start-shape="id136" draw:start-glue-point="10" draw:end-shape="id139" draw:end-glue-point="6" svg:d="M16523 14143h10557v-930" svg:viewBox="0 0 10558 931">
          <text:p/>
        </draw:connector>
        <draw:connector draw:style-name="gr26" draw:text-style-name="P4" draw:layer="layout" draw:line-skew="-2.08cm" svg:x1="4.683cm" svg:y1="15.259cm" svg:x2="10.085cm" svg:y2="16.318cm" draw:start-shape="id140" draw:start-glue-point="4" draw:end-shape="id136" draw:end-glue-point="28" svg:d="M4683 15259v1023h5402v36" svg:viewBox="0 0 5403 1060">
          <text:p/>
        </draw:connector>
        <draw:connector draw:style-name="gr10" draw:text-style-name="P4" draw:layer="layout" draw:line-skew="0cm -0.133cm" svg:x1="5.064cm" svg:y1="15.27cm" svg:x2="16.543cm" svg:y2="13.797cm" draw:start-shape="id140" draw:start-glue-point="5" draw:end-shape="id136" draw:end-glue-point="9" svg:d="M5064 15270v3092h12458v-4565h-979" svg:viewBox="0 0 12459 4566">
          <text:p/>
        </draw:connector>
        <draw:connector draw:style-name="gr10" draw:text-style-name="P4" draw:layer="layout" draw:line-skew="0.964cm" svg:x1="19.047cm" svg:y1="13.599cm" svg:x2="17.093cm" svg:y2="15.403cm" draw:start-shape="id141" draw:start-glue-point="4" draw:end-shape="id136" draw:end-glue-point="14" svg:d="M19047 13599h9v1804h-1963" svg:viewBox="0 0 1964 1805">
          <text:p/>
        </draw:connector>
        <draw:g draw:style-name="gr1" xml:id="id160" draw:id="id160">
          <draw:rect draw:style-name="gr343" draw:text-style-name="P3" draw:layer="layout" svg:width="0.75cm" svg:height="0.37cm" svg:x="20.461cm" svg:y="13.406cm">
            <text:p text:style-name="P2"><text:span text:style-name="T1">220</text:span></text:p>
          </draw:rect>
          <draw:line draw:style-name="gr344" draw:text-style-name="P1" draw:layer="layout" svg:x1="20.211cm" svg:y1="13.591cm" svg:x2="20.461cm" svg:y2="13.591cm">
            <text:p/>
          </draw:line>
          <draw:line draw:style-name="gr345" draw:text-style-name="P1" draw:layer="layout" svg:x1="21.211cm" svg:y1="13.591cm" svg:x2="21.461cm" svg:y2="13.591cm">
            <text:p/>
          </draw:line>
        </draw:g>
        <draw:frame draw:style-name="gr17" draw:text-style-name="P6" xml:id="id143" draw:id="id143" draw:layer="layout" svg:width="3.686cm" svg:height="2.954cm" draw:transform="rotate (1.5707963267949) translate (6.229cm 5.985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44" draw:id="id144">
          <draw:glue-point draw:id="4" svg:x="-5cm" svg:y="5.04cm"/>
          <draw:glue-point draw:id="5" svg:x="5cm" svg:y="5.04cm"/>
          <draw:line draw:style-name="gr346" draw:text-style-name="P1" draw:layer="layout" svg:x1="9.599cm" svg:y1="5.656cm" svg:x2="9.849cm" svg:y2="5.656cm">
            <text:p/>
          </draw:line>
          <draw:line draw:style-name="gr347" draw:text-style-name="P1" draw:layer="layout" svg:x1="10.599cm" svg:y1="5.656cm" svg:x2="10.849cm" svg:y2="5.656cm">
            <text:p/>
          </draw:line>
          <draw:path draw:style-name="gr348" draw:text-style-name="P5" draw:layer="layout" svg:width="0.187cm" svg:height="0.123cm" svg:x="9.849cm" svg:y="5.532cm" svg:viewBox="0 0 188 124" svg:d="M0 124c94-279 188 0 188 0">
            <text:p/>
          </draw:path>
          <draw:path draw:style-name="gr349" draw:text-style-name="P5" draw:layer="layout" svg:width="0.187cm" svg:height="0.123cm" svg:x="10.038cm" svg:y="5.533cm" svg:viewBox="0 0 188 124" svg:d="M0 124c94-279 188 0 188 0">
            <text:p/>
          </draw:path>
          <draw:path draw:style-name="gr350" draw:text-style-name="P5" draw:layer="layout" svg:width="0.187cm" svg:height="0.123cm" svg:x="10.226cm" svg:y="5.532cm" svg:viewBox="0 0 188 124" svg:d="M0 124c94-279 188 0 188 0">
            <text:p/>
          </draw:path>
          <draw:path draw:style-name="gr351" draw:text-style-name="P5" draw:layer="layout" svg:width="0.187cm" svg:height="0.123cm" svg:x="10.412cm" svg:y="5.532cm" svg:viewBox="0 0 188 124" svg:d="M0 124c94-279 188 0 188 0">
            <text:p/>
          </draw:path>
        </draw:g>
        <draw:g draw:style-name="gr1" xml:id="id142" draw:id="id142">
          <draw:line draw:style-name="gr352" draw:text-style-name="P1" draw:layer="layout" svg:x1="11.111cm" svg:y1="4.889cm" svg:x2="11.611cm" svg:y2="4.889cm">
            <text:p/>
          </draw:line>
          <draw:line draw:style-name="gr353" draw:text-style-name="P1" draw:layer="layout" svg:x1="11.111cm" svg:y1="4.764cm" svg:x2="11.611cm" svg:y2="4.764cm">
            <text:p/>
          </draw:line>
          <draw:line draw:style-name="gr354" draw:text-style-name="P7" draw:layer="layout" svg:x1="11.361cm" svg:y1="4.889cm" svg:x2="11.361cm" svg:y2="5.139cm">
            <text:p text:style-name="P2"><text:span text:style-name="T1"/></text:p>
            <text:p text:style-name="P2"><text:span text:style-name="T1">+</text:span></text:p>
          </draw:line>
          <draw:line draw:style-name="gr355" draw:text-style-name="P1" draw:layer="layout" svg:x1="11.361cm" svg:y1="4.764cm" svg:x2="11.361cm" svg:y2="4.514cm">
            <text:p/>
          </draw:line>
        </draw:g>
        <draw:connector draw:style-name="gr41" draw:text-style-name="P4" draw:layer="layout" svg:x1="10.891cm" svg:y1="5.688cm" svg:x2="11.361cm" svg:y2="5.139cm" draw:end-shape="id142" draw:end-glue-point="2" svg:d="M10891 5688v-15h470v-534" svg:viewBox="0 0 471 550">
          <text:p/>
        </draw:connector>
        <draw:connector draw:style-name="gr26" draw:text-style-name="P4" xml:id="id153" draw:id="id153" draw:layer="layout" svg:x1="9.183cm" svg:y1="2.497cm" svg:x2="11.361cm" svg:y2="4.514cm" draw:start-shape="id143" draw:start-glue-point="7" draw:end-shape="id142" draw:end-glue-point="0" svg:d="M9183 2497h2178v2017" svg:viewBox="0 0 2179 2018">
          <text:p/>
        </draw:connector>
        <draw:connector draw:style-name="gr41" draw:text-style-name="P4" draw:layer="layout" svg:x1="9.17cm" svg:y1="5.71cm" svg:x2="9.599cm" svg:y2="5.657cm" draw:start-shape="id143" draw:start-glue-point="4" draw:end-shape="id144" draw:end-glue-point="4" svg:d="M9170 5710h429v-53" svg:viewBox="0 0 430 54">
          <text:p/>
        </draw:connector>
        <draw:frame draw:style-name="gr42" draw:text-style-name="P8" draw:layer="layout" svg:width="1.408cm" svg:height="0.607cm" svg:x="10.02cm" svg:y="4.236cm">
          <draw:text-box>
            <text:p text:style-name="P20"><text:span text:style-name="T3">470uF</text:span></text:p>
          </draw:text-box>
        </draw:frame>
        <draw:connector draw:style-name="gr26" draw:text-style-name="P4" draw:layer="layout" draw:line-skew="4.889cm" svg:x1="9.183cm" svg:y1="2.497cm" svg:x2="16.136cm" svg:y2="7.38cm" draw:start-shape="id143" draw:start-glue-point="7" draw:end-shape="id137" draw:end-glue-point="5" svg:d="M9183 2497h12423v4883h-5470" svg:viewBox="0 0 12424 4884">
          <text:p/>
        </draw:connector>
        <draw:connector draw:style-name="gr43" draw:text-style-name="P4" draw:layer="layout" draw:line-skew="-0.573cm" svg:x1="12.704cm" svg:y1="7.475cm" svg:x2="22.614cm" svg:y2="9.715cm" draw:start-shape="id137" draw:start-glue-point="8" draw:end-shape="id134" draw:end-glue-point="0" svg:d="M12704 7475h-1105v1551h11015v689" svg:viewBox="0 0 11016 2241">
          <text:p/>
        </draw:connector>
        <draw:frame draw:style-name="gr17" draw:text-style-name="P6" xml:id="id145" draw:id="id145" draw:layer="layout" svg:width="3.936cm" svg:height="2.426cm" svg:x="22.792cm" svg:y="16.751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7.342cm" svg:y1="13.204cm" svg:x2="26.302cm" svg:y2="18.599cm" draw:start-shape="id139" draw:start-glue-point="7" draw:end-shape="id145" draw:end-glue-point="10" svg:d="M27342 13204v5395h-1040" svg:viewBox="0 0 1041 5396">
          <text:p/>
        </draw:connector>
        <draw:g draw:style-name="gr1" xml:id="id146" draw:id="id146">
          <draw:rect draw:style-name="gr356" draw:text-style-name="P3" draw:layer="layout" svg:width="0.75cm" svg:height="0.25cm" svg:x="21.12cm" svg:y="17.131cm">
            <text:p text:style-name="P2"><text:span text:style-name="T1">1</text:span><text:span text:style-name="T1">k</text:span></text:p>
          </draw:rect>
          <draw:line draw:style-name="gr357" draw:text-style-name="P1" draw:layer="layout" svg:x1="20.87cm" svg:y1="17.256cm" svg:x2="21.12cm" svg:y2="17.256cm">
            <text:p/>
          </draw:line>
          <draw:line draw:style-name="gr358" draw:text-style-name="P1" draw:layer="layout" svg:x1="21.87cm" svg:y1="17.256cm" svg:x2="22.12cm" svg:y2="17.256cm">
            <text:p/>
          </draw:line>
        </draw:g>
        <draw:g draw:style-name="gr1" xml:id="id147" draw:id="id147">
          <draw:rect draw:style-name="gr359" draw:text-style-name="P3" draw:layer="layout" svg:width="0.75cm" svg:height="0.25cm" svg:x="20.248cm" svg:y="17.419cm">
            <text:p text:style-name="P2"><text:span text:style-name="T1">1k</text:span></text:p>
          </draw:rect>
          <draw:line draw:style-name="gr360" draw:text-style-name="P1" draw:layer="layout" svg:x1="19.998cm" svg:y1="17.544cm" svg:x2="20.248cm" svg:y2="17.544cm">
            <text:p/>
          </draw:line>
          <draw:line draw:style-name="gr361" draw:text-style-name="P1" draw:layer="layout" svg:x1="20.998cm" svg:y1="17.544cm" svg:x2="21.248cm" svg:y2="17.544cm">
            <text:p/>
          </draw:line>
        </draw:g>
        <draw:connector draw:style-name="gr10" draw:text-style-name="P4" draw:layer="layout" svg:x1="22.12cm" svg:y1="17.256cm" svg:x2="23.037cm" svg:y2="17.278cm" draw:start-shape="id146" draw:start-glue-point="1" draw:end-shape="id145" draw:end-glue-point="5" svg:d="M22120 17256h345v22h572" svg:viewBox="0 0 918 23">
          <text:p/>
        </draw:connector>
        <draw:connector draw:style-name="gr10" draw:text-style-name="P4" draw:layer="layout" svg:x1="21.248cm" svg:y1="17.544cm" svg:x2="23.037cm" svg:y2="17.543cm" draw:start-shape="id147" draw:start-glue-point="1" draw:end-shape="id145" draw:end-glue-point="6" svg:d="M21248 17544h781v-1h1008" svg:viewBox="0 0 1790 2">
          <text:p/>
        </draw:connector>
        <draw:connector draw:style-name="gr41" draw:text-style-name="P4" draw:layer="layout" svg:x1="26.817cm" svg:y1="13.204cm" svg:x2="23.023cm" svg:y2="17.04cm" draw:start-shape="id139" draw:start-glue-point="5" draw:end-shape="id145" draw:end-glue-point="4" svg:d="M26817 13204v1836h-4525v2000h731" svg:viewBox="0 0 4526 3837">
          <text:p/>
        </draw:connector>
        <draw:connector draw:style-name="gr41" draw:text-style-name="P4" draw:layer="layout" svg:x1="11.357cm" svg:y1="5.746cm" svg:x2="12.684cm" svg:y2="6.971cm" draw:start-shape="id148" draw:start-glue-point="8" draw:end-shape="id137" draw:end-glue-point="7" svg:d="M11357 5746v1225h1327" svg:viewBox="0 0 1328 1226">
          <text:p/>
        </draw:connector>
        <draw:connector draw:style-name="gr10" draw:text-style-name="P4" draw:layer="layout" draw:line-skew="-0.243cm" svg:x1="20.87cm" svg:y1="17.256cm" svg:x2="16.523cm" svg:y2="14.752cm" draw:start-shape="id146" draw:start-glue-point="3" draw:end-shape="id136" draw:end-glue-point="12" svg:d="M20870 17256h-2109v-2504h-2238" svg:viewBox="0 0 4348 2505">
          <text:p/>
        </draw:connector>
        <draw:connector draw:style-name="gr10" draw:text-style-name="P4" draw:layer="layout" draw:line-skew="-0.234cm" svg:x1="16.523cm" svg:y1="15.057cm" svg:x2="19.998cm" svg:y2="17.544cm" draw:start-shape="id136" draw:start-glue-point="13" draw:end-shape="id147" draw:end-glue-point="3" svg:d="M16523 15057h1811v2487h1664" svg:viewBox="0 0 3476 2488">
          <text:p/>
        </draw:connector>
        <draw:g draw:style-name="gr1" xml:id="id150" draw:id="id150">
          <draw:rect draw:style-name="gr362" draw:text-style-name="P5" draw:layer="layout" svg:width="0.75cm" svg:height="0.289cm" draw:transform="rotate (1.5707963267949) translate (6.562cm 13.821cm)">
            <text:p text:style-name="P2"><text:span text:style-name="T1">2</text:span><text:span text:style-name="T1">.</text:span><text:span text:style-name="T1">2</text:span><text:span text:style-name="T1">k</text:span></text:p>
          </draw:rect>
          <draw:line draw:style-name="gr363" draw:text-style-name="P1" draw:layer="layout" svg:x1="6.706cm" svg:y1="12.819cm" svg:x2="6.706cm" svg:y2="13.069cm">
            <text:p/>
          </draw:line>
          <draw:line draw:style-name="gr364" draw:text-style-name="P1" draw:layer="layout" svg:x1="6.706cm" svg:y1="13.819cm" svg:x2="6.706cm" svg:y2="14.069cm">
            <text:p/>
          </draw:line>
        </draw:g>
        <draw:connector draw:style-name="gr10" draw:text-style-name="P4" draw:layer="layout" svg:x1="6.691cm" svg:y1="11.925cm" svg:x2="8.16cm" svg:y2="12.454cm" draw:start-shape="id149" draw:start-glue-point="4" draw:end-shape="id136" draw:end-glue-point="17" svg:d="M6691 11925v529h1469" svg:viewBox="0 0 1470 530">
          <text:p/>
        </draw:connector>
        <draw:connector draw:style-name="gr26" draw:text-style-name="P4" draw:layer="layout" draw:line-skew="0.344cm" svg:x1="6.706cm" svg:y1="14.069cm" svg:x2="4.683cm" svg:y2="15.259cm" draw:start-shape="id150" draw:start-glue-point="2" draw:end-shape="id140" draw:end-glue-point="4" svg:d="M6706 14069v2189h-2023v-999" svg:viewBox="0 0 2024 2190">
          <text:p/>
        </draw:connector>
        <draw:connector draw:style-name="gr10" draw:text-style-name="P4" draw:layer="layout" svg:x1="6.706cm" svg:y1="12.819cm" svg:x2="6.691cm" svg:y2="11.925cm" draw:start-shape="id150" draw:start-glue-point="0" draw:end-shape="id149" draw:end-glue-point="4" svg:d="M6706 12819v-410h-15v-484" svg:viewBox="0 0 16 895">
          <text:p/>
        </draw:connector>
        <draw:connector draw:style-name="gr53" draw:text-style-name="P4" draw:layer="layout" svg:x1="3.731cm" svg:y1="3.034cm" svg:x2="6.229cm" svg:y2="2.874cm" draw:start-shape="id151" draw:start-glue-point="0" draw:end-shape="id143" draw:end-glue-point="8" svg:d="M3731 3034v-518h1446v358h1052" svg:viewBox="0 0 2499 519">
          <text:p/>
        </draw:connector>
        <draw:connector draw:style-name="gr41" draw:text-style-name="P4" draw:layer="layout" draw:line-skew="-0.214cm 0.523cm" svg:x1="6.253cm" svg:y1="3.896cm" svg:x2="5.081cm" svg:y2="4.183cm" draw:start-shape="id143" draw:start-glue-point="9" draw:end-shape="id152" draw:end-glue-point="4" svg:d="M6253 3896h-760v292h-412v-5" svg:viewBox="0 0 1173 293">
          <text:p/>
        </draw:connector>
        <draw:connector draw:style-name="gr41" draw:text-style-name="P4" draw:layer="layout" draw:line-skew="0.267cm" svg:x1="3.731cm" svg:y1="3.659cm" svg:x2="4.243cm" svg:y2="4.183cm" draw:start-shape="id151" draw:start-glue-point="2" draw:end-shape="id152" draw:end-glue-point="5" svg:d="M3731 3659v529h512v-5" svg:viewBox="0 0 513 530">
          <text:p/>
        </draw:connector>
        <draw:connector draw:style-name="gr41" draw:text-style-name="P4" draw:layer="layout" draw:line-skew="-2.031cm 0.356cm" svg:x1="23.023cm" svg:y1="17.04cm" svg:x2="10.085cm" svg:y2="16.689cm" draw:start-shape="id145" draw:start-glue-point="4" draw:end-shape="id136" draw:end-glue-point="29" svg:d="M23023 17040h-5080v1678h-7858v-2029" svg:viewBox="0 0 12939 2030">
          <text:p/>
        </draw:connector>
        <draw:g draw:style-name="gr1" xml:id="id154" draw:id="id154">
          <draw:circle draw:style-name="gr365" draw:text-style-name="P9" draw:layer="layout" svg:width="1cm" svg:height="1cm" svg:x="15.542cm" svg:y="3.092cm">
            <text:p text:style-name="P2"><text:span text:style-name="T4"><text:s text:c="4"/>U</text:span></text:p>
          </draw:circle>
          <draw:line draw:style-name="gr366" draw:text-style-name="P10" draw:layer="layout" svg:x1="15.669cm" svg:y1="3.655cm" svg:x2="15.744cm" svg:y2="3.655cm">
            <text:p/>
          </draw:line>
          <draw:line draw:style-name="gr367" draw:text-style-name="P10" draw:layer="layout" svg:x1="15.669cm" svg:y1="3.53cm" svg:x2="16.044cm" svg:y2="3.53cm">
            <text:p/>
          </draw:line>
          <draw:line draw:style-name="gr368" draw:text-style-name="P10" draw:layer="layout" svg:x1="15.819cm" svg:y1="3.655cm" svg:x2="15.894cm" svg:y2="3.655cm">
            <text:p/>
          </draw:line>
          <draw:line draw:style-name="gr369" draw:text-style-name="P10" draw:layer="layout" svg:x1="15.969cm" svg:y1="3.655cm" svg:x2="16.044cm" svg:y2="3.655cm">
            <text:p/>
          </draw:line>
        </draw:g>
        <draw:connector draw:style-name="gr26" draw:text-style-name="P4" xml:id="id157" draw:id="id157" draw:layer="layout" svg:x1="11.361cm" svg:y1="2.497cm" svg:x2="16.042cm" svg:y2="3.092cm" draw:start-shape="id153" draw:start-glue-point="0" draw:end-shape="id154" draw:end-glue-point="0" svg:d="M11361 2497h4681v595" svg:viewBox="0 0 4682 596">
          <text:p/>
        </draw:connector>
        <draw:connector draw:style-name="gr43" draw:text-style-name="P4" draw:layer="layout" draw:line-skew="-0.146cm" svg:x1="15.542cm" svg:y1="3.592cm" svg:x2="9.156cm" svg:y2="4.188cm" draw:start-shape="id154" draw:end-shape="id143" draw:end-glue-point="6" svg:d="M15542 3592h-3334v596h-3052" svg:viewBox="0 0 6387 597">
          <text:p/>
        </draw:connector>
        <draw:g draw:style-name="gr1" xml:id="id155" draw:id="id155">
          <draw:rect draw:style-name="gr370" draw:text-style-name="P3" draw:layer="layout" svg:width="0.817cm" svg:height="0.397cm" svg:x="16.889cm" svg:y="4.611cm">
            <text:p text:style-name="P2"><text:span text:style-name="T1">1</text:span><text:span text:style-name="T1">0</text:span><text:span text:style-name="T1">k</text:span></text:p>
          </draw:rect>
          <draw:line draw:style-name="gr371" draw:text-style-name="P1" draw:layer="layout" svg:x1="16.617cm" svg:y1="4.81cm" svg:x2="16.889cm" svg:y2="4.81cm">
            <text:p/>
          </draw:line>
          <draw:line draw:style-name="gr372" draw:text-style-name="P1" draw:layer="layout" svg:x1="17.706cm" svg:y1="4.81cm" svg:x2="17.978cm" svg:y2="4.81cm">
            <text:p/>
          </draw:line>
        </draw:g>
        <draw:g draw:style-name="gr1" xml:id="id156" draw:id="id156">
          <draw:rect draw:style-name="gr373" draw:text-style-name="P3" draw:layer="layout" svg:width="0.843cm" svg:height="0.385cm" svg:x="19.741cm" svg:y="4.623cm">
            <text:p text:style-name="P2"><text:span text:style-name="T1">20k</text:span></text:p>
          </draw:rect>
          <draw:line draw:style-name="gr374" draw:text-style-name="P1" draw:layer="layout" svg:x1="19.46cm" svg:y1="4.816cm" svg:x2="19.741cm" svg:y2="4.816cm">
            <text:p/>
          </draw:line>
          <draw:line draw:style-name="gr375" draw:text-style-name="P1" draw:layer="layout" svg:x1="20.584cm" svg:y1="4.816cm" svg:x2="20.865cm" svg:y2="4.816cm">
            <text:p/>
          </draw:line>
        </draw:g>
        <draw:connector draw:style-name="gr10" draw:text-style-name="P4" draw:layer="layout" svg:x1="17.978cm" svg:y1="4.809cm" svg:x2="19.46cm" svg:y2="4.815cm" draw:start-shape="id155" draw:start-glue-point="1" draw:end-shape="id156" draw:end-glue-point="3" svg:d="M17978 4809h741v6h741" svg:viewBox="0 0 1483 7">
          <text:p/>
        </draw:connector>
        <draw:connector draw:style-name="gr10" draw:text-style-name="P4" draw:layer="layout" svg:x1="17.978cm" svg:y1="4.809cm" svg:x2="16.543cm" svg:y2="14.408cm" draw:start-shape="id155" draw:start-glue-point="1" draw:end-shape="id136" draw:end-glue-point="11" svg:d="M17978 4809h518v9599h-1953" svg:viewBox="0 0 1954 9600">
          <text:p/>
        </draw:connector>
        <draw:connector draw:style-name="gr10" draw:text-style-name="P4" draw:layer="layout" svg:x1="15.542cm" svg:y1="3.592cm" svg:x2="16.617cm" svg:y2="4.809cm" draw:start-shape="id154" draw:start-glue-point="3" draw:end-shape="id155" draw:end-glue-point="3" svg:d="M15542 3592h-518v1217h1593" svg:viewBox="0 0 1594 1218">
          <text:p/>
        </draw:connector>
        <draw:connector draw:style-name="gr53" draw:text-style-name="P4" draw:layer="layout" draw:line-skew="0.204cm" svg:x1="20.865cm" svg:y1="4.815cm" svg:x2="16.042cm" svg:y2="2.497cm" draw:start-shape="id156" draw:start-glue-point="1" draw:end-shape="id157" draw:end-glue-point="0" svg:d="M20865 4815h722v-2318h-5545" svg:viewBox="0 0 5546 2319">
          <text:p/>
        </draw:connector>
        <draw:connector draw:style-name="gr41" draw:text-style-name="P4" draw:layer="layout" draw:line-skew="0.284cm" svg:x1="16.141cm" svg:y1="7.653cm" svg:x2="11.44cm" svg:y2="5.663cm" draw:start-shape="id137" draw:start-glue-point="6" draw:end-shape="id148" draw:end-glue-point="10" svg:d="M16141 7653h860v-1990h-5561" svg:viewBox="0 0 5562 1991">
          <text:p/>
        </draw:connector>
        <draw:frame draw:style-name="gr17" draw:text-style-name="P6" xml:id="id158" draw:id="id158" draw:layer="layout" svg:width="2.333cm" svg:height="2.504cm" svg:x="24.731cm" svg:y="5.058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0" draw:text-style-name="P4" draw:layer="layout" svg:x1="24.543cm" svg:y1="11.336cm" svg:x2="25.476cm" svg:y2="7.562cm" draw:start-shape="id135" draw:start-glue-point="1" draw:end-shape="id158" draw:end-glue-point="6" svg:d="M24543 11336h933v-3774" svg:viewBox="0 0 934 3775">
          <text:p/>
        </draw:connector>
        <draw:connector draw:style-name="gr26" draw:text-style-name="P4" draw:layer="layout" draw:line-skew="7.81cm 0.02cm" svg:x1="16.042cm" svg:y1="2.497cm" svg:x2="25.973cm" svg:y2="7.562cm" draw:start-shape="id157" draw:start-glue-point="0" draw:end-shape="id158" draw:end-glue-point="7" svg:d="M16042 2497h12168v5585h-2237v-520" svg:viewBox="0 0 12169 5586">
          <text:p/>
        </draw:connector>
        <draw:connector draw:style-name="gr26" draw:text-style-name="P4" draw:layer="layout" draw:line-skew="7.127cm" svg:x1="16.042cm" svg:y1="2.497cm" svg:x2="27.342cm" svg:y2="13.204cm" draw:start-shape="id157" draw:start-glue-point="0" draw:end-shape="id139" draw:end-glue-point="7" svg:d="M16042 2497h12183v11331h-883v-624" svg:viewBox="0 0 12184 11332">
          <text:p/>
        </draw:connector>
        <draw:connector draw:style-name="gr41" draw:text-style-name="P4" draw:layer="layout" draw:line-skew="3.412cm" svg:x1="16.141cm" svg:y1="7.653cm" svg:x2="26.817cm" svg:y2="13.204cm" draw:start-shape="id137" draw:start-glue-point="6" draw:end-shape="id139" draw:end-glue-point="5" svg:d="M16141 7653h8443v6175h2233v-624" svg:viewBox="0 0 10677 6176">
          <text:p/>
        </draw:connector>
        <draw:connector draw:style-name="gr43" draw:text-style-name="P4" draw:layer="layout" draw:line-skew="0.978cm" svg:x1="22.614cm" svg:y1="9.715cm" svg:x2="25.023cm" svg:y2="7.552cm" draw:start-shape="id134" draw:start-glue-point="0" draw:end-shape="id158" draw:end-glue-point="5" svg:d="M22614 9715v-107h2409v-2056" svg:viewBox="0 0 2410 2164">
          <text:p/>
        </draw:connector>
        <draw:connector draw:style-name="gr43" draw:text-style-name="P4" draw:layer="layout" draw:line-skew="0.037cm" svg:x1="15.542cm" svg:y1="3.592cm" svg:x2="12.673cm" svg:y2="7.946cm" draw:start-shape="id154" draw:start-glue-point="3" draw:end-shape="id137" draw:end-glue-point="9" svg:d="M15542 3592h-3333v4354h464" svg:viewBox="0 0 3334 4355">
          <text:p/>
        </draw:connector>
        <draw:custom-shape draw:style-name="gr65" draw:text-style-name="P11" draw:layer="layout" svg:width="0.167cm" svg:height="0.167cm" svg:x="12.14cm" svg:y="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14.967cm" svg:y="3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18.791cm" svg:y="4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xml:id="id148" draw:id="id148" draw:layer="layout" svg:width="0.167cm" svg:height="0.167cm" svg:x="11.273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0.167cm" svg:height="0.167cm" svg:x="16.923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1.507cm" svg:y="4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5.967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1.499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2.242cm" svg:y="1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138" draw:id="id138" draw:layer="layout" svg:width="0.154cm" svg:height="0.167cm" svg:x="21.754cm" svg:y="15.48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22.543cm" svg:y="1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0.167cm" svg:height="0.167cm" svg:x="26.739cm" svg:y="1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7.268cm" svg:y="1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8.125cm" svg:y="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xml:id="id161" draw:id="id161" draw:layer="layout" svg:width="0.167cm" svg:height="0.167cm" svg:x="27.268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13" draw:layer="layout" svg:width="19.968cm" svg:height="0.962cm" svg:x="8.73cm" svg:y="1.178cm">
          <draw:text-box>
            <text:p text:style-name="P21">Схема часов на ESP32 (30 pin) + матрица на WS2812B Вариант 2</text:p>
          </draw:text-box>
        </draw:frame>
        <draw:connector draw:style-name="gr10" draw:text-style-name="P4" draw:layer="layout" svg:x1="21.559cm" svg:y1="18.491cm" svg:x2="22.842cm" svg:y2="18.349cm" draw:start-shape="id159" draw:start-glue-point="4" svg:d="M21559 18491h930v-142h353" svg:viewBox="0 0 1284 143">
          <text:p/>
        </draw:connector>
        <draw:connector draw:style-name="gr10" draw:text-style-name="P4" draw:layer="layout" svg:x1="21.54cm" svg:y1="19.051cm" svg:x2="22.865cm" svg:y2="18.864cm" draw:start-shape="id159" draw:start-glue-point="5" draw:end-shape="id145" draw:end-glue-point="9" svg:d="M21540 19051h674v-187h651" svg:viewBox="0 0 1326 188">
          <text:p/>
        </draw:connector>
        <draw:custom-shape draw:style-name="gr65" draw:text-style-name="P11" draw:layer="layout" svg:width="0.167cm" svg:height="0.167cm" svg:x="22.529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draw:layer="layout" svg:width="0.167cm" svg:height="0.167cm" svg:x="6.635cm" svg:y="1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3" draw:text-style-name="P14" draw:layer="layout" svg:width="2.962cm" svg:height="0.681cm" svg:x="10.126cm" svg:y="10.57cm">
          <draw:text-box>
            <text:p text:style-name="P22"><text:span text:style-name="T6">ESP32 (30 pin)</text:span></text:p>
          </draw:text-box>
        </draw:frame>
        <draw:frame draw:style-name="gr71" draw:text-style-name="P14" draw:layer="layout" svg:width="2.886cm" svg:height="1.433cm" svg:x="4.193cm" svg:y="10.508cm">
          <draw:text-box>
            <text:p text:style-name="P22"><text:span text:style-name="T6">Фоторезистор LDR </text:span><text:span text:style-name="T6">20k</text:span></text:p>
          </draw:text-box>
        </draw:frame>
        <draw:frame draw:style-name="gr376" draw:text-style-name="P14" draw:layer="layout" svg:width="2.468cm" svg:height="1.433cm" svg:x="4.035cm" svg:y="11.891cm">
          <draw:text-box>
            <text:p text:style-name="P22"><text:span text:style-name="T6">Сенсорная </text:span><text:span text:style-name="T6">кнопка </text:span><text:span text:style-name="T6">TTP223b</text:span></text:p>
          </draw:text-box>
        </draw:frame>
        <draw:frame draw:style-name="gr72" draw:text-style-name="P14" draw:layer="layout" svg:width="4.618cm" svg:height="0.645cm" svg:x="12.122cm" svg:y="5.813cm">
          <draw:text-box>
            <text:p text:style-name="P22"><text:span text:style-name="T6">Модуль реле 5В High </text:span><text:span text:style-name="T6">Lvl</text:span></text:p>
          </draw:text-box>
        </draw:frame>
        <draw:frame draw:style-name="gr72" draw:text-style-name="P14" draw:layer="layout" svg:width="4.503cm" svg:height="0.645cm" svg:x="4.591cm" svg:y="1.755cm">
          <draw:text-box>
            <text:p text:style-name="P22"><text:span text:style-name="T6"><text:s/>Модуль заряда J5019</text:span></text:p>
          </draw:text-box>
        </draw:frame>
        <draw:frame draw:style-name="gr72" draw:text-style-name="P14" draw:layer="layout" svg:width="4.579cm" svg:height="0.645cm" svg:x="23.382cm" svg:y="4.446cm">
          <draw:text-box>
            <text:p text:style-name="P22"><text:span text:style-name="T6">Матри</text:span><text:span text:style-name="T6">ца </text:span><text:span text:style-name="T6">WS281</text:span><text:span text:style-name="T6">2B </text:span><text:span text:style-name="T6">32x8</text:span></text:p>
          </draw:text-box>
        </draw:frame>
        <draw:frame draw:style-name="gr72" draw:text-style-name="P14" draw:layer="layout" svg:width="2.576cm" svg:height="0.645cm" svg:x="23.489cm" svg:y="19.036cm">
          <draw:text-box>
            <text:p text:style-name="P22"><text:span text:style-name="T6">MP3-TF-16P</text:span></text:p>
          </draw:text-box>
        </draw:frame>
        <draw:frame draw:style-name="gr70" draw:text-style-name="P14" draw:layer="layout" svg:width="2.751cm" svg:height="1.039cm" svg:x="16.646cm" svg:y="2.897cm">
          <draw:text-box>
            <text:p text:style-name="P22"><text:span text:style-name="T6">AC </text:span><text:span text:style-name="T6">220V</text:span></text:p>
            <text:p text:style-name="P22"><text:span text:style-name="T6">DC 5V </text:span><text:span text:style-name="T6">2.5A</text:span></text:p>
          </draw:text-box>
        </draw:frame>
        <draw:connector draw:style-name="gr27" draw:text-style-name="P4" draw:layer="layout" svg:x1="6.454cm" svg:y1="11.917cm" svg:x2="5.443cm" svg:y2="15.27cm" draw:start-shape="id149" draw:start-glue-point="5" draw:end-shape="id140" draw:end-glue-point="6" svg:d="M6454 11917v3997h-1011v-644" svg:viewBox="0 0 1012 3998">
          <text:p/>
        </draw:connector>
        <draw:frame draw:style-name="gr71" draw:text-style-name="P14" draw:layer="layout" svg:width="2.857cm" svg:height="1.433cm" svg:x="25.856cm" svg:y="8.259cm">
          <draw:text-box>
            <text:p text:style-name="P22"><text:span text:style-name="T6">Д</text:span><text:span text:style-name="T6">а</text:span><text:span text:style-name="T6">т</text:span><text:span text:style-name="T6">ч</text:span><text:span text:style-name="T6">и</text:span><text:span text:style-name="T6">к</text:span><text:span text:style-name="T6"> </text:span><text:span text:style-name="T6">д</text:span><text:span text:style-name="T6">в</text:span><text:span text:style-name="T6">и</text:span><text:span text:style-name="T6">ж</text:span><text:span text:style-name="T6">е</text:span><text:span text:style-name="T6">н</text:span><text:span text:style-name="T6">и</text:span><text:span text:style-name="T6">я</text:span></text:p>
            <text:p text:style-name="P22"><text:span text:style-name="T6">R</text:span><text:span text:style-name="T6">C</text:span><text:span text:style-name="T6">W</text:span><text:span text:style-name="T6">L</text:span><text:span text:style-name="T6">-</text:span><text:span text:style-name="T6">0</text:span><text:span text:style-name="T6">5</text:span><text:span text:style-name="T6">1</text:span><text:span text:style-name="T6">6</text:span></text:p>
          </draw:text-box>
        </draw:frame>
        <draw:g draw:style-name="gr73">
          <draw:g draw:style-name="gr73" xml:id="id152" draw:id="id152">
            <draw:glue-point draw:id="4" svg:x="-0.086cm" svg:y="-0.158cm" draw:align="right"/>
            <draw:glue-point draw:id="5" svg:x="-4.24cm" svg:y="-5.015cm"/>
            <draw:g draw:style-name="gr1">
              <draw:line draw:style-name="gr377" draw:text-style-name="P1" draw:layer="layout" svg:x1="5.167cm" svg:y1="4.183cm" svg:x2="4.917cm" svg:y2="4.183cm">
                <text:p/>
              </draw:line>
              <draw:line draw:style-name="gr378" draw:text-style-name="P1" draw:layer="layout" svg:x1="4.974cm" svg:y1="4.461cm" svg:x2="4.417cm" svg:y2="4.183cm">
                <text:p/>
              </draw:line>
              <draw:line draw:style-name="gr379" draw:text-style-name="P1" draw:layer="layout" svg:x1="4.417cm" svg:y1="4.183cm" svg:x2="4.167cm" svg:y2="4.183cm">
                <text:p/>
              </draw:line>
            </draw:g>
            <draw:line draw:style-name="gr380" draw:text-style-name="P1" draw:layer="layout" svg:x1="4.917cm" svg:y1="4.183cm" svg:x2="4.917cm" svg:y2="4.5cm">
              <text:p/>
            </draw:line>
          </draw:g>
          <draw:g draw:style-name="gr1">
            <draw:line draw:style-name="gr381" draw:text-style-name="P1" draw:layer="layout" svg:x1="4.664cm" svg:y1="4.294cm" svg:x2="4.664cm" svg:y2="3.919cm">
              <text:p/>
            </draw:line>
            <draw:line draw:style-name="gr382" draw:text-style-name="P1" draw:layer="layout" svg:x1="4.789cm" svg:y1="3.919cm" svg:x2="4.539cm" svg:y2="3.919cm">
              <text:p/>
            </draw:line>
          </draw:g>
          <draw:line draw:style-name="gr383" draw:text-style-name="P1" draw:layer="layout" svg:x1="4.537cm" svg:y1="4.046cm" svg:x2="4.537cm" svg:y2="3.921cm">
            <text:p/>
          </draw:line>
          <draw:line draw:style-name="gr384" draw:text-style-name="P1" draw:layer="layout" svg:x1="4.787cm" svg:y1="3.921cm" svg:x2="4.787cm" svg:y2="4.046cm">
            <text:p/>
          </draw:line>
        </draw:g>
        <draw:custom-shape draw:style-name="gr68" draw:text-style-name="P4" draw:layer="layout" svg:width="0.167cm" svg:height="0.167cm" svg:x="11.281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5" draw:layer="layout" svg:width="1.499cm" svg:height="0.887cm" svg:x="3.7cm" svg:y="2.508cm">
          <draw:text-box>
            <text:p text:style-name="P23"><text:span text:style-name="T7">Li-Ion</text:span></text:p>
            <text:p text:style-name="P23"><text:span text:style-name="T7">18650</text:span></text:p>
          </draw:text-box>
        </draw:frame>
        <draw:custom-shape draw:style-name="gr234" draw:text-style-name="P6" draw:layer="layout" svg:width="1.428cm" svg:height="1.428cm" svg:x="20.968cm" svg:y="11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4" draw:layer="layout" svg:width="1.887cm" svg:height="0.645cm" svg:x="20.456cm" svg:y="10.831cm">
          <draw:text-box>
            <text:p text:style-name="P22"><text:span text:style-name="T6">BC5</text:span><text:span text:style-name="T6">57</text:span></text:p>
          </draw:text-box>
        </draw:frame>
        <draw:custom-shape draw:style-name="gr84" draw:text-style-name="P16" draw:layer="layout" svg:width="0.167cm" svg:height="0.167cm" svg:x="5.367cm" svg:y="1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159" draw:id="id159" draw:layer="layout" svg:width="1.899cm" svg:height="1.823cm" svg:x="19.736cm" svg:y="17.884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3">
          <draw:g draw:style-name="gr1" xml:id="id151" draw:id="id151">
            <draw:line draw:style-name="gr385" draw:text-style-name="P1" draw:layer="layout" svg:x1="3.856cm" svg:y1="3.284cm" svg:x2="3.606cm" svg:y2="3.284cm">
              <text:p/>
            </draw:line>
            <draw:line draw:style-name="gr386" draw:text-style-name="P1" draw:layer="layout" svg:x1="4.106cm" svg:y1="3.409cm" svg:x2="3.356cm" svg:y2="3.409cm">
              <text:p/>
            </draw:line>
            <draw:line draw:style-name="gr387" draw:text-style-name="P1" draw:layer="layout" svg:x1="3.731cm" svg:y1="3.284cm" svg:x2="3.731cm" svg:y2="3.034cm">
              <text:p/>
            </draw:line>
            <draw:line draw:style-name="gr388" draw:text-style-name="P1" draw:layer="layout" svg:x1="3.731cm" svg:y1="3.409cm" svg:x2="3.731cm" svg:y2="3.659cm">
              <text:p/>
            </draw:line>
          </draw:g>
          <draw:frame draw:style-name="gr89" draw:text-style-name="P15" draw:layer="layout" svg:width="0.376cm" svg:height="0.569cm" svg:x="3.276cm" svg:y="3.336cm">
            <draw:text-box>
              <text:p><text:span text:style-name="T7">+</text:span></text:p>
            </draw:text-box>
          </draw:frame>
        </draw:g>
        <draw:frame draw:style-name="gr72" draw:text-style-name="P14" draw:layer="layout" svg:width="0.201cm" svg:height="0.645cm" svg:x="15.817cm" svg:y="2.667cm">
          <draw:text-box>
            <text:p text:style-name="P22"><text:span text:style-name="T6">-</text:span></text:p>
          </draw:text-box>
        </draw:frame>
        <draw:frame draw:style-name="gr72" draw:text-style-name="P14" draw:layer="layout" svg:width="0.365cm" svg:height="0.645cm" svg:x="15.234cm" svg:y="3.086cm">
          <draw:text-box>
            <text:p text:style-name="P22"><text:span text:style-name="T6">+</text:span></text:p>
          </draw:text-box>
        </draw:frame>
        <draw:frame draw:style-name="gr90" draw:text-style-name="P15" draw:layer="layout" svg:width="2.117cm" svg:height="0.74cm" svg:x="4.052cm" svg:y="3.373cm">
          <draw:text-box>
            <text:p text:style-name="P23"><text:span text:style-name="T7">«</text:span><text:span text:style-name="T7">r</text:span><text:span text:style-name="T7">e</text:span><text:span text:style-name="T7">s</text:span><text:span text:style-name="T7">e</text:span><text:span text:style-name="T7">t</text:span><text:span text:style-name="T7">»</text:span></text:p>
          </draw:text-box>
        </draw:frame>
        <draw:g draw:style-name="gr1">
          <draw:line draw:style-name="gr389" draw:text-style-name="P1" draw:layer="layout" svg:x1="27.025cm" svg:y1="14.764cm" svg:x2="27.025cm" svg:y2="15.264cm">
            <text:p/>
          </draw:line>
          <draw:line draw:style-name="gr390" draw:text-style-name="P1" draw:layer="layout" svg:x1="27.15cm" svg:y1="14.764cm" svg:x2="27.15cm" svg:y2="15.264cm">
            <text:p/>
          </draw:line>
          <draw:line draw:style-name="gr391" draw:text-style-name="P1" draw:layer="layout" svg:x1="27.025cm" svg:y1="15.014cm" svg:x2="26.775cm" svg:y2="15.014cm">
            <text:p/>
          </draw:line>
          <draw:line draw:style-name="gr392" draw:text-style-name="P1" draw:layer="layout" svg:x1="27.15cm" svg:y1="15.014cm" svg:x2="27.4cm" svg:y2="15.014cm">
            <text:p/>
          </draw:line>
        </draw:g>
        <draw:frame draw:style-name="gr95" draw:text-style-name="P15" draw:layer="layout" svg:width="1.234cm" svg:height="0.569cm" svg:x="26.259cm" svg:y="15.279cm">
          <draw:text-box>
            <text:p text:style-name="P23"><text:span text:style-name="T7">47nF</text:span></text:p>
          </draw:text-box>
        </draw:frame>
        <draw:connector draw:style-name="gr26" draw:text-style-name="P4" draw:layer="layout" draw:line-skew="-0.126cm" svg:x1="21.461cm" svg:y1="13.591cm" svg:x2="21.832cm" svg:y2="15.481cm" draw:start-shape="id160" draw:start-glue-point="1" draw:end-shape="id138" draw:end-glue-point="4" svg:d="M21461 13591h392v1046h-21v844" svg:viewBox="0 0 393 1891">
          <text:p/>
        </draw:connector>
        <draw:connector draw:style-name="gr26" draw:text-style-name="P4" draw:layer="layout" svg:x1="27.292cm" svg:y1="16.532cm" svg:x2="21.908cm" svg:y2="15.565cm" draw:start-shape="id161" draw:start-glue-point="7" draw:end-shape="id138" draw:end-glue-point="6" svg:d="M27292 16532h-2704v-967h-2680" svg:viewBox="0 0 5385 968">
          <text:p/>
        </draw:connector>
        <draw:connector draw:style-name="gr26" draw:text-style-name="P4" draw:layer="layout" draw:line-skew="0cm -1.998cm" svg:x1="21.754cm" svg:y1="15.565cm" svg:x2="15.374cm" svg:y2="16.318cm" draw:start-shape="id138" draw:start-glue-point="10" draw:end-shape="id136" draw:end-glue-point="30" svg:d="M21754 15565h-2300v799h-4080v-46" svg:viewBox="0 0 6381 800">
          <text:p/>
        </draw:connector>
        <draw:connector draw:style-name="gr242" draw:text-style-name="P4" draw:layer="layout" draw:line-skew="-0.348cm" svg:x1="5.443cm" svg:y1="15.27cm" svg:x2="15.357cm" svg:y2="16.689cm" draw:start-shape="id140" draw:start-glue-point="6" draw:end-shape="id136" draw:end-glue-point="31" svg:d="M5443 15270v2744h9914v-1325" svg:viewBox="0 0 9915 2745">
          <text:p/>
        </draw:connector>
        <draw:custom-shape draw:style-name="gr393" draw:text-style-name="P24" draw:layer="layout" svg:width="0.154cm" svg:height="0.167cm" svg:x="4.61cm" svg:y="16.1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163" draw:id="id163" draw:layer="layout" svg:width="3.675cm" svg:height="3.749cm" draw:transform="rotate (-1.59435827169682) translate (5.158cm 6.063cm)">
          <draw:image xlink:href="Pictures/10000001000000FA000000FF1D7E8260.png" xlink:type="simple" xlink:show="embed" xlink:actuate="onLoad" draw:mime-type="image/png">
            <text:p/>
          </draw:image>
          <draw:glue-point draw:id="4" svg:x="2.899cm" svg:y="4.372cm"/>
          <draw:glue-point draw:id="5" svg:x="1.916cm" svg:y="4.295cm"/>
          <draw:glue-point draw:id="6" svg:x="1.129cm" svg:y="4.33cm"/>
          <draw:glue-point draw:id="7" svg:x="0.242cm" svg:y="4.255cm"/>
          <draw:glue-point draw:id="8" svg:x="-0.581cm" svg:y="4.29cm"/>
          <draw:glue-point draw:id="9" svg:x="-1.47cm" svg:y="4.364cm"/>
          <draw:glue-point draw:id="10" svg:x="-2.302cm" svg:y="4.194cm"/>
          <draw:glue-point draw:id="11" svg:x="1.671cm" svg:y="-4.284cm"/>
          <draw:glue-point draw:id="12" svg:x="0.787cm" svg:y="-4.359cm"/>
          <draw:glue-point draw:id="13" svg:x="-0.036cm" svg:y="-4.327cm"/>
          <draw:glue-point draw:id="14" svg:x="-0.925cm" svg:y="-4.298cm"/>
          <draw:glue-point draw:id="15" svg:x="-1.76cm" svg:y="-4.417cm"/>
        </draw:frame>
        <draw:frame draw:style-name="gr17" draw:text-style-name="P6" xml:id="id162" draw:id="id162" draw:layer="layout" svg:width="2.484cm" svg:height="1.921cm" draw:transform="rotate (1.5707963267949) translate (1.721cm 13.873cm)">
          <draw:image xlink:href="Pictures/100000010000009600000074D54675B0.png" xlink:type="simple" xlink:show="embed" xlink:actuate="onLoad" draw:mime-type="image/png">
            <text:p/>
          </draw:image>
          <draw:glue-point draw:id="4" svg:x="3.503cm" svg:y="-4.496cm"/>
          <draw:glue-point draw:id="5" svg:x="1.046cm" svg:y="-4.343cm"/>
          <draw:glue-point draw:id="6" svg:x="-1.509cm" svg:y="-4.496cm"/>
          <draw:glue-point draw:id="7" svg:x="-3.774cm" svg:y="-4.343cm"/>
        </draw:frame>
        <draw:connector draw:style-name="gr10" draw:text-style-name="P4" draw:layer="layout" draw:line-skew="-0.316cm" svg:x1="2.881cm" svg:y1="11.553cm" svg:x2="3.672cm" svg:y2="9.484cm" draw:start-shape="id162" draw:start-glue-point="5" draw:end-shape="id163" draw:end-glue-point="6" svg:d="M2881 11553v-1306h791v-763" svg:viewBox="0 0 792 2070">
          <text:p/>
        </draw:connector>
        <draw:connector draw:style-name="gr10" draw:text-style-name="P4" draw:layer="layout" svg:x1="3.353cm" svg:y1="11.515cm" svg:x2="3.332cm" svg:y2="9.456cm" draw:start-shape="id162" draw:start-glue-point="4" draw:end-shape="id163" draw:end-glue-point="7" svg:d="M3353 11515v-952h-21v-1107" svg:viewBox="0 0 22 2060">
          <text:p/>
        </draw:connector>
        <draw:connector draw:style-name="gr53" draw:text-style-name="P4" draw:layer="layout" svg:x1="2.392cm" svg:y1="11.515cm" svg:x2="2.677cm" svg:y2="9.497cm" draw:start-shape="id162" draw:start-glue-point="6" draw:end-shape="id163" draw:end-glue-point="9" svg:d="M2392 11515v-952h285v-1066" svg:viewBox="0 0 286 2019">
          <text:p/>
        </draw:connector>
        <draw:connector draw:style-name="gr41" draw:text-style-name="P4" draw:layer="layout" draw:line-skew="-0.545cm" svg:x1="3.018cm" svg:y1="9.469cm" svg:x2="1.957cm" svg:y2="11.553cm" draw:start-shape="id163" draw:start-glue-point="8" draw:end-shape="id162" draw:end-glue-point="7" svg:d="M3018 9469v549h-1061v1535" svg:viewBox="0 0 1062 2085">
          <text:p/>
        </draw:connector>
        <draw:custom-shape draw:style-name="gr164" draw:text-style-name="P18" draw:layer="layout" svg:width="0.167cm" svg:height="0.167cm" svg:x="3.583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0.167cm" svg:height="0.167cm" svg:x="3.26cm" svg:y="10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6" draw:layer="layout" svg:width="0.167cm" svg:height="0.167cm" svg:x="1.864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4" draw:layer="layout" svg:width="2.062cm" svg:height="2.629cm" svg:x="1.647cm" svg:y="14.016cm">
          <draw:text-box>
            <text:p><text:span text:style-name="T6">Датчик</text:span></text:p>
            <text:p><text:span text:style-name="T6">давления</text:span></text:p>
            <text:p><text:span text:style-name="T7">BMP180</text:span></text:p>
            <text:p><text:span text:style-name="T7">(BMP280,</text:span></text:p>
            <text:p><text:span text:style-name="T7">BME280,</text:span></text:p>
            <text:p><text:span text:style-name="T7">AHT10,</text:span></text:p>
            <text:p><text:span text:style-name="T7">AHT20) 5V</text:span></text:p>
          </draw:text-box>
        </draw:frame>
        <draw:connector draw:style-name="gr41" draw:text-style-name="P4" draw:layer="layout" draw:line-skew="-0.871cm -4.008cm 0.349cm" svg:x1="1.957cm" svg:y1="11.553cm" svg:x2="10.085cm" svg:y2="16.689cm" draw:start-shape="id162" draw:start-glue-point="7" draw:end-shape="id136" draw:end-glue-point="29" svg:d="M1957 11553v-1535h-430v8693h8558v-2022" svg:viewBox="0 0 8559 8694">
          <text:p/>
        </draw:connector>
        <draw:connector draw:style-name="gr242" draw:text-style-name="P4" draw:layer="layout" draw:line-skew="-0.348cm" svg:x1="5.443cm" svg:y1="15.27cm" svg:x2="15.357cm" svg:y2="16.689cm" svg:d="M5443 15270v2744h9914v-1325" svg:viewBox="0 0 9915 2745">
          <text:p/>
        </draw:connector>
        <draw:custom-shape draw:style-name="gr84" draw:text-style-name="P16" draw:layer="layout" svg:width="0.167cm" svg:height="0.167cm" svg:x="10.007cm" svg:y="1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4" draw:layer="layout" draw:line-skew="0.139cm -2.398cm 0.368cm" svg:x1="2.392cm" svg:y1="11.515cm" svg:x2="4.683cm" svg:y2="15.259cm" draw:start-shape="id162" draw:start-glue-point="6" draw:end-shape="id140" draw:end-glue-point="4" svg:d="M2392 11515v-487h1638v5254h653v-1023" svg:viewBox="0 0 2292 5255">
          <text:p/>
        </draw:connector>
        <draw:custom-shape draw:style-name="gr394" draw:text-style-name="P24" draw:layer="layout" svg:width="0.154cm" svg:height="0.191cm" svg:x="2.306cm" svg:y="10.927cm">
          <text:p/>
          <draw:enhanced-geometry svg:viewBox="0 0 21600 21600" draw:mirror-horizontal="true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95" draw:text-style-name="P24" draw:layer="layout" svg:width="0.154cm" svg:height="0.167cm" svg:x="11.259cm" svg:y="14.9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24" draw:layer="layout" svg:width="0.154cm" svg:height="0.167cm" svg:x="6.625cm" svg:y="16.1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7" draw:text-style-name="P27" draw:layer="layout" svg:width="3.287cm" svg:height="0.963cm" svg:x="5.193cm" svg:y="6.564cm">
          <draw:text-box>
            <text:p text:style-name="P26"><text:span text:style-name="T8">М</text:span><text:span text:style-name="T8">о</text:span><text:span text:style-name="T8">ду</text:span><text:span text:style-name="T8">л</text:span><text:span text:style-name="T8">ь </text:span><text:span text:style-name="T8">ч</text:span><text:span text:style-name="T8">ас</text:span><text:span text:style-name="T8">о</text:span><text:span text:style-name="T8">в</text:span></text:p>
            <text:p text:style-name="P26"><text:span text:style-name="T9">RT</text:span><text:span text:style-name="T9">C </text:span><text:span text:style-name="T9">D</text:span><text:span text:style-name="T9">S1</text:span><text:span text:style-name="T9">30</text:span><text:span text:style-name="T9">7/</text:span><text:span text:style-name="T9">D</text:span><text:span text:style-name="T9">S3</text:span><text:span text:style-name="T9">23</text:span><text:span text:style-name="T9">1</text:span></text:p>
          </draw:text-box>
        </draw:frame>
        <draw:connector draw:style-name="gr10" draw:text-style-name="P4" draw:layer="layout" svg:x1="20.047cm" svg:y1="13.599cm" svg:x2="20.211cm" svg:y2="13.591cm" draw:start-shape="id141" draw:start-glue-point="5" draw:end-shape="id160" draw:end-glue-point="3" svg:d="M20047 13599h82v-8h82" svg:viewBox="0 0 165 9">
          <text:p/>
        </draw:connector>
        <draw:connector draw:style-name="gr10" draw:text-style-name="P4" draw:layer="layout" draw:line-skew="-0.189cm 0.459cm" svg:x1="3.353cm" svg:y1="11.515cm" svg:x2="16.482cm" svg:y2="13.39cm" draw:start-shape="id162" draw:start-glue-point="4" draw:end-shape="id136" draw:end-glue-point="8" svg:d="M3353 11515v-908h14761v2783h-1632" svg:viewBox="0 0 14762 2784">
          <text:p/>
        </draw:connector>
        <draw:connector draw:style-name="gr10" draw:text-style-name="P4" draw:layer="layout" draw:line-skew="-0.262cm" svg:x1="3.332cm" svg:y1="9.456cm" svg:x2="16.523cm" svg:y2="12.454cm" draw:start-shape="id163" draw:start-glue-point="7" draw:end-shape="id136" draw:end-glue-point="5" svg:d="M3332 9456v799h14323v2199h-1132" svg:viewBox="0 0 14324 299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3-11T16:43:40.431621926</meta:creation-date>
    <dc:date>2026-05-08T19:43:16.207191673</dc:date>
    <meta:editing-duration>PT7H51M54S</meta:editing-duration>
    <meta:editing-cycles>65</meta:editing-cycles>
    <meta:generator>LibreOffice/25.8.6.2$Linux_X86_64 LibreOffice_project/580$Build-2</meta:generator>
    <meta:print-date>2026-05-08T19:41:10.882076628</meta:print-date>
    <meta:printed-by>Файли PDF</meta:printed-by>
    <meta:document-statistic meta:object-count="990"/>
  </office:meta>
</office:document-meta>
</file>